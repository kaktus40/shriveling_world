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meta.xml" manifest:media-type="text/xml"/>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Pictures/100000010000035B00000246F386CC8B.png" manifest:media-type="image/png"/>
  <manifest:file-entry manifest:full-path="Pictures/10000A6A00006352000043489EBD199B.svg" manifest:media-type="image/svg+xml"/>
  <manifest:file-entry manifest:full-path="Pictures/10000001000003AB00000214D99BC6C8.png" manifest:media-type="image/png"/>
  <manifest:file-entry manifest:full-path="Pictures/10000F0800007C200000466207AE83C1.svg" manifest:media-type="image/svg+xml"/>
  <manifest:file-entry manifest:full-path="Pictures/100000010000033000000264DDBA3F29.png" manifest:media-type="image/png"/>
  <manifest:file-entry manifest:full-path="Pictures/1000B89F0000741E00005222BFB877E2.svg" manifest:media-type="image/svg+xml"/>
  <manifest:file-entry manifest:full-path="Pictures/100112600000741E000052224B210EFF.svg" manifest:media-type="image/svg+xml"/>
  <manifest:file-entry manifest:full-path="Pictures/10000001000003490000025345788D1C.png" manifest:media-type="image/png"/>
  <manifest:file-entry manifest:full-path="Pictures/1001334F0000741E00005222D1C59214.svg" manifest:media-type="image/svg+xml"/>
  <manifest:file-entry manifest:full-path="Pictures/100000010000034900000253C76F9FBC.png" manifest:media-type="image/png"/>
  <manifest:file-entry manifest:full-path="Pictures/10000019000006A60000036DC8618121.gif" manifest:media-type="image/gif"/>
  <manifest:file-entry manifest:full-path="Pictures/10000001000003700000023814ADF29B.png" manifest:media-type="image/png"/>
  <manifest:file-entry manifest:full-path="Pictures/10000001000003490000025331D98389.png" manifest:media-type="image/png"/>
  <manifest:file-entry manifest:full-path="Pictures/10000025000006A40000036D855E4C83.gif" manifest:media-type="image/gif"/>
  <manifest:file-entry manifest:full-path="Pictures/10000B2B000063520000402FAC16A269.svg" manifest:media-type="image/svg+xml"/>
  <manifest:file-entry manifest:full-path="Pictures/10000001000003700000023885021CEA.png" manifest:media-type="image/png"/>
  <manifest:file-entry manifest:full-path="Pictures/1000090E000063520000402F72119772.svg" manifest:media-type="image/svg+xml"/>
  <manifest:file-entry manifest:full-path="Pictures/100013FE00007C2000005D1F7A9B6E1F.svg" manifest:media-type="image/svg+xml"/>
  <manifest:file-entry manifest:full-path="styles.xml" manifest:media-type="text/xml"/>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content.xml" manifest:media-type="text/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 manifest:media-type="application/vnd.sun.xml.ui.configuration"/>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9a016" officeooo:paragraph-rsid="0009a016"/>
    </style:style>
    <style:style style:name="P2" style:family="paragraph" style:parent-style-name="Text_20_body">
      <style:text-properties officeooo:rsid="0009a016" officeooo:paragraph-rsid="0009a016"/>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9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paragraph-properties fo:text-align="justify" style:justify-single-word="false"/>
      <style:text-properties officeooo:rsid="000c4ca2" officeooo:paragraph-rsid="000c4ca2"/>
    </style:style>
    <style:style style:name="P7" style:family="paragraph" style:parent-style-name="Text_20_body">
      <style:paragraph-properties fo:text-align="justify" style:justify-single-word="false"/>
      <style:text-properties officeooo:rsid="000cab3d" officeooo:paragraph-rsid="000cab3d"/>
    </style:style>
    <style:style style:name="P8" style:family="paragraph" style:parent-style-name="Text_20_body">
      <style:paragraph-properties fo:text-align="justify" style:justify-single-word="false"/>
      <style:text-properties officeooo:rsid="000e8384" officeooo:paragraph-rsid="000e8384"/>
    </style:style>
    <style:style style:name="P9" style:family="paragraph" style:parent-style-name="Text_20_body">
      <style:paragraph-properties fo:text-align="justify" style:justify-single-word="false"/>
      <style:text-properties officeooo:rsid="0012f99d" officeooo:paragraph-rsid="0012f99d"/>
    </style:style>
    <style:style style:name="P10" style:family="paragraph" style:parent-style-name="Text_20_body">
      <style:text-properties officeooo:rsid="0012f99d" officeooo:paragraph-rsid="0012f99d"/>
    </style:style>
    <style:style style:name="P11" style:family="paragraph" style:parent-style-name="Figure">
      <style:paragraph-properties fo:text-align="center" style:justify-single-word="false"/>
    </style:style>
    <style:style style:name="P12" style:family="paragraph" style:parent-style-name="Text_20_body">
      <style:text-properties officeooo:rsid="0021e861" officeooo:paragraph-rsid="0021e861"/>
    </style:style>
    <style:style style:name="P13" style:family="paragraph" style:parent-style-name="Text_20_body">
      <style:text-properties officeooo:rsid="0020383c" officeooo:paragraph-rsid="0020383c"/>
    </style:style>
    <style:style style:name="P14" style:family="paragraph" style:parent-style-name="Text_20_body">
      <style:text-properties officeooo:rsid="00224f17" officeooo:paragraph-rsid="00a777cf"/>
    </style:style>
    <style:style style:name="P15" style:family="paragraph" style:parent-style-name="Text_20_body" style:master-page-name="">
      <style:paragraph-properties style:page-number="auto" fo:padding="0.049cm" fo:border="1.25pt solid #0000cc"/>
      <style:text-properties officeooo:rsid="0023af20" officeooo:paragraph-rsid="00a777cf"/>
    </style:style>
    <style:style style:name="P16" style:family="paragraph" style:parent-style-name="Heading_20_2">
      <style:text-properties officeooo:rsid="00d8f01b" officeooo:paragraph-rsid="00d8f01b"/>
    </style:style>
    <style:style style:name="P17" style:family="paragraph" style:parent-style-name="Text_20_body">
      <style:text-properties officeooo:rsid="0032a0a2" officeooo:paragraph-rsid="0032a0a2"/>
    </style:style>
    <style:style style:name="P18" style:family="paragraph" style:parent-style-name="Text_20_body">
      <style:text-properties officeooo:paragraph-rsid="00360bff"/>
    </style:style>
    <style:style style:name="P19" style:family="paragraph" style:parent-style-name="Text_20_body">
      <style:text-properties officeooo:paragraph-rsid="00349898"/>
    </style:style>
    <style:style style:name="P20" style:family="paragraph" style:parent-style-name="Text_20_body">
      <style:text-properties officeooo:paragraph-rsid="003a75db"/>
    </style:style>
    <style:style style:name="P21" style:family="paragraph" style:parent-style-name="Text_20_body">
      <style:text-properties officeooo:rsid="003c6589" officeooo:paragraph-rsid="003c6589"/>
    </style:style>
    <style:style style:name="P22" style:family="paragraph" style:parent-style-name="Text_20_body">
      <style:paragraph-properties fo:padding="0.049cm" fo:border="0.99pt solid #ff3333"/>
      <style:text-properties style:text-position="0% 100%" fo:font-style="normal" officeooo:rsid="003c6589" officeooo:paragraph-rsid="003c6589" style:font-style-asian="normal" style:font-style-complex="normal"/>
    </style:style>
    <style:style style:name="P23" style:family="paragraph" style:parent-style-name="Text_20_body">
      <style:text-properties officeooo:rsid="003dddec" officeooo:paragraph-rsid="003dddec"/>
    </style:style>
    <style:style style:name="P24" style:family="paragraph" style:parent-style-name="Text_20_body">
      <style:text-properties style:text-position="0% 100%" fo:font-style="normal" officeooo:rsid="003dddec" officeooo:paragraph-rsid="003dddec" style:font-style-asian="normal" style:font-style-complex="normal"/>
    </style:style>
    <style:style style:name="P25" style:family="paragraph" style:parent-style-name="Text_20_body">
      <style:text-properties style:text-position="0% 100%" fo:font-style="normal" officeooo:rsid="00427fa3" officeooo:paragraph-rsid="00427fa3" style:font-style-asian="normal" style:font-style-complex="normal"/>
    </style:style>
    <style:style style:name="P26" style:family="paragraph" style:parent-style-name="Text_20_body">
      <style:text-properties style:text-position="0% 100%" fo:font-style="normal" officeooo:rsid="00429960" officeooo:paragraph-rsid="00429960" style:font-style-asian="normal" style:font-style-complex="normal"/>
    </style:style>
    <style:style style:name="P27" style:family="paragraph" style:parent-style-name="Text_20_body">
      <style:text-properties style:text-position="0% 100%" fo:font-style="normal" officeooo:rsid="0047c41c" officeooo:paragraph-rsid="0047c41c" style:font-style-asian="normal" style:font-style-complex="normal"/>
    </style:style>
    <style:style style:name="P28" style:family="paragraph" style:parent-style-name="Text_20_body">
      <style:text-properties style:text-position="0% 100%" fo:font-style="normal" officeooo:rsid="004b5168" officeooo:paragraph-rsid="004b5168" style:font-style-asian="normal" style:font-style-complex="normal"/>
    </style:style>
    <style:style style:name="P29" style:family="paragraph" style:parent-style-name="Text_20_body">
      <style:text-properties officeooo:paragraph-rsid="004b5168"/>
    </style:style>
    <style:style style:name="P30" style:family="paragraph" style:parent-style-name="Text_20_body">
      <style:text-properties style:text-position="0% 100%" style:font-name="Liberation Serif" fo:font-style="normal" officeooo:rsid="004ccff4" officeooo:paragraph-rsid="004b5168" style:font-style-asian="normal" style:font-style-complex="normal"/>
    </style:style>
    <style:style style:name="P31" style:family="paragraph" style:parent-style-name="Text_20_body">
      <style:text-properties style:text-position="0% 100%" style:font-name="Liberation Serif" fo:font-style="normal" officeooo:rsid="004f011f" officeooo:paragraph-rsid="004f011f" style:font-style-asian="normal" style:font-style-complex="normal"/>
    </style:style>
    <style:style style:name="P32" style:family="paragraph" style:parent-style-name="Text_20_body">
      <style:text-properties officeooo:paragraph-rsid="00559067"/>
    </style:style>
    <style:style style:name="P33" style:family="paragraph" style:parent-style-name="Text_20_body">
      <style:text-properties style:text-position="0% 100%" style:font-name="Liberation Serif" fo:font-style="normal" officeooo:rsid="00559067" officeooo:paragraph-rsid="00559067" style:font-style-asian="normal" style:font-style-complex="normal"/>
    </style:style>
    <style:style style:name="P34" style:family="paragraph" style:parent-style-name="Text_20_body" style:list-style-name="L1">
      <style:text-properties officeooo:paragraph-rsid="0062ec9a"/>
    </style:style>
    <style:style style:name="P35" style:family="paragraph" style:parent-style-name="Heading_20_2">
      <style:text-properties officeooo:paragraph-rsid="00da1e31"/>
    </style:style>
    <style:style style:name="P36" style:family="paragraph" style:parent-style-name="Text_20_body">
      <style:text-properties officeooo:rsid="007615d2" officeooo:paragraph-rsid="007615d2"/>
    </style:style>
    <style:style style:name="P37" style:family="paragraph" style:parent-style-name="Text_20_body">
      <style:text-properties officeooo:paragraph-rsid="007ced5f"/>
    </style:style>
    <style:style style:name="P38" style:family="paragraph" style:parent-style-name="Text_20_body">
      <style:text-properties officeooo:paragraph-rsid="00a1edcc"/>
    </style:style>
    <style:style style:name="P39" style:family="paragraph" style:parent-style-name="Text_20_body">
      <style:text-properties officeooo:rsid="00b1557e" officeooo:paragraph-rsid="00b1557e"/>
    </style:style>
    <style:style style:name="P40" style:family="paragraph" style:parent-style-name="Text_20_body">
      <style:text-properties style:text-position="0% 100%" officeooo:rsid="00b1557e" officeooo:paragraph-rsid="00b1557e"/>
    </style:style>
    <style:style style:name="P41" style:family="paragraph" style:parent-style-name="Text_20_body">
      <style:paragraph-properties fo:padding="0.049cm" fo:border="0.99pt solid #0000cc"/>
      <style:text-properties officeooo:paragraph-rsid="00aebd94"/>
    </style:style>
    <style:style style:name="P42" style:family="paragraph" style:parent-style-name="Text_20_body">
      <style:text-properties officeooo:paragraph-rsid="00c1d98e"/>
    </style:style>
    <style:style style:name="P43" style:family="paragraph" style:parent-style-name="Text_20_body">
      <style:text-properties style:text-position="0% 100%" officeooo:rsid="00a3df36" officeooo:paragraph-rsid="00c1d98e"/>
    </style:style>
    <style:style style:name="P44" style:family="paragraph" style:parent-style-name="Text_20_body">
      <style:text-properties style:text-position="0% 100%" officeooo:rsid="0089f18f" officeooo:paragraph-rsid="00a1edcc"/>
    </style:style>
    <style:style style:name="P45" style:family="paragraph" style:parent-style-name="Text_20_body">
      <style:text-properties officeooo:paragraph-rsid="0081710c"/>
    </style:style>
    <style:style style:name="P46" style:family="paragraph" style:parent-style-name="Text_20_body">
      <style:text-properties officeooo:rsid="00843460" officeooo:paragraph-rsid="00843460"/>
    </style:style>
    <style:style style:name="P47" style:family="paragraph" style:parent-style-name="Text_20_body">
      <style:text-properties style:text-position="0% 100%" officeooo:rsid="00e43c32" officeooo:paragraph-rsid="00e43c32"/>
    </style:style>
    <style:style style:name="P48" style:family="paragraph" style:parent-style-name="Text_20_body">
      <style:text-properties style:text-position="0% 100%" officeooo:rsid="0090ecd7" officeooo:paragraph-rsid="0090ecd7"/>
    </style:style>
    <style:style style:name="P49" style:family="paragraph" style:parent-style-name="Text_20_body">
      <style:text-properties style:text-position="0% 100%" officeooo:rsid="00ee4b3b" officeooo:paragraph-rsid="00ee4b3b"/>
    </style:style>
    <style:style style:name="P50" style:family="paragraph" style:parent-style-name="Text_20_body">
      <style:text-properties officeooo:paragraph-rsid="00f89cec"/>
    </style:style>
    <style:style style:name="P51" style:family="paragraph" style:parent-style-name="Text_20_body">
      <style:paragraph-properties fo:padding="0.049cm" fo:border="0.51pt solid #ff3333"/>
      <style:text-properties officeooo:paragraph-rsid="00f93a44"/>
    </style:style>
    <style:style style:name="P52" style:family="paragraph" style:parent-style-name="Text_20_body">
      <style:text-properties officeooo:rsid="00fed96a" officeooo:paragraph-rsid="00fed96a"/>
    </style:style>
    <style:style style:name="P53" style:family="paragraph" style:parent-style-name="Text_20_body">
      <style:text-properties officeooo:paragraph-rsid="00ff8337"/>
    </style:style>
    <style:style style:name="P54" style:family="paragraph" style:parent-style-name="Text_20_body">
      <style:text-properties officeooo:rsid="0104f945" officeooo:paragraph-rsid="0104f945"/>
    </style:style>
    <style:style style:name="P55" style:family="paragraph" style:parent-style-name="Text_20_body" style:list-style-name="L2">
      <style:text-properties officeooo:rsid="010683d6" officeooo:paragraph-rsid="010683d6"/>
    </style:style>
    <style:style style:name="P56" style:family="paragraph" style:parent-style-name="Text_20_body">
      <style:text-properties officeooo:paragraph-rsid="010cd170"/>
    </style:style>
    <style:style style:name="P57" style:family="paragraph" style:parent-style-name="Text_20_body" style:list-style-name="L2">
      <style:text-properties officeooo:rsid="010683d6" officeooo:paragraph-rsid="010e32bc"/>
    </style:style>
    <style:style style:name="P58" style:family="paragraph" style:parent-style-name="Text_20_body" style:list-style-name="L2">
      <style:text-properties style:font-name="Liberation Serif" officeooo:rsid="010bba77" officeooo:paragraph-rsid="010e32bc"/>
    </style:style>
    <style:style style:name="P59" style:family="paragraph" style:parent-style-name="Text_20_body">
      <style:text-properties officeooo:rsid="01197e58" officeooo:paragraph-rsid="01197e58"/>
    </style:style>
    <style:style style:name="P60" style:family="paragraph" style:parent-style-name="Text_20_body">
      <style:text-properties officeooo:paragraph-rsid="01197e58"/>
    </style:style>
    <style:style style:name="P61" style:family="paragraph" style:parent-style-name="Text_20_body">
      <style:text-properties officeooo:rsid="012cebb2" officeooo:paragraph-rsid="012cebb2"/>
    </style:style>
    <style:style style:name="P62" style:family="paragraph" style:parent-style-name="Text_20_body">
      <style:text-properties officeooo:paragraph-rsid="012e3474"/>
    </style:style>
    <style:style style:name="P63" style:family="paragraph" style:parent-style-name="Text_20_body">
      <style:text-properties officeooo:rsid="012f70a8" officeooo:paragraph-rsid="012f70a8"/>
    </style:style>
    <style:style style:name="P64" style:family="paragraph" style:parent-style-name="Text_20_body">
      <style:text-properties officeooo:paragraph-rsid="0136315c"/>
    </style:style>
    <style:style style:name="P65" style:family="paragraph" style:parent-style-name="Text_20_body">
      <style:text-properties officeooo:rsid="01364a04" officeooo:paragraph-rsid="01364a04"/>
    </style:style>
    <style:style style:name="P66" style:family="paragraph" style:parent-style-name="Text_20_body">
      <style:text-properties officeooo:rsid="0137d6d7" officeooo:paragraph-rsid="0137d6d7"/>
    </style:style>
    <style:style style:name="P67" style:family="paragraph" style:parent-style-name="Text_20_body">
      <style:text-properties officeooo:rsid="0139cb92" officeooo:paragraph-rsid="0139cb92"/>
    </style:style>
    <style:style style:name="P68" style:family="paragraph" style:parent-style-name="Text_20_body" style:list-style-name="L3">
      <style:paragraph-properties fo:padding="0.049cm" fo:border="none"/>
      <style:text-properties style:text-underline-style="solid" style:text-underline-width="auto" style:text-underline-color="font-color" officeooo:rsid="0141aa1c" officeooo:paragraph-rsid="0141aa1c"/>
    </style:style>
    <style:style style:name="P69" style:family="paragraph" style:parent-style-name="Text_20_body" style:list-style-name="L3">
      <style:paragraph-properties fo:padding="0.049cm" fo:border="0.51pt solid #ff9900"/>
      <style:text-properties officeooo:paragraph-rsid="0139cb92"/>
    </style:style>
    <style:style style:name="P70" style:family="paragraph" style:parent-style-name="Text_20_body" style:list-style-name="L3">
      <style:paragraph-properties fo:padding="0.049cm" fo:border="0.51pt solid #ff9900"/>
      <style:text-properties officeooo:rsid="0139cb92" officeooo:paragraph-rsid="013b245d"/>
    </style:style>
    <style:style style:name="P71" style:family="paragraph" style:parent-style-name="Text_20_body" style:list-style-name="L3">
      <style:paragraph-properties fo:padding="0.049cm" fo:border="0.51pt solid #009900"/>
      <style:text-properties officeooo:rsid="013b245d" officeooo:paragraph-rsid="013b245d"/>
    </style:style>
    <style:style style:name="P72" style:family="paragraph" style:parent-style-name="Text_20_body" style:list-style-name="L3">
      <style:paragraph-properties fo:padding="0.049cm" fo:border="0.51pt solid #009900"/>
      <style:text-properties style:font-name="Liberation Serif1" officeooo:rsid="013b245d" officeooo:paragraph-rsid="013b245d"/>
    </style:style>
    <style:style style:name="P73" style:family="paragraph" style:parent-style-name="Text_20_body" style:list-style-name="L3">
      <style:paragraph-properties fo:padding="0.049cm" fo:border="0.51pt solid #ff9900"/>
      <style:text-properties style:font-name="Liberation Serif1" officeooo:rsid="013dcad0" officeooo:paragraph-rsid="013dcad0"/>
    </style:style>
    <style:style style:name="P74" style:family="paragraph" style:parent-style-name="Text_20_body" style:list-style-name="L3">
      <style:paragraph-properties fo:padding="0.049cm" fo:border="0.51pt solid #ff9900"/>
      <style:text-properties officeooo:paragraph-rsid="013dcad0"/>
    </style:style>
    <style:style style:name="P75" style:family="paragraph" style:parent-style-name="Text_20_body" style:list-style-name="L3">
      <style:paragraph-properties fo:padding="0.049cm" fo:border="0.51pt solid #ff9900"/>
      <style:text-properties officeooo:rsid="0141aa1c" officeooo:paragraph-rsid="0141aa1c"/>
    </style:style>
    <style:style style:name="P76" style:family="paragraph" style:parent-style-name="Text_20_body" style:list-style-name="L3">
      <style:text-properties officeooo:rsid="0141aa1c" officeooo:paragraph-rsid="0141aa1c"/>
    </style:style>
    <style:style style:name="P77" style:family="paragraph" style:parent-style-name="Text_20_body" style:list-style-name="L3">
      <style:paragraph-properties fo:padding="0.049cm" fo:border="0.51pt solid #ff9900"/>
      <style:text-properties officeooo:paragraph-rsid="0141aa1c"/>
    </style:style>
    <style:style style:name="P78" style:family="paragraph" style:parent-style-name="Text_20_body" style:list-style-name="L3">
      <style:paragraph-properties fo:padding="0.049cm" fo:border="0.51pt solid #009900"/>
      <style:text-properties officeooo:rsid="01456617" officeooo:paragraph-rsid="01456617"/>
    </style:style>
    <style:style style:name="P79" style:family="paragraph" style:parent-style-name="Text_20_body" style:list-style-name="L3">
      <style:paragraph-properties fo:padding="0.049cm" fo:border="0.51pt solid #009900"/>
      <style:text-properties officeooo:rsid="0147e7e8" officeooo:paragraph-rsid="0148b426"/>
    </style:style>
    <style:style style:name="P80" style:family="paragraph" style:parent-style-name="Text_20_body">
      <style:paragraph-properties fo:padding="0.049cm" fo:border="none"/>
      <style:text-properties officeooo:rsid="0147e7e8" officeooo:paragraph-rsid="0148b426"/>
    </style:style>
    <style:style style:name="P81" style:family="paragraph" style:parent-style-name="Text_20_body" style:list-style-name="L4">
      <style:text-properties officeooo:rsid="0021e861" officeooo:paragraph-rsid="0021e861"/>
    </style:style>
    <style:style style:name="T1" style:family="text">
      <style:text-properties style:text-position="0% 100%" fo:font-style="normal" style:font-style-asian="normal" style:font-style-complex="normal"/>
    </style:style>
    <style:style style:name="T2" style:family="text">
      <style:text-properties style:font-name="Liberation Sans" fo:font-size="18.2000007629395pt" fo:font-weight="bold" officeooo:rsid="000bb003"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10024a"/>
    </style:style>
    <style:style style:name="T4" style:family="text">
      <style:text-properties officeooo:rsid="001aaf9d"/>
    </style:style>
    <style:style style:name="T5" style:family="text">
      <style:text-properties text:display="none"/>
    </style:style>
    <style:style style:name="T6" style:family="text">
      <style:text-properties officeooo:rsid="002a3337"/>
    </style:style>
    <style:style style:name="T7" style:family="text">
      <style:text-properties officeooo:rsid="0023af20"/>
    </style:style>
    <style:style style:name="T8" style:family="text">
      <style:text-properties style:text-position="sub 58%"/>
    </style:style>
    <style:style style:name="T9" style:family="text">
      <style:text-properties style:text-position="sub 58%" officeooo:rsid="00332345"/>
    </style:style>
    <style:style style:name="T10" style:family="text">
      <style:text-properties officeooo:rsid="00332345"/>
    </style:style>
    <style:style style:name="T11" style:family="text">
      <style:text-properties officeooo:rsid="00360bff"/>
    </style:style>
    <style:style style:name="T12" style:family="text">
      <style:text-properties style:font-name="Liberation Serif" officeooo:rsid="00360bff"/>
    </style:style>
    <style:style style:name="T13" style:family="text">
      <style:text-properties style:text-position="sub 58%" officeooo:rsid="00349898"/>
    </style:style>
    <style:style style:name="T14" style:family="text">
      <style:text-properties officeooo:rsid="00349898"/>
    </style:style>
    <style:style style:name="T15" style:family="text">
      <style:text-properties officeooo:rsid="00380b19"/>
    </style:style>
    <style:style style:name="T16" style:family="text">
      <style:text-properties officeooo:rsid="00395c61"/>
    </style:style>
    <style:style style:name="T17" style:family="text">
      <style:text-properties fo:font-style="normal" officeooo:rsid="003a75db" style:font-style-asian="normal" style:font-style-complex="normal"/>
    </style:style>
    <style:style style:name="T18" style:family="text">
      <style:text-properties fo:font-style="normal" officeooo:rsid="0032a0a2" style:font-style-asian="normal" style:font-style-complex="normal"/>
    </style:style>
    <style:style style:name="T19" style:family="text">
      <style:text-properties style:text-position="sub 58%" fo:font-style="normal" officeooo:rsid="0032a0a2" style:font-style-asian="normal" style:font-style-complex="normal"/>
    </style:style>
    <style:style style:name="T20" style:family="text">
      <style:text-properties style:text-position="0% 100%" fo:font-style="normal" officeooo:rsid="003a75db" style:font-style-asian="normal" style:font-style-complex="normal"/>
    </style:style>
    <style:style style:name="T21" style:family="text">
      <style:text-properties style:text-position="0% 100%" fo:font-style="normal" officeooo:rsid="0032a0a2" style:font-style-asian="normal" style:font-style-complex="normal"/>
    </style:style>
    <style:style style:name="T22" style:family="text">
      <style:text-properties style:text-position="0% 100%" fo:font-style="normal" officeooo:rsid="003aa28e" style:font-style-asian="normal" style:font-style-complex="normal"/>
    </style:style>
    <style:style style:name="T23" style:family="text">
      <style:text-properties style:text-position="0% 100%" fo:font-style="normal" officeooo:rsid="003b35b1" style:font-style-asian="normal" style:font-style-complex="normal"/>
    </style:style>
    <style:style style:name="T24" style:family="text">
      <style:text-properties style:text-position="sub 58%" fo:font-style="normal" officeooo:rsid="003aa28e" style:font-style-asian="normal" style:font-style-complex="normal"/>
    </style:style>
    <style:style style:name="T25" style:family="text">
      <style:text-properties style:text-position="0% 100%" fo:font-style="normal" officeooo:rsid="003c6589" style:font-style-asian="normal" style:font-style-complex="normal"/>
    </style:style>
    <style:style style:name="T26" style:family="text">
      <style:text-properties style:text-position="sub 58%" fo:font-style="normal" style:font-style-asian="normal" style:font-style-complex="normal"/>
    </style:style>
    <style:style style:name="T27" style:family="text">
      <style:text-properties style:text-position="0% 100%" fo:font-style="normal" officeooo:rsid="004119ff" style:font-style-asian="normal" style:font-style-complex="normal"/>
    </style:style>
    <style:style style:name="T28" style:family="text">
      <style:text-properties style:text-position="sub 58%" fo:font-style="normal" officeooo:rsid="004119ff" style:font-style-asian="normal" style:font-style-complex="normal"/>
    </style:style>
    <style:style style:name="T29" style:family="text">
      <style:text-properties style:font-name="Liberation Serif"/>
    </style:style>
    <style:style style:name="T30" style:family="text">
      <style:text-properties style:font-name="Liberation Serif" officeooo:rsid="00429960"/>
    </style:style>
    <style:style style:name="T31" style:family="text">
      <style:text-properties style:text-position="sub 58%" style:font-name="Liberation Serif" officeooo:rsid="00429960"/>
    </style:style>
    <style:style style:name="T32" style:family="text">
      <style:text-properties style:text-position="sub 58%" style:font-name="Liberation Serif"/>
    </style:style>
    <style:style style:name="T33" style:family="text">
      <style:text-properties style:font-name="Liberation Serif" fo:font-size="10pt" officeooo:rsid="004ac774" style:font-size-asian="10pt" style:font-size-complex="10pt"/>
    </style:style>
    <style:style style:name="T34" style:family="text">
      <style:text-properties style:font-name="Liberation Serif" officeooo:rsid="004ac774"/>
    </style:style>
    <style:style style:name="T35" style:family="text">
      <style:text-properties style:text-position="0% 100%" style:font-name="Liberation Serif" fo:font-style="normal" officeooo:rsid="004b5168" style:font-style-asian="normal" style:font-style-complex="normal"/>
    </style:style>
    <style:style style:name="T36" style:family="text">
      <style:text-properties style:text-position="0% 100%" style:font-name="Liberation Serif" fo:font-style="normal" officeooo:rsid="004ccff4" style:font-style-asian="normal" style:font-style-complex="normal"/>
    </style:style>
    <style:style style:name="T37" style:family="text">
      <style:text-properties style:text-position="0% 100%" style:font-name="Liberation Serif" fo:font-style="normal" officeooo:rsid="004dcfef" style:font-style-asian="normal" style:font-style-complex="normal"/>
    </style:style>
    <style:style style:name="T38" style:family="text">
      <style:text-properties style:text-position="0% 100%" style:font-name="Liberation Serif" fo:font-style="normal" officeooo:rsid="00559067" style:font-style-asian="normal" style:font-style-complex="normal"/>
    </style:style>
    <style:style style:name="T39" style:family="text">
      <style:text-properties style:text-position="0% 100%" style:font-name="Liberation Serif" fo:font-style="normal" officeooo:rsid="00567fd8" style:font-style-asian="normal" style:font-style-complex="normal"/>
    </style:style>
    <style:style style:name="T40" style:family="text">
      <style:text-properties style:text-position="0% 100%" style:font-name="Liberation Serif" fo:font-style="normal" officeooo:rsid="01472207" style:font-style-asian="normal" style:font-style-complex="normal"/>
    </style:style>
    <style:style style:name="T41" style:family="text">
      <style:text-properties officeooo:rsid="00567fd8"/>
    </style:style>
    <style:style style:name="T42" style:family="text">
      <style:text-properties officeooo:rsid="00662500"/>
    </style:style>
    <style:style style:name="T43" style:family="text">
      <style:text-properties style:text-position="0% 100%" style:font-name="Liberation Serif" fo:font-style="normal" officeooo:rsid="0062ec9a" style:font-style-asian="normal" style:font-style-complex="normal"/>
    </style:style>
    <style:style style:name="T44" style:family="text">
      <style:text-properties style:text-position="super 58%" style:font-name="Liberation Serif" fo:font-style="normal" officeooo:rsid="0062ec9a" style:font-style-asian="normal" style:font-style-complex="normal"/>
    </style:style>
    <style:style style:name="T45" style:family="text">
      <style:text-properties style:text-position="0% 100%" style:font-name="Liberation Serif" fo:font-style="normal" officeooo:rsid="00653aba" style:font-style-asian="normal" style:font-style-complex="normal"/>
    </style:style>
    <style:style style:name="T46" style:family="text">
      <style:text-properties style:text-position="0% 100%" style:font-name="Liberation Serif" fo:font-style="normal" officeooo:rsid="0066bc14" style:font-style-asian="normal" style:font-style-complex="normal"/>
    </style:style>
    <style:style style:name="T47" style:family="text">
      <style:text-properties style:text-position="sub 58%" style:font-name="Liberation Serif" fo:font-style="normal" officeooo:rsid="00653aba" style:font-style-asian="normal" style:font-style-complex="normal"/>
    </style:style>
    <style:style style:name="T48" style:family="text">
      <style:text-properties style:text-position="0% 100%" style:font-name="Liberation Serif" fo:font-style="normal" officeooo:rsid="0067395b" style:font-style-asian="normal" style:font-style-complex="normal"/>
    </style:style>
    <style:style style:name="T49" style:family="text">
      <style:text-properties style:text-position="0% 100%" style:font-name="Liberation Serif" fo:font-style="normal" fo:font-weight="bold" officeooo:rsid="0067395b" style:font-style-asian="normal" style:font-weight-asian="bold" style:font-style-complex="normal" style:font-weight-complex="bold"/>
    </style:style>
    <style:style style:name="T50" style:family="text">
      <style:text-properties style:text-position="0% 100%" style:font-name="Liberation Serif" fo:font-style="normal" officeooo:rsid="00680733" style:font-style-asian="normal" style:font-style-complex="normal"/>
    </style:style>
    <style:style style:name="T51" style:family="text">
      <style:text-properties style:text-position="sub 58%" style:font-name="Liberation Serif" fo:font-style="normal" officeooo:rsid="00680733" style:font-style-asian="normal" style:font-style-complex="normal"/>
    </style:style>
    <style:style style:name="T52" style:family="text">
      <style:text-properties style:text-position="0% 100%" style:font-name="Liberation Serif" fo:font-style="normal" officeooo:rsid="006d9b52" style:font-style-asian="normal" style:font-style-complex="normal"/>
    </style:style>
    <style:style style:name="T53" style:family="text">
      <style:text-properties style:text-position="0% 100%" style:font-name="Liberation Serif" fo:font-style="normal" officeooo:rsid="00da1e31" style:font-style-asian="normal" style:font-style-complex="normal"/>
    </style:style>
    <style:style style:name="T54" style:family="text">
      <style:text-properties officeooo:rsid="007ced5f"/>
    </style:style>
    <style:style style:name="T55" style:family="text">
      <style:text-properties style:text-position="sub 58%" officeooo:rsid="007ced5f"/>
    </style:style>
    <style:style style:name="T56" style:family="text">
      <style:text-properties style:text-position="0% 100%" officeooo:rsid="007ced5f"/>
    </style:style>
    <style:style style:name="T57" style:family="text">
      <style:text-properties style:text-position="super 58%" officeooo:rsid="007ced5f"/>
    </style:style>
    <style:style style:name="T58" style:family="text">
      <style:text-properties style:text-position="0% 100%" officeooo:rsid="007df4f0"/>
    </style:style>
    <style:style style:name="T59" style:family="text">
      <style:text-properties style:text-position="sub 58%" officeooo:rsid="007df4f0"/>
    </style:style>
    <style:style style:name="T60" style:family="text">
      <style:text-properties style:text-position="0% 100%" officeooo:rsid="00e14ae9"/>
    </style:style>
    <style:style style:name="T61" style:family="text">
      <style:text-properties style:text-position="0% 100%" officeooo:rsid="007f6640"/>
    </style:style>
    <style:style style:name="T62" style:family="text">
      <style:text-properties style:text-position="0% 100%" officeooo:rsid="00811678"/>
    </style:style>
    <style:style style:name="T63" style:family="text">
      <style:text-properties style:text-position="0% 100%" officeooo:rsid="008158b2"/>
    </style:style>
    <style:style style:name="T64" style:family="text">
      <style:text-properties style:text-position="sub 58%" officeooo:rsid="008158b2"/>
    </style:style>
    <style:style style:name="T65" style:family="text">
      <style:text-properties style:text-position="0% 100%" officeooo:rsid="00db9798"/>
    </style:style>
    <style:style style:name="T66" style:family="text">
      <style:text-properties style:text-position="0% 100%" style:font-name="Liberation Serif" officeooo:rsid="00db9798"/>
    </style:style>
    <style:style style:name="T67" style:family="text">
      <style:text-properties style:text-position="sub 58%" style:font-name="Liberation Serif1" officeooo:rsid="00db9798"/>
    </style:style>
    <style:style style:name="T68" style:family="text">
      <style:text-properties style:text-position="0% 100%" style:font-name="Liberation Serif1" officeooo:rsid="00db9798"/>
    </style:style>
    <style:style style:name="T69" style:family="text">
      <style:text-properties style:text-position="0% 100%" style:font-name="Liberation Serif1" officeooo:rsid="00e18e22"/>
    </style:style>
    <style:style style:name="T70" style:family="text">
      <style:text-properties style:text-position="sub 58%" style:font-name="Liberation Serif1" officeooo:rsid="00e18e22"/>
    </style:style>
    <style:style style:name="T71" style:family="text">
      <style:text-properties style:text-position="0% 100%" officeooo:rsid="00893830"/>
    </style:style>
    <style:style style:name="T72" style:family="text">
      <style:text-properties style:text-position="sub 58%" officeooo:rsid="00893830"/>
    </style:style>
    <style:style style:name="T73" style:family="text">
      <style:text-properties style:text-position="0% 100%" officeooo:rsid="00a1edcc"/>
    </style:style>
    <style:style style:name="T74" style:family="text">
      <style:text-properties style:text-position="sub 58%" officeooo:rsid="00a1edcc"/>
    </style:style>
    <style:style style:name="T75" style:family="text">
      <style:text-properties style:text-position="0% 100%" officeooo:rsid="009773c1"/>
    </style:style>
    <style:style style:name="T76" style:family="text">
      <style:text-properties style:text-position="0% 100%"/>
    </style:style>
    <style:style style:name="T77" style:family="text">
      <style:text-properties style:text-position="0% 100%" officeooo:rsid="00b2b040"/>
    </style:style>
    <style:style style:name="T78" style:family="text">
      <style:text-properties style:text-position="0% 100%" officeooo:rsid="00b3214c"/>
    </style:style>
    <style:style style:name="T79" style:family="text">
      <style:text-properties style:text-position="0% 100%" officeooo:rsid="00a2c35c"/>
    </style:style>
    <style:style style:name="T80" style:family="text">
      <style:text-properties style:text-position="0% 100%" officeooo:rsid="00a532dc"/>
    </style:style>
    <style:style style:name="T81" style:family="text">
      <style:text-properties style:text-position="sub 58%" officeooo:rsid="00a532dc"/>
    </style:style>
    <style:style style:name="T82" style:family="text">
      <style:text-properties style:text-position="0% 100%" officeooo:rsid="00a3df36"/>
    </style:style>
    <style:style style:name="T83" style:family="text">
      <style:text-properties style:text-position="sub 58%" officeooo:rsid="00a3df36"/>
    </style:style>
    <style:style style:name="T84" style:family="text">
      <style:text-properties style:text-position="0% 100%" officeooo:rsid="00b1557e"/>
    </style:style>
    <style:style style:name="T85" style:family="text">
      <style:text-properties style:text-position="sub 58%" officeooo:rsid="00b1557e"/>
    </style:style>
    <style:style style:name="T86" style:family="text">
      <style:text-properties style:text-position="0% 100%" officeooo:rsid="0089f18f"/>
    </style:style>
    <style:style style:name="T87" style:family="text">
      <style:text-properties style:text-position="sub 58%" officeooo:rsid="0089f18f"/>
    </style:style>
    <style:style style:name="T88" style:family="text">
      <style:text-properties style:text-position="0% 100%" officeooo:rsid="00cb6a96"/>
    </style:style>
    <style:style style:name="T89" style:family="text">
      <style:text-properties officeooo:rsid="0081710c"/>
    </style:style>
    <style:style style:name="T90" style:family="text">
      <style:text-properties style:text-position="sub 58%" officeooo:rsid="0081710c"/>
    </style:style>
    <style:style style:name="T91" style:family="text">
      <style:text-properties officeooo:rsid="00852639"/>
    </style:style>
    <style:style style:name="T92" style:family="text">
      <style:text-properties style:text-position="0% 100%" officeooo:rsid="00862648"/>
    </style:style>
    <style:style style:name="T93" style:family="text">
      <style:text-properties style:text-position="0% 100%" officeooo:rsid="0088aa0c"/>
    </style:style>
    <style:style style:name="T94" style:family="text">
      <style:text-properties officeooo:rsid="0147e7e8"/>
    </style:style>
    <style:style style:name="T95" style:family="text">
      <style:text-properties style:text-position="0% 100%" officeooo:rsid="00f89cec"/>
    </style:style>
    <style:style style:name="T96" style:family="text">
      <style:text-properties style:text-position="0% 100%" style:font-name="Liberation Serif" fo:font-weight="bold" officeooo:rsid="00f89cec" style:font-weight-asian="bold" style:font-weight-complex="bold"/>
    </style:style>
    <style:style style:name="T97" style:family="text">
      <style:text-properties style:text-position="sub 58%" style:font-name="Liberation Serif1" fo:font-weight="bold" officeooo:rsid="00f89cec" style:font-weight-asian="bold" style:font-weight-complex="bold"/>
    </style:style>
    <style:style style:name="T98" style:family="text">
      <style:text-properties style:text-position="0% 100%" style:font-name="Liberation Serif1" fo:font-weight="bold" officeooo:rsid="00f89cec" style:font-weight-asian="bold" style:font-weight-complex="bold"/>
    </style:style>
    <style:style style:name="T99" style:family="text">
      <style:text-properties style:text-position="0% 100%" style:font-name="Liberation Serif1" officeooo:rsid="00f89cec"/>
    </style:style>
    <style:style style:name="T100" style:family="text">
      <style:text-properties style:text-position="0% 100%" style:font-name="Liberation Serif" officeooo:rsid="00f89cec"/>
    </style:style>
    <style:style style:name="T101" style:family="text">
      <style:text-properties style:text-position="sub 58%" style:font-name="Liberation Serif1" officeooo:rsid="00f89cec"/>
    </style:style>
    <style:style style:name="T102" style:family="text">
      <style:text-properties style:text-position="0% 100%" style:font-name="Liberation Serif1" officeooo:rsid="00f93a44"/>
    </style:style>
    <style:style style:name="T103" style:family="text">
      <style:text-properties style:text-position="0% 100%" style:font-name="Liberation Serif1" fo:font-style="italic" officeooo:rsid="00f93a44" style:font-style-asian="italic" style:font-style-complex="italic"/>
    </style:style>
    <style:style style:name="T104" style:family="text">
      <style:text-properties style:text-position="sub 58%" style:font-name="Liberation Serif1" officeooo:rsid="00f93a44"/>
    </style:style>
    <style:style style:name="T105" style:family="text">
      <style:text-properties style:text-position="0% 100%" style:font-name="Liberation Serif1" officeooo:rsid="00fa37e9"/>
    </style:style>
    <style:style style:name="T106" style:family="text">
      <style:text-properties officeooo:rsid="010a7a9b"/>
    </style:style>
    <style:style style:name="T107" style:family="text">
      <style:text-properties officeooo:rsid="00ff8337"/>
    </style:style>
    <style:style style:name="T108" style:family="text">
      <style:text-properties style:text-position="sub 58%" officeooo:rsid="00ff8337"/>
    </style:style>
    <style:style style:name="T109" style:family="text">
      <style:text-properties style:text-position="0% 100%" officeooo:rsid="00ff8337"/>
    </style:style>
    <style:style style:name="T110" style:family="text">
      <style:text-properties style:text-position="0% 100%" officeooo:rsid="01034456"/>
    </style:style>
    <style:style style:name="T111" style:family="text">
      <style:text-properties officeooo:rsid="01034456"/>
    </style:style>
    <style:style style:name="T112" style:family="text">
      <style:text-properties officeooo:rsid="010a5b10"/>
    </style:style>
    <style:style style:name="T113" style:family="text">
      <style:text-properties officeooo:rsid="010683d6"/>
    </style:style>
    <style:style style:name="T114" style:family="text">
      <style:text-properties officeooo:rsid="010bba77"/>
    </style:style>
    <style:style style:name="T115" style:family="text">
      <style:text-properties style:text-position="sub 58%" officeooo:rsid="010bba77"/>
    </style:style>
    <style:style style:name="T116" style:family="text">
      <style:text-properties style:font-name="Liberation Serif" officeooo:rsid="010bba77"/>
    </style:style>
    <style:style style:name="T117" style:family="text">
      <style:text-properties officeooo:rsid="012b8d7d"/>
    </style:style>
    <style:style style:name="T118" style:family="text">
      <style:text-properties officeooo:rsid="012cebb2"/>
    </style:style>
    <style:style style:name="T119" style:family="text">
      <style:text-properties style:text-position="0% 100%" style:font-name="Liberation Serif1" officeooo:rsid="012e3474"/>
    </style:style>
    <style:style style:name="T120" style:family="text">
      <style:text-properties officeooo:rsid="0136315c"/>
    </style:style>
    <style:style style:name="T121" style:family="text">
      <style:text-properties officeooo:rsid="0139cb92"/>
    </style:style>
    <style:style style:name="T122" style:family="text">
      <style:text-properties style:font-name="Liberation Serif" officeooo:rsid="0139cb92"/>
    </style:style>
    <style:style style:name="T123" style:family="text">
      <style:text-properties style:text-position="sub 58%" style:font-name="Liberation Serif1" officeooo:rsid="0139cb92"/>
    </style:style>
    <style:style style:name="T124" style:family="text">
      <style:text-properties style:font-name="Liberation Serif1" officeooo:rsid="0139cb92"/>
    </style:style>
    <style:style style:name="T125" style:family="text">
      <style:text-properties style:font-name="Liberation Serif1"/>
    </style:style>
    <style:style style:name="T126" style:family="text">
      <style:text-properties style:text-position="sub 58%" style:font-name="Liberation Serif1"/>
    </style:style>
    <style:style style:name="T127" style:family="text">
      <style:text-properties style:font-name="Liberation Serif1" officeooo:rsid="013dcad0"/>
    </style:style>
    <style:style style:name="T128" style:family="text">
      <style:text-properties style:font-name="Liberation Serif1" officeooo:rsid="01407c7f"/>
    </style:style>
    <style:style style:name="T129" style:family="text">
      <style:text-properties style:font-name="Liberation Serif1" officeooo:rsid="013eeb5c"/>
    </style:style>
    <style:style style:name="T130" style:family="text">
      <style:text-properties style:font-name="Liberation Serif1" officeooo:rsid="0141aa1c"/>
    </style:style>
    <style:style style:name="T131" style:family="text">
      <style:text-properties style:font-name="Liberation Serif1" officeooo:rsid="0142e5ad"/>
    </style:style>
    <style:style style:name="T132" style:family="text">
      <style:text-properties style:text-position="sub 58%" style:font-name="Liberation Serif" officeooo:rsid="0142e5ad"/>
    </style:style>
    <style:style style:name="T133" style:family="text">
      <style:text-properties style:font-name="Liberation Serif" officeooo:rsid="0141aa1c"/>
    </style:style>
    <style:style style:name="T134" style:family="text">
      <style:text-properties style:font-name="Liberation Serif" officeooo:rsid="0142e5ad"/>
    </style:style>
    <style:style style:name="T135" style:family="text">
      <style:text-properties style:text-position="0% 100%" style:font-name="Liberation Serif"/>
    </style:style>
    <style:style style:name="T136" style:family="text">
      <style:text-properties style:text-position="0% 100%" style:font-name="Liberation Serif" officeooo:rsid="0147e7e8"/>
    </style:style>
    <style:style style:name="T137" style:family="text">
      <style:text-properties style:text-position="0% 100%" style:font-name="Liberation Serif" officeooo:rsid="0147cae1"/>
    </style:style>
    <style:style style:name="T138" style:family="text">
      <style:text-properties style:text-position="0% 100%" style:font-name="Liberation Serif" officeooo:rsid="0148b426"/>
    </style:style>
    <style:style style:name="T139" style:family="text">
      <style:text-properties style:text-position="0% 100%" style:font-name="Liberation Serif1" officeooo:rsid="0148b426"/>
    </style:style>
    <style:style style:name="T140" style:family="text">
      <style:text-properties style:text-position="0% 100%" style:font-name="Liberation Serif1" officeooo:rsid="0148b426" loext:padding="0.049cm" loext:border="0.51pt solid #ff9900"/>
    </style:style>
    <style:style style:name="T141" style:family="text">
      <style:text-properties style:text-position="0% 100%" style:font-name="Liberation Serif1" officeooo:rsid="0148b426" loext:padding="0.049cm" loext:border="none"/>
    </style:style>
    <style:style style:name="T142" style:family="text">
      <style:text-properties style:text-position="0% 100%" style:font-name="Liberation Serif1" officeooo:rsid="014ab204" loext:padding="0.049cm" loext:border="none"/>
    </style:style>
    <style:style style:name="T143" style:family="text">
      <style:text-properties style:text-position="0% 100%" style:font-name="Liberation Serif1" officeooo:rsid="0148b426" loext:padding="0.049cm" loext:border="0.51pt solid #0099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fo:padding="0.049cm" fo:border="0.99pt solid #009900" draw:ole-draw-aspect="1"/>
    </style:style>
    <style:style style:name="fr7" style:family="graphic" style:parent-style-name="Formula">
      <style:graphic-properties style:wrap="parallel" style:number-wrapped-paragraphs="no-limit" style:wrap-contour="false" style:vertical-pos="from-top" style:horizontal-pos="from-left" style:horizontal-rel="paragraph-content" fo:background-color="transparent" draw:fill="none" draw:fill-color="#729fcf" fo:padding="0.049cm" fo:border="0.06pt groove #000000" draw:ole-draw-aspect="1"/>
    </style:style>
    <style:style style:name="fr8" style:family="graphic" style:parent-style-name="Formula">
      <style:graphic-properties style:vertical-pos="from-top" style:horizontal-pos="from-left" style:horizontal-rel="paragraph-content" fo:padding="0.049cm" fo:border="0.99pt solid #ff3333" draw:ole-draw-aspect="1"/>
    </style:style>
    <style:style style:name="fr9" style:family="graphic" style:parent-style-name="Formula">
      <style:graphic-properties style:vertical-pos="from-top" style:horizontal-pos="from-left" style:horizontal-rel="paragraph-content" fo:padding="0.049cm" fo:border="0.51pt solid #ff3333"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termination des intersections</text:p>
      <text:p text:style-name="P2"/>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
            <text:a xlink:type="simple" xlink:href="#__RefHeading___Toc112_3347998797" office:name="Objectif" text:style-name="Index_20_Link" text:visited-style-name="Index_20_Link">Objectif<text:tab/>2</text:a>
          </text:p>
          <text:p text:style-name="P3">
            <text:a xlink:type="simple" xlink:href="#__RefHeading___Toc99_920643201" office:name="présentation du problème" text:style-name="Index_20_Link" text:visited-style-name="Index_20_Link">présentation du problème<text:tab/>2</text:a>
          </text:p>
          <text:p text:style-name="P3">
            <text:a xlink:type="simple" xlink:href="#__RefHeading___Toc101_920643201" office:name="Propriétés spécifiques" text:style-name="Index_20_Link" text:visited-style-name="Index_20_Link">Propriétés spécifiques<text:tab/>4</text:a>
          </text:p>
          <text:p text:style-name="P4">
            <text:a xlink:type="simple" xlink:href="#__RefHeading___Toc909_120585349" office:name="Cas des cônes réguliers (axe de révolution) ayant le même angle au sommet" text:style-name="Index_20_Link" text:visited-style-name="Index_20_Link">Cas des cônes réguliers (axe de révolution) ayant le même angle au sommet<text:tab/>4</text:a>
          </text:p>
          <text:p text:style-name="P4">
            <text:a xlink:type="simple" xlink:href="#__RefHeading___Toc911_120585349" office:name="c as générique : cônes irréguliers (angle au sommet dépendant de l’arête considérée)" text:style-name="Index_20_Link" text:visited-style-name="Index_20_Link"><text:span text:style-name="T1">c</text:span><text:span text:style-name="T1">as générique : cônes irréguliers (angle au sommet dépendant de l’arête considérée)</text:span><text:tab/>6</text:a>
          </text:p>
          <text:p text:style-name="P4">
            <text:a xlink:type="simple" xlink:href="#__RefHeading___Toc1114_2196019965" office:name="Condition nécessaire d’intersection entre deux cônes" text:style-name="Index_20_Link" text:visited-style-name="Index_20_Link">Condition nécessaire d’intersection entre deux cônes<text:tab/>9</text:a>
          </text:p>
          <text:p text:style-name="P4">
            <text:a xlink:type="simple" xlink:href="#__RefHeading___Toc1116_2196019965" office:name="Bonus game" text:style-name="Index_20_Link" text:visited-style-name="Index_20_Link">Bonus game<text:tab/>10</text:a>
          </text:p>
          <text:p text:style-name="P3">
            <text:a xlink:type="simple" xlink:href="#__RefHeading___Toc1166_2196019965" office:name="Algorithme" text:style-name="Index_20_Link" text:visited-style-name="Index_20_Link">Algorithme<text:tab/>11</text:a>
          </text:p>
          <text:p text:style-name="P3">
            <text:a xlink:type="simple" xlink:href="#__RefHeading___Toc1455_2896945936" office:name="Annexe de migration - algorithme d'intersection retenu en 2026" text:style-name="Index_20_Link" text:visited-style-name="Index_20_Link">Annexe de migration - algorithme d'intersection retenu en 2026<text:tab/>12</text:a>
          </text:p>
          <text:p text:style-name="P4">
            <text:a xlink:type="simple" xlink:href="#__RefHeading___Toc1457_2896945936" office:name="Objectif numérique précis" text:style-name="Index_20_Link" text:visited-style-name="Index_20_Link">Objectif numérique précis<text:tab/>12</text:a>
          </text:p>
          <text:p text:style-name="P4">
            <text:a xlink:type="simple" xlink:href="#__RefHeading___Toc1459_2896945936" office:name="Décisions qui complètent ou corrigent l'algorithme historique" text:style-name="Index_20_Link" text:visited-style-name="Index_20_Link">Décisions qui complètent ou corrigent l'algorithme historique<text:tab/>12</text:a>
          </text:p>
          <text:p text:style-name="P4">
            <text:a xlink:type="simple" xlink:href="#__RefHeading___Toc1461_2896945936" office:name="Référence CPU exhaustive" text:style-name="Index_20_Link" text:visited-style-name="Index_20_Link">Référence CPU exhaustive<text:tab/>13</text:a>
          </text:p>
          <text:p text:style-name="P4">
            <text:a xlink:type="simple" xlink:href="#__RefHeading___Toc1463_2896945936" office:name="Rayon symétrique et ordre de parcours" text:style-name="Index_20_Link" text:visited-style-name="Index_20_Link">Rayon symétrique et ordre de parcours<text:tab/>13</text:a>
          </text:p>
          <text:p text:style-name="P4">
            <text:a xlink:type="simple" xlink:href="#__RefHeading___Toc1465_2896945936" office:name="Prise en compte de l'angle alpha et de son atténuation" text:style-name="Index_20_Link" text:visited-style-name="Index_20_Link">Prise en compte de l'angle alpha et de son atténuation<text:tab/>14</text:a>
          </text:p>
          <text:p text:style-name="P4">
            <text:a xlink:type="simple" xlink:href="#__RefHeading___Toc1580_4094019039" office:name="Cas limites des supports rapides dans le repère local de B" text:style-name="Index_20_Link" text:visited-style-name="Index_20_Link">Cas limites des supports rapides dans le repère local de B<text:tab/>15</text:a>
          </text:p>
          <text:p text:style-name="P4">
            <text:a xlink:type="simple" xlink:href="#__RefHeading___Toc1582_4094019039" office:name="Fourchette prioritaire candidate" text:style-name="Index_20_Link" text:visited-style-name="Index_20_Link">Fourchette prioritaire candidate<text:tab/>16</text:a>
          </text:p>
          <text:p text:style-name="P4">
            <text:a xlink:type="simple" xlink:href="#__RefHeading___Toc1467_2896945936" office:name="Critère d'arrêt garanti et BVH circulaire" text:style-name="Index_20_Link" text:visited-style-name="Index_20_Link">Critère d'arrêt garanti et BVH circulaire<text:tab/>17</text:a>
          </text:p>
          <text:p text:style-name="P4">
            <text:a xlink:type="simple" xlink:href="#__RefHeading___Toc1469_2896945936" office:name="Loi d'atténuation à évaluer" text:style-name="Index_20_Link" text:visited-style-name="Index_20_Link">Loi d'atténuation à évaluer<text:tab/>18</text:a>
          </text:p>
          <text:p text:style-name="P4">
            <text:a xlink:type="simple" xlink:href="#__RefHeading___Toc1471_2896945936" office:name="Profils de calcul et organisation WebGPU" text:style-name="Index_20_Link" text:visited-style-name="Index_20_Link">Profils de calcul et organisation WebGPU<text:tab/>18</text:a>
          </text:p>
          <text:p text:style-name="P4">
            <text:a xlink:type="simple" xlink:href="#__RefHeading___Toc1473_2896945936" office:name="Stratégies et benchmarks obligatoires" text:style-name="Index_20_Link" text:visited-style-name="Index_20_Link">Stratégies et benchmarks obligatoires<text:tab/>19</text:a>
          </text:p>
          <text:p text:style-name="P4">
            <text:a xlink:type="simple" xlink:href="#__RefHeading___Toc1475_2896945936" office:name="État d'implémentation au 7 juin 2026" text:style-name="Index_20_Link" text:visited-style-name="Index_20_Link">État d'implémentation au 7 juin 2026<text:tab/>19</text:a>
          </text:p>
        </text:index-body>
      </text:table-of-content>
      <text:p text:style-name="P2"/>
      <text:h text:style-name="P5" text:outline-level="1"><text:bookmark-start text:name="__RefHeading___Toc112_3347998797"/><text:span text:style-name="T2">O</text:span>bje<text:span text:style-name="T2">ctif</text:span><text:bookmark-end text:name="__RefHeading___Toc112_3347998797"/></text:h>
      <text:p text:style-name="P6">Chaque ville considérée est l’origine d’un cône irrégulier (il n’y a pas nécessairement d’axe de révolution). Selon les positions géométriques des villes, des moyens de transports et de l’année considérés, la forme de chaque cône est évolutive. Dans le but d’améliorer le rendu de cette représentation, les cônes ne doivent pas se chevaucher et s’arrêter à leurs intersections respectives quand cela est nécessaire.</text:p>
      <text:p text:style-name="P7">L’objet de ce document est d’identifier un algorithme relativement rapide pour calculer ces dites intersections afin de bénéficier d’un rendu satisfaisant tout en ayant une impression de fluidité lors de changement de paramètres telle que l’année.</text:p>
      <text:p text:style-name="P7">La première partie du document rappelle la position du problème et les hypothèses qui sont considérées. La deuxième partie propose quand à elle des propriétés utiles à la compréhension de l’algorithme à mettre en place pour finir sur l’algorithme proprement dit.</text:p>
      <text:h text:style-name="Heading_20_1" text:outline-level="1"><text:bookmark-start text:name="__RefHeading___Toc99_920643201"/>présentation du problème<text:bookmark-end text:name="__RefHeading___Toc99_920643201"/></text:h>
      <text:p text:style-name="P8">Dans les modélisations qu’on souhaite représenter, près de 1700 villes réparties sur toute la Terre sont considérées. <text:span text:style-name="T3">Chacune de ces villes est à l’origine d’un cône irrégulier orienté vers le centre de la Terre et dont l’angle au sommet de chaque arête représente un taux de vitesse relatif à une vitesse maximale pour l’année considérée.Dans notre modèle chaque ville peut au maximum posséder 360 arêtes (une arête tous les degrés).</text:span></text:p>
      <text:p text:style-name="P9">À chaque mise à jour du modèl<text:span text:style-name="T4">e ( changement d’année par exemple), nous aurons potentiellement 1700*1699*360=10 397 880 000 ensembles de calculs à produire pour rafraîchir l’affichage des cônes.</text:span></text:p>
      <text:p text:style-name="P10">
        <draw:frame draw:style-name="fr1" draw:name="Cadre1" text:anchor-type="paragraph" svg:width="16.141cm" draw:z-index="1">
          <draw:text-box fo:min-height="11.882cm">
            <text:p text:style-name="P11"><draw:frame draw:style-name="fr2" draw:name="Image1" text:anchor-type="as-char" svg:y="-11.753cm" svg:width="15.496cm" style:rel-width="96%" svg:height="10.959cm" style:rel-height="scale" draw:z-index="20"><draw:image xlink:href="Pictures/1000B89F0000741E00005222BFB877E2.svg" xlink:type="simple" xlink:show="embed" xlink:actuate="onLoad" draw:mime-type="image/svg+xml"/><draw:image xlink:href="Pictures/10000001000003490000025345788D1C.png" xlink:type="simple" xlink:show="embed" xlink:actuate="onLoad" draw:mime-type="image/png"/></draw:frame><text:span text:style-name="T5"><text:line-break/></text:span>Figure <text:sequence text:ref-name="refFigure0" text:name="Figure" text:formula="ooow:Figure+1" style:num-format="1">1</text:sequence>: exemple d'une ville avec un cône irrégulier et son référentiel local</text:p>
          </draw:text-box>
        </draw:frame>
        <text:soft-page-break/>
        <text:s text:c="5"/>
      </text:p>
      <text:p text:style-name="P10">
        <draw:frame draw:style-name="fr1" draw:name="Cadre2" text:anchor-type="paragraph" svg:width="14.818cm" draw:z-index="2">
          <draw:text-box fo:min-height="10.691cm">
            <text:p text:style-name="P11"><draw:frame draw:style-name="fr3" draw:name="Image2" text:anchor-type="as-char" svg:width="14.818cm" style:rel-width="100%" svg:height="10.479cm" style:rel-height="scale" draw:z-index="36"><draw:image xlink:href="Pictures/1001334F0000741E00005222D1C59214.svg" xlink:type="simple" xlink:show="embed" xlink:actuate="onLoad" draw:mime-type="image/svg+xml"/><draw:image xlink:href="Pictures/100000010000034900000253C76F9FBC.png" xlink:type="simple" xlink:show="embed" xlink:actuate="onLoad" draw:mime-type="image/png"/></draw:frame><text:span text:style-name="T5"><text:line-break/></text:span>Figure <text:sequence text:ref-name="refFigure1" text:name="Figure" text:formula="ooow:Figure+1" style:num-format="1">2</text:sequence>: problème d'intersection des cônes <text:span text:style-name="T6">irréguliers</text:span> pour des villes proches : <text:span text:style-name="T6">les arêtes roses doivent se limiter aux intersections éventuelles avec les côtes des autres cônes.</text:span></text:p>
          </draw:text-box>
        </draw:frame>
        <text:s text:c="3"/>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Au vu du grand nombre de calculs à produire, le rendu ne peut pas être fluide si seul le CPU est en action. Aussi l’algorithme à produire doit au maximum être parallélisable afin que le GPU puisse supporter le maximum de charge !</text:p>
      <text:p text:style-name="P13"/>
      <text:h text:style-name="Heading_20_1" text:outline-level="1"><text:bookmark-start text:name="__RefHeading___Toc101_920643201"/>Propriétés spécifiques<text:bookmark-end text:name="__RefHeading___Toc101_920643201"/></text:h>
      <text:p text:style-name="P14">Dans le cadre de ce chapitre d’identification de propriétés spécifiques, le raisonnement sera porté sur des cônes de révolution ayant un angle au sommet compris entre un angle minimum et un angle maximum <text:span text:style-name="T7">(</text:span><text:span text:style-name="T7"><draw:frame draw:style-name="fr4" draw:name="Objet1" text:anchor-type="as-char" svg:y="-0.377cm" svg:width="2.013cm" svg:height="0.531cm" draw:z-index="0"><draw:object xlink:href="./Object 1" xlink:type="simple" xlink:show="embed" xlink:actuate="onLoad"/><draw:image xlink:href="./ObjectReplacements/Object 1" xlink:type="simple" xlink:show="embed" xlink:actuate="onLoad"/></draw:frame></text:span><text:span text:style-name="T7">)</text:span>. <text:span text:style-name="T7">De cette manière les cônes irréguliers sont compris entre ces deux extrémités (voir figure 1). </text:span></text:p>
      <text:p text:style-name="P15">L’objectif de ce chapitre est d’identifier le domaine dans lequel une arête d’un cône réel et irrégulier peut être en intersection avec un autre cône irrégulier.</text:p>
      <text:h text:style-name="P16" text:outline-level="2"><text:bookmark-start text:name="__RefHeading___Toc909_120585349"/>Cas des cônes réguliers (axe de révolution) ayant le même angle au sommet<text:bookmark-end text:name="__RefHeading___Toc909_120585349"/></text:h>
      <text:p text:style-name="Text_20_body">
        <draw:frame draw:style-name="fr5" draw:name="Image3" text:anchor-type="paragraph" svg:width="17cm" svg:height="8.759cm" draw:z-index="3">
          <draw:image xlink:href="Pictures/10000019000006A60000036DC8618121.gif" xlink:type="simple" xlink:show="embed" xlink:actuate="onLoad" draw:mime-type="image/gif"/>
        </draw:frame>
        <text:s text:c="3"/>
      </text:p>
      <text:p text:style-name="P17">Soient deux villes (nommées respectivement V<text:span text:style-name="T8">1</text:span> et V<text:span text:style-name="T8">2</text:span>) situées à la surface de la Terre de rayon R et de centre C, chacune des villes possède un référentiel orthonormé direct (ROND) local constitué du nord, est et bas locaux (North, East, Down ou NED<text:span text:style-name="T9">1</text:span><text:span text:style-name="T10"> et NED</text:span><text:span text:style-name="T9">2</text:span>) .</text:p>
      <text:p text:style-name="P18">
        <text:span text:style-name="T11">Pour un angle </text:span>
        <text:span text:style-name="T12">α</text:span>
        <text:span text:style-name="T11">compris entre l’horizontal local et la surface du cône, le cône de sommet V</text:span>
        <text:span text:style-name="T13">1</text:span>
        <text:span text:style-name="T14">(respectivement <text:s/>V</text:span>
        <text:span text:style-name="T13">2</text:span>
        <text:span text:style-name="T14">) et d’axe de révolution (V</text:span>
        <text:span text:style-name="T13">1</text:span>
        <text:span text:style-name="T14">C) (respectivement (V</text:span>
        <text:span text:style-name="T13">2</text:span>
        <text:span text:style-name="T14">C)) possède pour équation caractéristique :</text:span>
      </text:p>
      <text:p text:style-name="P19">
        <draw:frame draw:style-name="fr4" draw:name="Objet2" text:anchor-type="as-char" svg:y="-0.437cm" svg:width="4.286cm" svg:height="0.591cm" draw:z-index="37">
          <draw:object xlink:href="./Object 2" xlink:type="simple" xlink:show="embed" xlink:actuate="onLoad"/>
          <draw:image xlink:href="./ObjectReplacements/Object 2" xlink:type="simple" xlink:show="embed" xlink:actuate="onLoad"/>
        </draw:frame>
        <text:s text:c="3"/>
        <text:span text:style-name="T15">voir </text:span>
        <text:a xlink:type="simple" xlink:href="https://fr.wikipedia.org/wiki/Cône_de_révolution" text:style-name="Internet_20_link" text:visited-style-name="Visited_20_Internet_20_Link">
          <text:span text:style-name="T15">wikipedia</text:span>
        </text:a>
      </text:p>
      <text:p text:style-name="P19">
        <draw:frame draw:style-name="fr4" draw:name="Objet3" text:anchor-type="as-char" svg:y="-0.743cm" svg:width="2.683cm" svg:height="1.182cm" draw:z-index="38">
          <draw:object xlink:href="./Object 3" xlink:type="simple" xlink:show="embed" xlink:actuate="onLoad"/>
          <draw:image xlink:href="./ObjectReplacements/Object 3" xlink:type="simple" xlink:show="embed" xlink:actuate="onLoad"/>
        </draw:frame>
        <text:s text:c="5"/>
        <text:span text:style-name="T16">(respectivement </text:span>
        <text:span text:style-name="T16">
          <draw:frame draw:style-name="fr4" draw:name="Objet4" text:anchor-type="as-char" svg:y="-0.743cm" svg:width="2.683cm" svg:height="1.182cm" draw:z-index="39">
            <draw:object xlink:href="./Object 4" xlink:type="simple" xlink:show="embed" xlink:actuate="onLoad"/>
            <draw:image xlink:href="./ObjectReplacements/Object 4" xlink:type="simple" xlink:show="embed" xlink:actuate="onLoad"/>
            <svg:desc>formule</svg:desc>
          </draw:frame>
        </text:span>
        <text:span text:style-name="T16"><text:s text:c="2"/>)</text:span>
      </text:p>
      <text:p text:style-name="P20">
        <text:soft-page-break/>
        <text:s text:c="3"/>
        <text:span text:style-name="T17">Soit (P) le plan médian du segment [</text:span>
        <text:span text:style-name="T18">V</text:span>
        <text:span text:style-name="T19">1</text:span>
        <text:span text:style-name="T18">V</text:span>
        <text:span text:style-name="T19">2</text:span>
        <text:span text:style-name="T17">], C le centre de la Terre appartient nécessairement à (P) par construction. L’axe de révolution (C</text:span>
        <text:span text:style-name="T18">V</text:span>
        <text:span text:style-name="T19">2</text:span>
        <text:span text:style-name="T20">) est donc bien l’image de l’axe de révolution (C</text:span>
        <text:span text:style-name="T21">V</text:span>
        <text:span text:style-name="T19">1</text:span>
        <text:span text:style-name="T20">) par rapport au plan médian (P). </text:span>
        <text:span text:style-name="T22">T</text:span>
        <text:span text:style-name="T23">rivialement, on peut aussi démontrer que</text:span>
        <text:span text:style-name="T22">le référentiel loca</text:span>
        <text:span text:style-name="T23">l</text:span>
        <text:span text:style-name="T22">NED</text:span>
        <text:span text:style-name="T24">2</text:span>
        <text:span text:style-name="T22">e</text:span>
        <text:span text:style-name="T23">s</text:span>
        <text:span text:style-name="T22">t </text:span>
        <text:span text:style-name="T23">l’image du référentiel local</text:span>
        <text:span text:style-name="T22">NED</text:span>
        <text:span text:style-name="T24">1</text:span>
        <text:span text:style-name="T23">par rapport au plan médian (P) composé avec une rotation autour de l’axe de révolution.</text:span>
      </text:p>
      <text:p text:style-name="P21">
        <text:span text:style-name="T23">A</text:span>
        <text:span text:style-name="T1">insi on démontre que le plan médian est aussi plan de symétrie.</text:span>
      </text:p>
      <text:p text:style-name="P22">On en déduit que le plan médian est le plan d’intersection des deux cônes quand leurs angles au sommet sont égaux !</text:p>
      <text:p text:style-name="P23">
        <text:span text:style-name="T25">S</text:span>
        <text:span text:style-name="T1">oit M</text:span>
        <text:span text:style-name="T26">1</text:span>
        <text:span text:style-name="T1">un point du cône ayant pour sommet V</text:span>
        <text:span text:style-name="T26">1</text:span>
        <text:span text:style-name="T1">, alors </text:span>
        <text:span text:style-name="T27">les coordonnées de M</text:span>
        <text:span text:style-name="T28">1</text:span>
        <text:span text:style-name="T27">s’expriment de la manière suivante</text:span>
      </text:p>
      <text:p text:style-name="P24">
        <draw:frame draw:style-name="fr4" draw:name="Objet5" text:anchor-type="as-char" svg:y="-0.871cm" svg:width="9.052cm" svg:height="1.603cm" draw:z-index="4">
          <draw:object xlink:href="./Object 5" xlink:type="simple" xlink:show="embed" xlink:actuate="onLoad"/>
          <draw:image xlink:href="./ObjectReplacements/Object 5" xlink:type="simple" xlink:show="embed" xlink:actuate="onLoad"/>
        </draw:frame>
        <text:s text:c="3"/>
      </text:p>
      <text:p text:style-name="P25">Le triangle V<text:span text:style-name="T8">1</text:span>V<text:span text:style-name="T8">2</text:span>C est isocèle en C en conséquence, si <text:span text:style-name="T29">θ est l’angle formé par les vecteurs </text:span><text:span text:style-name="T29"><draw:frame draw:style-name="fr4" draw:name="Objet6" text:anchor-type="as-char" svg:y="-0.429cm" svg:width="0.956cm" svg:height="0.584cm" draw:z-index="40"><draw:object xlink:href="./Object 6" xlink:type="simple" xlink:show="embed" xlink:actuate="onLoad"/><draw:image xlink:href="./ObjectReplacements/Object 6" xlink:type="simple" xlink:show="embed" xlink:actuate="onLoad"/></draw:frame></text:span><text:span text:style-name="T29">et </text:span><text:span text:style-name="T29"><draw:frame draw:style-name="fr4" draw:name="Objet7" text:anchor-type="as-char" svg:y="-0.429cm" svg:width="0.958cm" svg:height="0.584cm" draw:z-index="41"><draw:object xlink:href="./Object 7" xlink:type="simple" xlink:show="embed" xlink:actuate="onLoad"/><draw:image xlink:href="./ObjectReplacements/Object 7" xlink:type="simple" xlink:show="embed" xlink:actuate="onLoad"/><svg:desc>formule</svg:desc></draw:frame></text:span><text:span text:style-name="T29">(angle au sommet C) alors les angles </text:span><text:span text:style-name="T30">aux sommets V</text:span><text:span text:style-name="T31">1</text:span><text:span text:style-name="T30"> et V</text:span><text:span text:style-name="T31">2</text:span><text:span text:style-name="T30"> sont égaux à </text:span><text:span text:style-name="T30"><draw:frame draw:style-name="fr4" draw:name="Objet8" text:anchor-type="as-char" svg:y="-0.483cm" svg:width="1.117cm" svg:height="0.861cm" draw:z-index="42"><draw:object xlink:href="./Object 8" xlink:type="simple" xlink:show="embed" xlink:actuate="onLoad"/><draw:image xlink:href="./ObjectReplacements/Object 8" xlink:type="simple" xlink:show="embed" xlink:actuate="onLoad"/></draw:frame></text:span><text:span text:style-name="T30">.</text:span></text:p>
      <text:p text:style-name="P26">
        <text:span text:style-name="T29">Si γ est l’azimut de V</text:span>
        <text:span text:style-name="T32">2</text:span>
        <text:span text:style-name="T29">dans NED</text:span>
        <text:span text:style-name="T32">1 </text:span>
        <text:span text:style-name="T29">depuis V</text:span>
        <text:span text:style-name="T32">1</text:span>
        <text:span text:style-name="T29">(dans le plan horizontal local de V</text:span>
        <text:span text:style-name="T32">1</text:span>
        <text:span text:style-name="T29">, c’est l’angle formé entre le nord local est la direction de V</text:span>
        <text:span text:style-name="T32">2</text:span>
        <text:span text:style-name="T29">) alors un vecteur normal à (P) est </text:span>
        <text:span text:style-name="T29">
          <draw:frame draw:style-name="fr4" draw:name="Objet9" text:anchor-type="as-char" svg:y="-1.515cm" svg:width="3.695cm" svg:height="2.893cm" draw:z-index="43">
            <draw:object xlink:href="./Object 9" xlink:type="simple" xlink:show="embed" xlink:actuate="onLoad"/>
            <draw:image xlink:href="./ObjectReplacements/Object 9" xlink:type="simple" xlink:show="embed" xlink:actuate="onLoad"/>
          </draw:frame>
        </text:span>
        <text:span text:style-name="T29"><text:s text:c="2"/>.</text:span>
      </text:p>
      <text:p text:style-name="P27">
        <text:span text:style-name="T29">Soit </text:span>
        <text:span text:style-name="T29">
          <draw:frame draw:style-name="fr4" draw:name="Objet10" text:anchor-type="as-char" svg:y="-0.871cm" svg:width="7.138cm" svg:height="1.603cm" draw:z-index="44">
            <draw:object xlink:href="./Object 10" xlink:type="simple" xlink:show="embed" xlink:actuate="onLoad"/>
            <draw:image xlink:href="./ObjectReplacements/Object 10" xlink:type="simple" xlink:show="embed" xlink:actuate="onLoad"/>
          </draw:frame>
        </text:span>
        <text:span text:style-name="T29"><text:s text:c="3"/>alors </text:span>
        <text:span text:style-name="T29">
          <draw:frame draw:style-name="fr4" draw:name="Objet11" text:anchor-type="as-char" svg:y="-0.871cm" svg:width="3.974cm" svg:height="1.603cm" draw:z-index="45">
            <draw:object xlink:href="./Object 11" xlink:type="simple" xlink:show="embed" xlink:actuate="onLoad"/>
            <draw:image xlink:href="./ObjectReplacements/Object 11" xlink:type="simple" xlink:show="embed" xlink:actuate="onLoad"/>
          </draw:frame>
        </text:span>
        <text:span text:style-name="T29"><text:s text:c="2"/> :</text:span>
      </text:p>
      <text:p text:style-name="P27">
        <text:span text:style-name="T29">
          <draw:frame draw:style-name="fr4" draw:name="Objet12" text:anchor-type="as-char" svg:y="-0.483cm" svg:width="8.384cm" svg:height="0.861cm" draw:z-index="46">
            <draw:object xlink:href="./Object 12" xlink:type="simple" xlink:show="embed" xlink:actuate="onLoad"/>
            <draw:image xlink:href="./ObjectReplacements/Object 12" xlink:type="simple" xlink:show="embed" xlink:actuate="onLoad"/>
          </draw:frame>
        </text:span>
        <text:span text:style-name="T29">
          <text:s text:c="3"/>
        </text:span>
        <text:span text:style-name="T33">(EQ 1)</text:span>
      </text:p>
      <text:p text:style-name="P28">
        <text:span text:style-name="T34">(</text:span>
        <text:span text:style-name="T29">EQ 1) est l’équation du plan (P) dans le référentiel NED</text:span>
        <text:span text:style-name="T32">1</text:span>
        <text:span text:style-name="T29">.</text:span>
      </text:p>
      <text:p text:style-name="P29">
        <text:span text:style-name="T35">Pour rappel, </text:span>
        <text:span text:style-name="T36">pour tout point </text:span>
        <text:span text:style-name="T36">
          <draw:frame draw:style-name="fr4" draw:name="Objet13" text:anchor-type="as-char" svg:y="-0.944cm" svg:width="1.944cm" svg:height="1.801cm" draw:z-index="47">
            <draw:object xlink:href="./Object 13" xlink:type="simple" xlink:show="embed" xlink:actuate="onLoad"/>
            <draw:image xlink:href="./ObjectReplacements/Object 13" xlink:type="simple" xlink:show="embed" xlink:actuate="onLoad"/>
          </draw:frame>
        </text:span>
        <text:span text:style-name="T36"><text:s text:c="3"/>de l’espace, la distance entre A et l</text:span>
        <text:span text:style-name="T37">e</text:span>
        <text:span text:style-name="T36">plan </text:span>
        <text:span text:style-name="T37">(P)</text:span>
        <text:span text:style-name="T36">est donné par la formule suivante :</text:span>
      </text:p>
      <text:p text:style-name="P30">
        <draw:frame draw:style-name="fr4" draw:name="Objet14" text:anchor-type="as-char" svg:y="-0.483cm" svg:width="9.656cm" svg:height="0.863cm" draw:z-index="48">
          <draw:object xlink:href="./Object 14" xlink:type="simple" xlink:show="embed" xlink:actuate="onLoad"/>
          <draw:image xlink:href="./ObjectReplacements/Object 14" xlink:type="simple" xlink:show="embed" xlink:actuate="onLoad"/>
        </draw:frame>
        <text:s text:c="3"/>
      </text:p>
      <text:p text:style-name="P31">En particulier pour A=M<text:span text:style-name="T8">1 </text:span>:</text:p>
      <text:p text:style-name="P31">
        <draw:frame draw:style-name="fr4" draw:name="Objet15" text:anchor-type="as-char" svg:y="-0.4cm" svg:width="12.06cm" svg:height="0.716cm" draw:z-index="49">
          <draw:object xlink:href="./Object 15" xlink:type="simple" xlink:show="embed" xlink:actuate="onLoad"/>
          <draw:image xlink:href="./ObjectReplacements/Object 15" xlink:type="simple" xlink:show="embed" xlink:actuate="onLoad"/>
          <svg:desc>formule</svg:desc>
        </draw:frame>
        <text:s text:c="3"/>
      </text:p>
      <text:p text:style-name="P32">
        <text:span text:style-name="T38">Pour identifier le domaine de Φ </text:span>
        <text:span text:style-name="T39">pour lequel il y a intersection entre le plan et le cône, il suffit de faire un changement de variable dans l</text:span>
        <text:span text:style-name="T40">a fonction précédente</text:span>
        <text:span text:style-name="T39">avec une distance nulle :</text:span>
      </text:p>
      <text:p text:style-name="P33">
        <text:soft-page-break/>
        <text:s text:c="3"/>
        <text:span text:style-name="T41">
          <draw:frame draw:style-name="fr4" draw:name="Objet16" text:anchor-type="as-char" svg:y="-0.681cm" svg:width="7.899cm" svg:height="1.118cm" draw:z-index="6">
            <draw:object xlink:href="./Object 16" xlink:type="simple" xlink:show="embed" xlink:actuate="onLoad"/>
            <draw:image xlink:href="./ObjectReplacements/Object 16" xlink:type="simple" xlink:show="embed" xlink:actuate="onLoad"/>
          </draw:frame>
        </text:span>
        <text:span text:style-name="T41"><text:s text:c="2"/>.</text:span>
      </text:p>
      <text:p text:style-name="P33">
        <draw:frame draw:style-name="fr6" draw:name="Objet17" text:anchor-type="as-char" svg:y="-1.397cm" svg:width="9.511cm" svg:height="2.824cm" draw:z-index="7">
          <draw:object xlink:href="./Object 17" xlink:type="simple" xlink:show="embed" xlink:actuate="onLoad"/>
          <draw:image xlink:href="./ObjectReplacements/Object 17" xlink:type="simple" xlink:show="embed" xlink:actuate="onLoad"/>
        </draw:frame>
        <text:s text:c="3"/>
        <text:span text:style-name="T42">(EQ 2)</text:span>
      </text:p>
      <text:list text:style-name="L1">
        <text:list-item>
          <text:p text:style-name="P34">
            <text:span text:style-name="T43">cas où le coefficient de t</text:span>
            <text:span text:style-name="T44">2</text:span>
            <text:span text:style-name="T43">est nul : </text:span>
            <text:span text:style-name="T45">Le plan </text:span>
            <text:span text:style-name="T46">(Q) </text:span>
            <text:span text:style-name="T45">contenant (V</text:span>
            <text:span text:style-name="T47">1</text:span>
            <text:span text:style-name="T45">C) et le vecteur </text:span>
            <text:span text:style-name="T45">
              <draw:frame draw:style-name="fr4" draw:name="Objet18" text:anchor-type="as-char" svg:y="-0.377cm" svg:width="0.422cm" svg:height="0.467cm" draw:z-index="50">
                <draw:object xlink:href="./Object 18" xlink:type="simple" xlink:show="embed" xlink:actuate="onLoad"/>
                <draw:image xlink:href="./ObjectReplacements/Object 18" xlink:type="simple" xlink:show="embed" xlink:actuate="onLoad"/>
              </draw:frame>
            </text:span>
            <text:span text:style-name="T45"><text:s text:c="2"/>est perpendiculaire à (P) et est un plan de symétrie pour le cône de sommet V</text:span>
            <text:span text:style-name="T47">1</text:span>
            <text:span text:style-name="T45">. </text:span>
            <text:span text:style-name="T46">La résolution de l’équation (EQ 2) ne propose au plus qu’une solution. Le problème étant symétrique par rapport à (Q), cette solution unique se trouve dans ce plan. Dans ce cadre, </text:span>
            <text:span text:style-name="T46">
              <draw:frame draw:style-name="fr7" draw:name="Objet19" text:anchor-type="as-char" svg:y="-0.355cm" svg:width="1.274cm" svg:height="0.515cm" draw:z-index="51">
                <draw:object xlink:href="./Object 19" xlink:type="simple" xlink:show="embed" xlink:actuate="onLoad"/>
                <draw:image xlink:href="./ObjectReplacements/Object 19" xlink:type="simple" xlink:show="embed" xlink:actuate="onLoad"/>
              </draw:frame>
            </text:span>
            <text:span text:style-name="T46">
              <text:s text:c="3"/>
            </text:span>
          </text:p>
        </text:list-item>
        <text:list-item>
          <text:p text:style-name="P34">
            <text:span text:style-name="T43">cas où le coefficient de t</text:span>
            <text:span text:style-name="T44">2</text:span>
            <text:span text:style-name="T43">est différent de zéro : </text:span>
            <text:span text:style-name="T48">L’équation EQ2 trouve </text:span>
            <text:span text:style-name="T49">au plus deux solutions distinctes correspondant à </text:span>
            <text:span text:style-name="T49">
              <draw:frame draw:style-name="fr4" draw:name="Objet20" text:anchor-type="as-char" svg:y="-0.377cm" svg:width="2.312cm" svg:height="0.531cm" draw:z-index="52">
                <draw:object xlink:href="./Object 20" xlink:type="simple" xlink:show="embed" xlink:actuate="onLoad"/>
                <draw:image xlink:href="./ObjectReplacements/Object 20" xlink:type="simple" xlink:show="embed" xlink:actuate="onLoad"/>
              </draw:frame>
            </text:span>
            <text:span text:style-name="T49">
              <text:s text:c="3"/>
            </text:span>
            <text:span text:style-name="T48">, domaine dans lequel le cône est en intersection avec le plan (P). </text:span>
            <text:span text:style-name="T50">Dans ce cadre l’injection des coordonnées de M</text:span>
            <text:span text:style-name="T51">1</text:span>
            <text:span text:style-name="T50">dans EQ1, nous donne la relation suivante : <text:line-break/></text:span>
            <text:span text:style-name="T50">
              <draw:frame draw:style-name="fr4" draw:name="Objet21" text:anchor-type="as-char" svg:y="-0.441cm" svg:width="12.377cm" svg:height="0.788cm" draw:z-index="53">
                <draw:object xlink:href="./Object 21" xlink:type="simple" xlink:show="embed" xlink:actuate="onLoad"/>
                <draw:image xlink:href="./ObjectReplacements/Object 21" xlink:type="simple" xlink:show="embed" xlink:actuate="onLoad"/>
              </draw:frame>
            </text:span>
            <text:span text:style-name="T50"><text:s text:c="2"/><text:line-break/>d’où </text:span>
            <text:span text:style-name="T50">
              <draw:frame draw:style-name="fr8" draw:name="Objet22" text:anchor-type="as-char" svg:y="-1.561cm" svg:width="11.663cm" svg:height="2.972cm" draw:z-index="54">
                <draw:object xlink:href="./Object 22" xlink:type="simple" xlink:show="embed" xlink:actuate="onLoad"/>
                <draw:image xlink:href="./ObjectReplacements/Object 22" xlink:type="simple" xlink:show="embed" xlink:actuate="onLoad"/>
              </draw:frame>
            </text:span>
            <text:span text:style-name="T50">
              <text:s text:c="3"/>
            </text:span>
            <text:span text:style-name="T40">(relation 1)</text:span>
          </text:p>
        </text:list-item>
      </text:list>
      <text:h text:style-name="P35" text:outline-level="2">
        <text:bookmark-start text:name="__RefHeading___Toc911_120585349"/>
        <text:span text:style-name="T52">c</text:span>
        <text:span text:style-name="T53">as générique : cônes irréguliers (angle au sommet dépendant de l’arête considérée)</text:span>
        <text:bookmark-end text:name="__RefHeading___Toc911_120585349"/>
      </text:h>
      <text:p text:style-name="P36">Les cônes réels sont compris entre deux cônes de révolution. En reprenant les notations précédentes,</text:p>
      <text:p text:style-name="P36">on définit comme <draw:frame draw:style-name="fr4" draw:name="Objet23" text:anchor-type="as-char" svg:y="-0.377cm" svg:width="2.316cm" svg:height="0.531cm" draw:z-index="55"><draw:object xlink:href="./Object 23" xlink:type="simple" xlink:show="embed" xlink:actuate="onLoad"/><draw:image xlink:href="./ObjectReplacements/Object 23" xlink:type="simple" xlink:show="embed" xlink:actuate="onLoad"/><svg:desc>formule</svg:desc></draw:frame>(respectivement <draw:frame draw:style-name="fr4" draw:name="Objet24" text:anchor-type="as-char" svg:y="-0.377cm" svg:width="2.318cm" svg:height="0.531cm" draw:z-index="56"><draw:object xlink:href="./Object 24" xlink:type="simple" xlink:show="embed" xlink:actuate="onLoad"/><draw:image xlink:href="./ObjectReplacements/Object 24" xlink:type="simple" xlink:show="embed" xlink:actuate="onLoad"/><svg:desc>formule</svg:desc></draw:frame>) les angles entre lesquels est compris le cône réel ayant pour sommet la ville V<text:span text:style-name="T8">1</text:span> (respectivement V<text:span text:style-name="T8">2</text:span>).</text:p>
      <text:p text:style-name="P37">
        <text:span text:style-name="T54">Soit i un entier naturel positif, on désigne par ar</text:span>
        <text:span text:style-name="T55">1i</text:span>
        <text:span text:style-name="T56">(respectivement ar</text:span>
        <text:span text:style-name="T55">2i</text:span>
        <text:span text:style-name="T56">)la i</text:span>
        <text:span text:style-name="T57">ème</text:span>
        <text:span text:style-name="T56">arête du cône ayant pour sommet V</text:span>
        <text:span text:style-name="T55">1</text:span>
        <text:span text:style-name="T56">(respectivement V</text:span>
        <text:span text:style-name="T55">2</text:span>
        <text:span text:style-name="T56">).</text:span>
      </text:p>
      <text:p text:style-name="P38">
        <text:span text:style-name="T56">S</text:span>
        <text:span text:style-name="T58">oit M</text:span>
        <text:span text:style-name="T59">1i</text:span>
        <text:span text:style-name="T58">u</text:span>
        <text:span text:style-name="T60">n</text:span>
        <text:span text:style-name="T58">point de l’arête </text:span>
        <text:span text:style-name="T56">ar</text:span>
        <text:span text:style-name="T55">1i</text:span>
        <text:span text:style-name="T58">, </text:span>
        <text:span text:style-name="T61">les coordonnées de </text:span>
        <text:span text:style-name="T58">M</text:span>
        <text:span text:style-name="T59">1i</text:span>
        <text:span text:style-name="T62">sont </text:span>
        <text:span text:style-name="T62">
          <draw:frame draw:style-name="fr4" draw:name="Objet25" text:anchor-type="as-char" svg:y="-0.944cm" svg:width="10.527cm" svg:height="1.801cm" draw:z-index="57">
            <draw:object xlink:href="./Object 25" xlink:type="simple" xlink:show="embed" xlink:actuate="onLoad"/>
            <draw:image xlink:href="./ObjectReplacements/Object 25" xlink:type="simple" xlink:show="embed" xlink:actuate="onLoad"/>
          </draw:frame>
        </text:span>
        <text:span text:style-name="T62">
          <text:s text:c="3"/>
        </text:span>
        <text:span text:style-name="T63">dans NED</text:span>
        <text:span text:style-name="T64">1</text:span>
        <text:span text:style-name="T65">avec </text:span>
        <text:span text:style-name="T66">Φ</text:span>
        <text:span text:style-name="T67">1i</text:span>
        <text:span text:style-name="T68">l’azimut de l’arête considérée par rapport au nord local, </text:span>
        <text:span text:style-name="T66">α</text:span>
        <text:span text:style-name="T67">1i</text:span>
        <text:span text:style-name="T68">l’angle entre l’horizontal local et l’arête </text:span>
        <text:span text:style-name="T69">et r la distance entre V</text:span>
        <text:span text:style-name="T70">1</text:span>
        <text:span text:style-name="T69">et M</text:span>
        <text:span text:style-name="T70">1i</text:span>
        <text:span text:style-name="T63">. </text:span>
      </text:p>
      <text:p text:style-name="P38">
        <text:span text:style-name="T71">Les transformations pour passer de NED</text:span>
        <text:span text:style-name="T72">1</text:span>
        <text:span text:style-name="T71">à NED</text:span>
        <text:span text:style-name="T72">2</text:span>
        <text:span text:style-name="T71">consistent en une rotation d’angle </text:span>
        <text:span text:style-name="T71">
          <draw:frame draw:style-name="fr4" draw:name="Objet30" text:anchor-type="as-char" svg:y="-0.22cm" svg:width="0.603cm" svg:height="0.374cm" draw:z-index="58">
            <draw:object xlink:href="./Object 30" xlink:type="simple" xlink:show="embed" xlink:actuate="onLoad"/>
            <draw:image xlink:href="./ObjectReplacements/Object 30" xlink:type="simple" xlink:show="embed" xlink:actuate="onLoad"/>
          </draw:frame>
        </text:span>
        <text:span text:style-name="T71"><text:s text:c="3"/>autour du troisième axe </text:span>
        <text:span text:style-name="T73">[R</text:span>
        <text:span text:style-name="T74">z</text:span>
        <text:span text:style-name="T73">(</text:span>
        <text:span text:style-name="T73">
          <draw:frame draw:style-name="fr4" draw:name="Objet26" text:anchor-type="as-char" svg:y="-0.22cm" svg:width="0.603cm" svg:height="0.374cm" draw:z-index="59">
            <draw:object xlink:href="./Object 26" xlink:type="simple" xlink:show="embed" xlink:actuate="onLoad"/>
            <draw:image xlink:href="./ObjectReplacements/Object 26" xlink:type="simple" xlink:show="embed" xlink:actuate="onLoad"/>
            <svg:desc>formule</svg:desc>
          </draw:frame>
        </text:span>
        <text:span text:style-name="T73"><text:s text:c="2"/>)]</text:span>
        <text:span text:style-name="T71">suivi</text:span>
        <text:span text:style-name="T75">e</text:span>
        <text:span text:style-name="T71">d’une rotation d’angle </text:span>
        <text:span text:style-name="T71">
          <draw:frame draw:style-name="fr4" draw:name="Objet31" text:anchor-type="as-char" svg:y="-0.305cm" svg:width="0.767cm" svg:height="0.332cm" draw:z-index="60">
            <draw:object xlink:href="./Object 31" xlink:type="simple" xlink:show="embed" xlink:actuate="onLoad"/>
            <draw:image xlink:href="./ObjectReplacements/Object 31" xlink:type="simple" xlink:show="embed" xlink:actuate="onLoad"/>
          </draw:frame>
        </text:span>
        <text:span text:style-name="T71"><text:s text:c="2"/>autour du second axe</text:span>
        <text:span text:style-name="T73">[R</text:span>
        <text:span text:style-name="T74">y</text:span>
        <text:span text:style-name="T73">(</text:span>
        <text:span text:style-name="T73">
          <draw:frame draw:style-name="fr4" draw:name="Objet38" text:anchor-type="as-char" svg:y="-0.305cm" svg:width="0.767cm" svg:height="0.332cm" draw:z-index="61">
            <draw:object xlink:href="./Object 38" xlink:type="simple" xlink:show="embed" xlink:actuate="onLoad"/>
            <draw:image xlink:href="./ObjectReplacements/Object 38" xlink:type="simple" xlink:show="embed" xlink:actuate="onLoad"/>
            <svg:desc>formule</svg:desc>
          </draw:frame>
        </text:span>
        <text:span text:style-name="T73"><text:s text:c="2"/>)] </text:span>
        <text:s text:c="2"/>
        <text:span text:style-name="T71">p</text:span>
        <text:span text:style-name="T75">uis d’</text:span>
        <text:span text:style-name="T71">une rotation d’angle </text:span>
        <text:span text:style-name="T71">
          <draw:frame draw:style-name="fr4" draw:name="Objet32" text:anchor-type="as-char" svg:y="-0.222cm" svg:width="1.214cm" svg:height="0.376cm" draw:z-index="8">
            <draw:object xlink:href="./Object 32" xlink:type="simple" xlink:show="embed" xlink:actuate="onLoad"/>
            <draw:image xlink:href="./ObjectReplacements/Object 32" xlink:type="simple" xlink:show="embed" xlink:actuate="onLoad"/>
            <svg:desc>formule</svg:desc>
          </draw:frame>
        </text:span>
        <text:span text:style-name="T71">
          <text:s text:c="3"/>
        </text:span>
        <text:span text:style-name="T73">autour du troisième axe [R</text:span>
        <text:span text:style-name="T74">z</text:span>
        <text:span text:style-name="T73">(</text:span>
        <text:span text:style-name="T73">
          <draw:frame draw:style-name="fr4" draw:name="Objet39" text:anchor-type="as-char" svg:y="-0.222cm" svg:width="1.214cm" svg:height="0.376cm" draw:z-index="9">
            <draw:object xlink:href="./Object 39" xlink:type="simple" xlink:show="embed" xlink:actuate="onLoad"/>
            <draw:image xlink:href="./ObjectReplacements/Object 39" xlink:type="simple" xlink:show="embed" xlink:actuate="onLoad"/>
            <svg:desc>formule</svg:desc>
          </draw:frame>
        </text:span>
        <text:span text:style-name="T73"><text:s text:c="2"/>)]</text:span>
        <text:span text:style-name="T75">et enfin une translation de vecteur </text:span>
        <text:span text:style-name="T75">
          <draw:frame draw:style-name="fr4" draw:name="Objet36" text:anchor-type="as-char" svg:y="-0.427cm" svg:width="1.185cm" svg:height="0.58cm" draw:z-index="10">
            <draw:object xlink:href="./Object 36" xlink:type="simple" xlink:show="embed" xlink:actuate="onLoad"/>
            <draw:image xlink:href="./ObjectReplacements/Object 36" xlink:type="simple" xlink:show="embed" xlink:actuate="onLoad"/>
          </draw:frame>
        </text:span>
        <text:span text:style-name="T75"><text:s text:c="2"/>(en espace affine)</text:span>
        <text:span text:style-name="T71">.</text:span>
      </text:p>
      <text:p text:style-name="P39">
        <text:soft-page-break/>
        <text:s/>
        <text:span text:style-name="T71">L</text:span>
        <text:span text:style-name="T76">a matrice de passage de NED</text:span>
        <text:span text:style-name="T8">2</text:span>
        <text:span text:style-name="T76">à NED</text:span>
        <text:span text:style-name="T8">1</text:span>
        <text:span text:style-name="T77">
          <draw:frame draw:style-name="fr4" draw:name="Objet42" text:anchor-type="as-char" svg:y="-0.377cm" svg:width="2.131cm" svg:height="0.568cm" draw:z-index="11">
            <draw:object xlink:href="./Object 42" xlink:type="simple" xlink:show="embed" xlink:actuate="onLoad"/>
            <draw:image xlink:href="./ObjectReplacements/Object 42" xlink:type="simple" xlink:show="embed" xlink:actuate="onLoad"/>
          </draw:frame>
        </text:span>
        <text:span text:style-name="T77">
          <text:s text:c="3"/>
        </text:span>
        <text:span text:style-name="T78">en espace vectoriel </text:span>
        <text:span text:style-name="T76">est :</text:span>
      </text:p>
      <text:p text:style-name="P40">
        <draw:frame draw:style-name="fr4" draw:name="Objet43" text:anchor-type="as-char" svg:y="-1.228cm" svg:width="14.603cm" svg:height="2.387cm" draw:z-index="12">
          <draw:object xlink:href="./Object 43" xlink:type="simple" xlink:show="embed" xlink:actuate="onLoad"/>
          <draw:image xlink:href="./ObjectReplacements/Object 43" xlink:type="simple" xlink:show="embed" xlink:actuate="onLoad"/>
        </draw:frame>
        <text:s text:c="3"/>
      </text:p>
      <text:p text:style-name="P41">
        <text:span text:style-name="T71">L’</text:span>
        <text:span text:style-name="T73">objectif est de déterminer pour une arête </text:span>
        <text:span text:style-name="T56">ar</text:span>
        <text:span text:style-name="T55">1i</text:span>
        <text:span text:style-name="T79">le domaine d’angles </text:span>
        <text:span text:style-name="T79">
          <draw:frame draw:style-name="fr4" draw:name="Objet40" text:anchor-type="as-char" svg:y="-0.3cm" svg:width="0.764cm" svg:height="0.453cm" draw:z-index="13">
            <draw:object xlink:href="./Object 40" xlink:type="simple" xlink:show="embed" xlink:actuate="onLoad"/>
            <draw:image xlink:href="./ObjectReplacements/Object 40" xlink:type="simple" xlink:show="embed" xlink:actuate="onLoad"/>
          </draw:frame>
        </text:span>
        <text:span text:style-name="T79"><text:s text:c="2"/>dans lequel il est susceptible d’avoir intersection </text:span>
        <text:span text:style-name="T80">entre l’arête considérée projetée par V</text:span>
        <text:span text:style-name="T81">1</text:span>
        <text:span text:style-name="T80">et le cône réel issu de V</text:span>
        <text:span text:style-name="T81">2</text:span>
        <text:span text:style-name="T79">.</text:span>
      </text:p>
      <text:p text:style-name="P42">
        <text:span text:style-name="T79">S</text:span>
        <text:span text:style-name="T82">oit NED</text:span>
        <text:span text:style-name="T83">2</text:span>
        <text:span text:style-name="T82">’ le référentiel local en V</text:span>
        <text:span text:style-name="T83">2</text:span>
        <text:span text:style-name="T82">image de NED</text:span>
        <text:span text:style-name="T83">2</text:span>
        <text:span text:style-name="T82">après une rotation autour du troisième axe d’un angle </text:span>
        <text:span text:style-name="T82">
          <draw:frame draw:style-name="fr4" draw:name="Objet41" text:anchor-type="as-char" svg:y="-0.22cm" svg:width="0.603cm" svg:height="0.374cm" draw:z-index="14">
            <draw:object xlink:href="./Object 41" xlink:type="simple" xlink:show="embed" xlink:actuate="onLoad"/>
            <draw:image xlink:href="./ObjectReplacements/Object 41" xlink:type="simple" xlink:show="embed" xlink:actuate="onLoad"/>
          </draw:frame>
        </text:span>
        <text:span text:style-name="T82"><text:s text:c="2"/>. </text:span>
        <text:span text:style-name="T71">L</text:span>
        <text:span text:style-name="T84">a matrice de passage de NED</text:span>
        <text:span text:style-name="T85">2’</text:span>
        <text:span text:style-name="T84">à NED</text:span>
        <text:span text:style-name="T85">1</text:span>
        <text:span text:style-name="T77">
          <draw:frame draw:style-name="fr4" draw:name="Objet44" text:anchor-type="as-char" svg:y="-0.377cm" svg:width="2.226cm" svg:height="0.568cm" draw:z-index="15">
            <draw:object xlink:href="./Object 44" xlink:type="simple" xlink:show="embed" xlink:actuate="onLoad"/>
            <draw:image xlink:href="./ObjectReplacements/Object 44" xlink:type="simple" xlink:show="embed" xlink:actuate="onLoad"/>
            <svg:desc>formule</svg:desc>
          </draw:frame>
        </text:span>
        <text:span text:style-name="T77">
          <text:s text:c="3"/>
        </text:span>
        <text:span text:style-name="T78">en espace vectoriel </text:span>
        <text:span text:style-name="T84">est :</text:span>
      </text:p>
      <text:p text:style-name="P43">
        <draw:frame draw:style-name="fr4" draw:name="Objet45" text:anchor-type="as-char" svg:y="-3.002cm" svg:width="10.084cm" svg:height="6.003cm" draw:z-index="16">
          <draw:object xlink:href="./Object 45" xlink:type="simple" xlink:show="embed" xlink:actuate="onLoad"/>
          <draw:image xlink:href="./ObjectReplacements/Object 45" xlink:type="simple" xlink:show="embed" xlink:actuate="onLoad"/>
          <svg:desc>formule</svg:desc>
        </draw:frame>
        <text:s text:c="3"/>
      </text:p>
      <text:p text:style-name="P38">
        <text:span text:style-name="T86">Les coordonnées V</text:span>
        <text:span text:style-name="T87">1</text:span>
        <text:span text:style-name="T86">dans NED</text:span>
        <text:span text:style-name="T87">2</text:span>
        <text:span text:style-name="T86">’ é</text:span>
        <text:span text:style-name="T88">tant</text:span>
        <text:span text:style-name="T86">
          <draw:frame draw:style-name="fr4" draw:name="Objet33" text:anchor-type="as-char" svg:y="-0.965cm" svg:width="4.941cm" svg:height="1.84cm" draw:z-index="17">
            <draw:object xlink:href="./Object 33" xlink:type="simple" xlink:show="embed" xlink:actuate="onLoad"/>
            <draw:image xlink:href="./ObjectReplacements/Object 33" xlink:type="simple" xlink:show="embed" xlink:actuate="onLoad"/>
            <svg:desc>formule</svg:desc>
          </draw:frame>
        </text:span>
        <text:span text:style-name="T86">
          <text:s text:c="3"/>
        </text:span>
      </text:p>
      <text:p text:style-name="P44">
        <draw:frame draw:style-name="fr4" draw:name="Objet46" text:anchor-type="as-char" svg:y="-3.166cm" svg:width="15.923cm" svg:height="6.331cm" draw:z-index="18">
          <draw:object xlink:href="./Object 46" xlink:type="simple" xlink:show="embed" xlink:actuate="onLoad"/>
          <draw:image xlink:href="./ObjectReplacements/Object 46" xlink:type="simple" xlink:show="embed" xlink:actuate="onLoad"/>
        </draw:frame>
        <text:s text:c="3"/>
      </text:p>
      <text:p text:style-name="P45">
        <text:span text:style-name="T89">Le cône de sommet V</text:span>
        <text:span text:style-name="T90">2</text:span>
        <text:span text:style-name="T89">d’angle au sommet </text:span>
        <text:span text:style-name="T89">
          <draw:frame draw:style-name="fr4" draw:name="Objet28" text:anchor-type="as-char" svg:y="-0.215cm" svg:width="1.071cm" svg:height="0.37cm" draw:z-index="62">
            <draw:object xlink:href="./Object 28" xlink:type="simple" xlink:show="embed" xlink:actuate="onLoad"/>
            <draw:image xlink:href="./ObjectReplacements/Object 28" xlink:type="simple" xlink:show="embed" xlink:actuate="onLoad"/>
          </draw:frame>
        </text:span>
        <text:span text:style-name="T89"><text:s text:c="2"/>(respectivement </text:span>
        <text:span text:style-name="T89">
          <draw:frame draw:style-name="fr4" draw:name="Objet29" text:anchor-type="as-char" svg:y="-0.215cm" svg:width="1.02cm" svg:height="0.37cm" draw:z-index="63">
            <draw:object xlink:href="./Object 29" xlink:type="simple" xlink:show="embed" xlink:actuate="onLoad"/>
            <draw:image xlink:href="./ObjectReplacements/Object 29" xlink:type="simple" xlink:show="embed" xlink:actuate="onLoad"/>
            <svg:desc>formule</svg:desc>
          </draw:frame>
        </text:span>
        <text:span text:style-name="T89"><text:s text:c="2"/>) est inscrit dans le cylindre (L</text:span>
        <text:span text:style-name="T90">2max</text:span>
        <text:span text:style-name="T89">) (respectivement le cylindre (L</text:span>
        <text:span text:style-name="T90">2min</text:span>
        <text:span text:style-name="T89">)) d’axe de révolution (V</text:span>
        <text:span text:style-name="T90">2</text:span>
        <text:span text:style-name="T89">C) avec un rayon ayant </text:span>
        <text:s text:c="2"/>
        <text:span text:style-name="T89">pour valeur </text:span>
        <text:span text:style-name="T89">
          <draw:frame draw:style-name="fr4" draw:name="Objet27" text:anchor-type="as-char" svg:y="-0.377cm" svg:width="7.299cm" svg:height="0.531cm" draw:z-index="64">
            <draw:object xlink:href="./Object 27" xlink:type="simple" xlink:show="embed" xlink:actuate="onLoad"/>
            <draw:image xlink:href="./ObjectReplacements/Object 27" xlink:type="simple" xlink:show="embed" xlink:actuate="onLoad"/>
          </draw:frame>
        </text:span>
        <text:span text:style-name="T89"><text:s text:c="2"/>et une hauteur ayant pour valeur </text:span>
        <text:span text:style-name="T89">
          <draw:frame draw:style-name="fr4" draw:name="Objet47" text:anchor-type="as-char" svg:y="-0.377cm" svg:width="7.176cm" svg:height="0.531cm" draw:z-index="65">
            <draw:object xlink:href="./Object 47" xlink:type="simple" xlink:show="embed" xlink:actuate="onLoad"/>
            <draw:image xlink:href="./ObjectReplacements/Object 47" xlink:type="simple" xlink:show="embed" xlink:actuate="onLoad"/>
            <svg:desc>formule</svg:desc>
          </draw:frame>
        </text:span>
        <text:span text:style-name="T89"><text:s text:c="2"/>.</text:span>
      </text:p>
      <text:p text:style-name="P46"><draw:frame draw:style-name="fr1" draw:name="Cadre3" text:anchor-type="paragraph" svg:width="17cm" draw:z-index="5"><draw:text-box fo:min-height="12.023cm"><text:p text:style-name="P11"><draw:frame draw:style-name="fr3" draw:name="Image4" text:anchor-type="as-char" svg:width="17cm" style:rel-width="100%" svg:height="12.023cm" style:rel-height="scale" draw:z-index="66"><draw:image xlink:href="Pictures/100112600000741E000052224B210EFF.svg" xlink:type="simple" xlink:show="embed" xlink:actuate="onLoad" draw:mime-type="image/svg+xml"/><draw:image xlink:href="Pictures/10000001000003490000025331D98389.png" xlink:type="simple" xlink:show="embed" xlink:actuate="onLoad" draw:mime-type="image/png"/></draw:frame><text:span text:style-name="T5"><text:line-break/></text:span>Figure <text:sequence text:ref-name="refFigure2" text:name="Figure" text:formula="ooow:Figure+1" style:num-format="1">3</text:sequence>: cylindres circonscrit<text:span text:style-name="T91">s</text:span> au cônes limites</text:p></draw:text-box></draw:frame><text:soft-page-break/>L’intersection d’un segment (en l’occurrence <text:span text:style-name="T54">ar</text:span><text:span text:style-name="T55">1i</text:span><text:span text:style-name="T56"> </text:span><text:span text:style-name="T76">) avec </text:span><text:span text:style-name="T92">un cône de révolution implique l’intersection de ce segment avec le cylindre circonscrit </text:span><text:span text:style-name="T93">au cône</text:span><text:span text:style-name="T92">.</text:span></text:p>
      <text:p text:style-name="P47">La recherche des points M1i appartenant à un cylindre implique :</text:p>
      <text:p text:style-name="P48">
        <draw:frame draw:style-name="fr4" draw:name="Objet34" text:anchor-type="as-char" svg:y="-0.921cm" svg:width="11.672cm" svg:height="1.81cm" draw:z-index="67">
          <draw:object xlink:href="./Object 34" xlink:type="simple" xlink:show="embed" xlink:actuate="onLoad"/>
          <draw:image xlink:href="./ObjectReplacements/Object 34" xlink:type="simple" xlink:show="embed" xlink:actuate="onLoad"/>
        </draw:frame>
        <text:s text:c="3"/>
      </text:p>
      <text:p text:style-name="P49">Soit <draw:frame draw:style-name="fr4" draw:name="Objet35" text:anchor-type="as-char" svg:y="-0.377cm" svg:width="2.75cm" svg:height="0.492cm" draw:z-index="68"><draw:object xlink:href="./Object 35" xlink:type="simple" xlink:show="embed" xlink:actuate="onLoad"/><draw:image xlink:href="./ObjectReplacements/Object 35" xlink:type="simple" xlink:show="embed" xlink:actuate="onLoad"/></draw:frame>alors la recherche des points d’intersection entre l’arête et un cylindre signifie :</text:p>
      <text:p text:style-name="P49">
        <draw:frame draw:style-name="fr4" draw:name="Objet48" text:anchor-type="as-char" svg:y="-2.568cm" svg:width="14.766cm" svg:height="5.226cm" draw:z-index="69">
          <draw:object xlink:href="./Object 48" xlink:type="simple" xlink:show="embed" xlink:actuate="onLoad"/>
          <draw:image xlink:href="./ObjectReplacements/Object 48" xlink:type="simple" xlink:show="embed" xlink:actuate="onLoad"/>
        </draw:frame>
        <text:s text:c="3"/>
        <text:span text:style-name="T94">(rel. 2)</text:span>
      </text:p>
      <text:p text:style-name="P50">
        <text:s text:c="2"/>
        <text:span text:style-name="T95">L’équation polynomiale en r permet d’identifier au plus deux racines correspondant aux intersections entre un cylindre et l’arête. L’inégalité sur r définit aussi un domaine de validité, dans </text:span>
        <text:s/>
        <text:soft-page-break/>
        <text:span text:style-name="T95">tous les cas r est un réel positif plus petit ou égal à R. De ces racines nous pouvons déduire les angles </text:span>
        <text:span text:style-name="T96">Φ</text:span>
        <text:span text:style-name="T97">2i,min</text:span>
        <text:span text:style-name="T98">et </text:span>
        <text:span text:style-name="T96">Φ</text:span>
        <text:span text:style-name="T97">2i,max</text:span>
        <text:span text:style-name="T99">(après rotation d’angle – </text:span>
        <text:span text:style-name="T100">γ</text:span>
        <text:span text:style-name="T101">2</text:span>
        <text:span text:style-name="T99">) entre lesquels il est susceptible d’avoir une intersection entre l’arête i considérée et le cône réel.</text:span>
      </text:p>
      <text:p text:style-name="P51">
        <text:span text:style-name="T99">L</text:span>
        <text:span text:style-name="T102">es travaux de Tomas Moller et de Ben Trumbore (</text:span>
        <text:span text:style-name="T103">Fast, Minimum Storage Ray/Triangle Intersection</text:span>
        <text:span text:style-name="T102">) proposent un algorithme efficient pour déterminer le point d’intersection entre un rayon (ici l’arête [V</text:span>
        <text:span text:style-name="T104">1</text:span>
        <text:span text:style-name="T102">M</text:span>
        <text:span text:style-name="T104">1i</text:span>
        <text:span text:style-name="T102">]) et un triangle (ici formé par le sommet V</text:span>
        <text:span text:style-name="T104">2</text:span>
        <text:span text:style-name="T102">et deux arêtes consécutives du cône ar</text:span>
        <text:span text:style-name="T104">2j</text:span>
        <text:span text:style-name="T102">et ar</text:span>
        <text:span text:style-name="T104">2j+1</text:span>
        <text:span text:style-name="T102">). </text:span>
        <text:span text:style-name="T105">Pour une arête ar1i, il suffit d’appliquer cet algorithme à toutes les facettes du cône irrégulier de sommet V2 pour en définir l’intersection (r minimum).</text:span>
      </text:p>
      <text:h text:style-name="Heading_20_2" text:outline-level="2"><text:bookmark-start text:name="__RefHeading___Toc1114_2196019965"/>Condition <text:span text:style-name="T106">nécessaire </text:span>d’intersection entre deux cônes<text:bookmark-end text:name="__RefHeading___Toc1114_2196019965"/></text:h>
      <text:p text:style-name="P52">La séparation (pas d’intersection) des cylindres dans lesquels sont inscrits les cônes implique la séparation des cônes.</text:p>
      <text:p text:style-name="P53">
        <text:span text:style-name="T107">Dans le plan de symétrie (U) passant par les points C, V</text:span>
        <text:span text:style-name="T108">2 </text:span>
        <text:span text:style-name="T109">e</text:span>
        <text:span text:style-name="T110">t </text:span>
        <text:span text:style-name="T111">V</text:span>
        <text:span text:style-name="T108">1</text:span>
        <text:span text:style-name="T107">, la coupe des cylindres se traduit par deux rectangles dont un des côtés est tangent au cercle formé par la Terre en V</text:span>
        <text:span text:style-name="T108">1</text:span>
        <text:span text:style-name="T107">ou V</text:span>
        <text:span text:style-name="T108">2</text:span>
        <text:span text:style-name="T107">. Ce côté (centré sur V</text:span>
        <text:span text:style-name="T108">1</text:span>
        <text:span text:style-name="T107">ou V</text:span>
        <text:span text:style-name="T108">2</text:span>
        <text:span text:style-name="T107">) a pour longueur </text:span>
        <text:span text:style-name="T107">
          <draw:frame draw:style-name="fr4" draw:name="Objet37" text:anchor-type="as-char" svg:y="-0.377cm" svg:width="2.702cm" svg:height="0.531cm" draw:z-index="70">
            <draw:object xlink:href="./Object 37" xlink:type="simple" xlink:show="embed" xlink:actuate="onLoad"/>
            <draw:image xlink:href="./ObjectReplacements/Object 37" xlink:type="simple" xlink:show="embed" xlink:actuate="onLoad"/>
            <svg:desc>formule</svg:desc>
          </draw:frame>
        </text:span>
        <text:span text:style-name="T107"><text:s text:c="2"/>.L’autre longueur caractéristique est </text:span>
        <text:span text:style-name="T107">
          <draw:frame draw:style-name="fr4" draw:name="Objet49" text:anchor-type="as-char" svg:y="-0.377cm" svg:width="2.641cm" svg:height="0.531cm" draw:z-index="71">
            <draw:object xlink:href="./Object 49" xlink:type="simple" xlink:show="embed" xlink:actuate="onLoad"/>
            <draw:image xlink:href="./ObjectReplacements/Object 49" xlink:type="simple" xlink:show="embed" xlink:actuate="onLoad"/>
            <svg:desc>formule</svg:desc>
          </draw:frame>
        </text:span>
        <text:span text:style-name="T107"><text:s text:c="2"/>.</text:span>
      </text:p>
      <text:p text:style-name="P54"><draw:frame draw:style-name="fr5" draw:name="Image5" text:anchor-type="paragraph" svg:width="17cm" svg:height="8.77cm" draw:z-index="19"><draw:image xlink:href="Pictures/10000025000006A40000036D855E4C83.gif" xlink:type="simple" xlink:show="embed" xlink:actuate="onLoad" draw:mime-type="image/gif"/></draw:frame>Soit <draw:frame draw:style-name="fr4" draw:name="Objet50" text:anchor-type="as-char" svg:y="-0.429cm" svg:width="0.526cm" svg:height="0.519cm" draw:z-index="72"><draw:object xlink:href="./Object 50" xlink:type="simple" xlink:show="embed" xlink:actuate="onLoad"/><draw:image xlink:href="./ObjectReplacements/Object 50" xlink:type="simple" xlink:show="embed" xlink:actuate="onLoad"/></draw:frame>le vecteur normé <draw:frame draw:style-name="fr4" draw:name="Objet51" text:anchor-type="as-char" svg:y="-0.736cm" svg:width="1.363cm" svg:height="1.228cm" draw:z-index="73"><draw:object xlink:href="./Object 51" xlink:type="simple" xlink:show="embed" xlink:actuate="onLoad"/><draw:image xlink:href="./ObjectReplacements/Object 51" xlink:type="simple" xlink:show="embed" xlink:actuate="onLoad"/></draw:frame>et <draw:frame draw:style-name="fr4" draw:name="Objet52" text:anchor-type="as-char" svg:y="-0.427cm" svg:width="0.489cm" svg:height="0.517cm" draw:z-index="74"><draw:object xlink:href="./Object 52" xlink:type="simple" xlink:show="embed" xlink:actuate="onLoad"/><draw:image xlink:href="./ObjectReplacements/Object 52" xlink:type="simple" xlink:show="embed" xlink:actuate="onLoad"/><svg:desc>formule</svg:desc></draw:frame>son vecteur normal direct <text:span text:style-name="T112">normé</text:span>(dans le plan (U)) alors les coordonnées des sommets du rectangle (DEGF) <text:span text:style-name="T113">exprimés dans le repère </text:span><text:span text:style-name="T113"><draw:frame draw:style-name="fr4" draw:name="Objet53" text:anchor-type="as-char" svg:y="-0.429cm" svg:width="1.834cm" svg:height="0.549cm" draw:z-index="75"><draw:object xlink:href="./Object 53" xlink:type="simple" xlink:show="embed" xlink:actuate="onLoad"/><draw:image xlink:href="./ObjectReplacements/Object 53" xlink:type="simple" xlink:show="embed" xlink:actuate="onLoad"/></draw:frame></text:span><text:span text:style-name="T113"><text:s/></text:span>sont :</text:p>
      <text:list text:style-name="L2">
        <text:list-item>
          <text:p text:style-name="P55">
            <draw:frame draw:style-name="fr4" draw:name="Objet54" text:anchor-type="as-char" svg:y="-0.605cm" svg:width="3.027cm" svg:height="1.124cm" draw:z-index="76">
              <draw:object xlink:href="./Object 54" xlink:type="simple" xlink:show="embed" xlink:actuate="onLoad"/>
              <draw:image xlink:href="./ObjectReplacements/Object 54" xlink:type="simple" xlink:show="embed" xlink:actuate="onLoad"/>
            </draw:frame>
            <text:s text:c="3"/>
          </text:p>
        </text:list-item>
        <text:list-item>
          <text:p text:style-name="P55">
            <draw:frame draw:style-name="fr4" draw:name="Objet55" text:anchor-type="as-char" svg:y="-0.605cm" svg:width="3.297cm" svg:height="1.124cm" draw:z-index="77">
              <draw:object xlink:href="./Object 55" xlink:type="simple" xlink:show="embed" xlink:actuate="onLoad"/>
              <draw:image xlink:href="./ObjectReplacements/Object 55" xlink:type="simple" xlink:show="embed" xlink:actuate="onLoad"/>
              <svg:desc>formule</svg:desc>
            </draw:frame>
            <text:s text:c="3"/>
          </text:p>
        </text:list-item>
        <text:list-item>
          <text:p text:style-name="P55">
            <text:soft-page-break/>
            <text:s text:c="3"/>
            <draw:frame draw:style-name="fr4" draw:name="Objet56" text:anchor-type="as-char" svg:y="-0.642cm" svg:width="3.561cm" svg:height="1.194cm" draw:z-index="21">
              <draw:object xlink:href="./Object 56" xlink:type="simple" xlink:show="embed" xlink:actuate="onLoad"/>
              <draw:image xlink:href="./ObjectReplacements/Object 56" xlink:type="simple" xlink:show="embed" xlink:actuate="onLoad"/>
              <svg:desc>formule</svg:desc>
            </draw:frame>
            <text:s text:c="3"/>
          </text:p>
        </text:list-item>
        <text:list-item>
          <text:p text:style-name="P55">
            <draw:frame draw:style-name="fr4" draw:name="Objet57" text:anchor-type="as-char" svg:y="-0.642cm" svg:width="3.522cm" svg:height="1.194cm" draw:z-index="22">
              <draw:object xlink:href="./Object 57" xlink:type="simple" xlink:show="embed" xlink:actuate="onLoad"/>
              <draw:image xlink:href="./ObjectReplacements/Object 57" xlink:type="simple" xlink:show="embed" xlink:actuate="onLoad"/>
              <svg:desc>formule</svg:desc>
            </draw:frame>
            <text:s text:c="3"/>
          </text:p>
        </text:list-item>
      </text:list>
      <text:p text:style-name="P56">
        <text:span text:style-name="T114">V</text:span>
        <text:span text:style-name="T115">2</text:span>
        <text:span text:style-name="T114">(respectivement ses cônes de révolution et leurs cylindres circonscrits) est l’image de V</text:span>
        <text:span text:style-name="T115">1</text:span>
        <text:span text:style-name="T114">(respectivement ses cônes de révolution et leurs cylindres circonscrits) par une rotation de centre C et d’angle </text:span>
        <text:span text:style-name="T116">θ :</text:span>
      </text:p>
      <text:list text:continue-numbering="true" text:style-name="L2">
        <text:list-item>
          <text:p text:style-name="P57">
            <draw:frame draw:style-name="fr4" draw:name="Objet59" text:anchor-type="as-char" svg:y="-0.644cm" svg:width="11.081cm" svg:height="1.196cm" draw:z-index="23">
              <draw:object xlink:href="./Object 59" xlink:type="simple" xlink:show="embed" xlink:actuate="onLoad"/>
              <draw:image xlink:href="./ObjectReplacements/Object 59" xlink:type="simple" xlink:show="embed" xlink:actuate="onLoad"/>
              <svg:desc>formule</svg:desc>
            </draw:frame>
            <text:s text:c="3"/>
          </text:p>
        </text:list-item>
        <text:list-item>
          <text:p text:style-name="P57">
            <draw:frame draw:style-name="fr4" draw:name="Objet60" text:anchor-type="as-char" svg:y="-0.644cm" svg:width="11.351cm" svg:height="1.196cm" draw:z-index="24">
              <draw:object xlink:href="./Object 60" xlink:type="simple" xlink:show="embed" xlink:actuate="onLoad"/>
              <draw:image xlink:href="./ObjectReplacements/Object 60" xlink:type="simple" xlink:show="embed" xlink:actuate="onLoad"/>
              <svg:desc>formule</svg:desc>
            </draw:frame>
            <text:s text:c="3"/>
          </text:p>
        </text:list-item>
        <text:list-item>
          <text:p text:style-name="P57">
            <draw:frame draw:style-name="fr4" draw:name="Objet61" text:anchor-type="as-char" svg:y="-0.653cm" svg:width="14.035cm" svg:height="1.217cm" draw:z-index="25">
              <draw:object xlink:href="./Object 61" xlink:type="simple" xlink:show="embed" xlink:actuate="onLoad"/>
              <draw:image xlink:href="./ObjectReplacements/Object 61" xlink:type="simple" xlink:show="embed" xlink:actuate="onLoad"/>
              <svg:desc>formule</svg:desc>
            </draw:frame>
            <text:s text:c="3"/>
          </text:p>
        </text:list-item>
        <text:list-item>
          <text:p text:style-name="P58">
            <draw:frame draw:style-name="fr4" draw:name="Objet58" text:anchor-type="as-char" svg:y="-0.653cm" svg:width="14.049cm" svg:height="1.217cm" draw:z-index="26">
              <draw:object xlink:href="./Object 58" xlink:type="simple" xlink:show="embed" xlink:actuate="onLoad"/>
              <draw:image xlink:href="./ObjectReplacements/Object 58" xlink:type="simple" xlink:show="embed" xlink:actuate="onLoad"/>
              <svg:desc>formule</svg:desc>
            </draw:frame>
            <text:s text:c="3"/>
          </text:p>
        </text:list-item>
      </text:list>
      <text:p text:style-name="Text_20_body"/>
      <text:p text:style-name="P59">Il y a nécessairement intersection entre les deux rectangles quand l’abscisse de G’ est plus grand que l’abscisse de F ou G (condition nécessaire mais pas suffisante dans le cas où l’abscisse de G’ est plus grande que l’ordonnée de F).</text:p>
      <text:p text:style-name="P60">
        <draw:frame draw:style-name="fr4" draw:name="Objet64" text:anchor-type="as-char" svg:y="-0.386cm" svg:width="8.497cm" svg:height="0.542cm" draw:z-index="27">
          <draw:object xlink:href="./Object 64" xlink:type="simple" xlink:show="embed" xlink:actuate="onLoad"/>
          <draw:image xlink:href="./ObjectReplacements/Object 64" xlink:type="simple" xlink:show="embed" xlink:actuate="onLoad"/>
        </draw:frame>
        <text:s text:c="3"/>
      </text:p>
      <text:p text:style-name="P60">
        <draw:frame draw:style-name="fr4" draw:name="Objet65" text:anchor-type="as-char" svg:y="-0.681cm" svg:width="7.562cm" svg:height="1.118cm" draw:z-index="28">
          <draw:object xlink:href="./Object 65" xlink:type="simple" xlink:show="embed" xlink:actuate="onLoad"/>
          <draw:image xlink:href="./ObjectReplacements/Object 65" xlink:type="simple" xlink:show="embed" xlink:actuate="onLoad"/>
          <svg:desc>formule</svg:desc>
        </draw:frame>
        <text:s text:c="3"/>
        <text:span text:style-name="T117">on obtient </text:span>
        <text:span text:style-name="T117">
          <draw:frame draw:style-name="fr4" draw:name="Objet66" text:anchor-type="as-char" svg:y="-0.683cm" svg:width="3.473cm" svg:height="1.124cm" draw:z-index="29">
            <draw:object xlink:href="./Object 66" xlink:type="simple" xlink:show="embed" xlink:actuate="onLoad"/>
            <draw:image xlink:href="./ObjectReplacements/Object 66" xlink:type="simple" xlink:show="embed" xlink:actuate="onLoad"/>
          </draw:frame>
        </text:span>
        <text:span text:style-name="T117">
          <text:s text:c="3"/>
        </text:span>
      </text:p>
      <text:p text:style-name="P61">Au bilan, une condition suffisante de séparation des cônes engendrés par deux villes est donc :</text:p>
      <text:p text:style-name="P62">
        <text:span text:style-name="T118">
          <draw:frame draw:style-name="fr9" draw:name="Objet67" text:anchor-type="as-char" svg:y="-0.75cm" svg:width="4.695cm" svg:height="1.258cm" draw:z-index="30">
            <draw:object xlink:href="./Object 67" xlink:type="simple" xlink:show="embed" xlink:actuate="onLoad"/>
            <draw:image xlink:href="./ObjectReplacements/Object 67" xlink:type="simple" xlink:show="embed" xlink:actuate="onLoad"/>
            <svg:desc>formule</svg:desc>
          </draw:frame>
        </text:span>
        <text:span text:style-name="T118">
          <text:s text:c="5"/>
        </text:span>
      </text:p>
      <text:p text:style-name="P62">
        <text:span text:style-name="T118">Dans le jeu de tests actuel, nous avons</text:span>
        <text:span text:style-name="T119">
          <draw:frame draw:style-name="fr4" draw:name="Objet62" text:anchor-type="as-char" svg:y="-0.377cm" svg:width="4.56cm" svg:height="0.531cm" draw:z-index="31">
            <draw:object xlink:href="./Object 62" xlink:type="simple" xlink:show="embed" xlink:actuate="onLoad"/>
            <draw:image xlink:href="./ObjectReplacements/Object 62" xlink:type="simple" xlink:show="embed" xlink:actuate="onLoad"/>
          </draw:frame>
        </text:span>
        <text:span text:style-name="T119"><text:s text:c="2"/>et donc </text:span>
        <text:span text:style-name="T119">
          <draw:frame draw:style-name="fr4" draw:name="Objet63" text:anchor-type="as-char" svg:y="-0.377cm" svg:width="3.484cm" svg:height="0.531cm" draw:z-index="32">
            <draw:object xlink:href="./Object 63" xlink:type="simple" xlink:show="embed" xlink:actuate="onLoad"/>
            <draw:image xlink:href="./ObjectReplacements/Object 63" xlink:type="simple" xlink:show="embed" xlink:actuate="onLoad"/>
          </draw:frame>
        </text:span>
        <text:span text:style-name="T119">
          <text:s text:c="3"/>
        </text:span>
      </text:p>
      <text:p text:style-name="P60"/>
      <text:p text:style-name="P63">Ce critère de séparation ne sera pas utile dans notre cas car trop ouvert (angle correspondant presque à deux villes aux antipodes) !</text:p>
      <text:h text:style-name="Heading_20_2" text:outline-level="2"><text:bookmark-start text:name="__RefHeading___Toc1116_2196019965"/>Bonus game<text:bookmark-end text:name="__RefHeading___Toc1116_2196019965"/></text:h>
      <text:p text:style-name="P64">
        <text:span text:style-name="T120">Soit </text:span>
        <text:span text:style-name="T120">
          <draw:frame draw:style-name="fr4" draw:name="Objet68" text:anchor-type="as-char" svg:y="-0.437cm" svg:width="3.011cm" svg:height="0.557cm" draw:z-index="33">
            <draw:object xlink:href="./Object 68" xlink:type="simple" xlink:show="embed" xlink:actuate="onLoad"/>
            <draw:image xlink:href="./ObjectReplacements/Object 68" xlink:type="simple" xlink:show="embed" xlink:actuate="onLoad"/>
          </draw:frame>
        </text:span>
        <text:span text:style-name="T120"><text:s text:c="2"/>les longitude et latitude d’une ville. Dans le repère absolu, les coordonnées d’une ville sont alors </text:span>
        <text:span text:style-name="T120">
          <draw:frame draw:style-name="fr4" draw:name="Objet69" text:anchor-type="as-char" svg:y="-0.887cm" svg:width="3.143cm" svg:height="1.64cm" draw:z-index="34">
            <draw:object xlink:href="./Object 69" xlink:type="simple" xlink:show="embed" xlink:actuate="onLoad"/>
            <draw:image xlink:href="./ObjectReplacements/Object 69" xlink:type="simple" xlink:show="embed" xlink:actuate="onLoad"/>
          </draw:frame>
        </text:span>
        <text:span text:style-name="T120"><text:s text:c="2"/>.</text:span>
      </text:p>
      <text:p text:style-name="P65"><text:soft-page-break/>L’équation du plan médiateur (P) entre deux villes s’exprime de la manière suivante dans le repère absolu :</text:p>
      <text:p text:style-name="P65"><draw:frame draw:style-name="fr4" draw:name="Objet70" text:anchor-type="as-char" svg:y="-0.386cm" svg:width="15.025cm" svg:height="0.542cm" draw:z-index="35"><draw:object xlink:href="./Object 70" xlink:type="simple" xlink:show="embed" xlink:actuate="onLoad"/><draw:image xlink:href="./ObjectReplacements/Object 70" xlink:type="simple" xlink:show="embed" xlink:actuate="onLoad"/><svg:desc>formule</svg:desc></draw:frame>(EQ 1 bis)</text:p>
      <text:p text:style-name="P66">L’usage de cette équation générique permet de définir une partition de l’espace de Voronoi et nous permet de s’assurer que les cônes décrits dans <text:bookmark-ref text:reference-format="page" text:ref-name="__RefHeading___Toc909_120585349">4</text:bookmark-ref><text:s/>sont conformes.</text:p>
      <text:p text:style-name="P66"/>
      <text:h text:style-name="Heading_20_1" text:outline-level="1"><text:bookmark-start text:name="__RefHeading___Toc1166_2196019965"/>Algorithme <text:bookmark-end text:name="__RefHeading___Toc1166_2196019965"/></text:h>
      <text:p text:style-name="P67">Au niveau macro, la logique de l’algorithme pour traiter le problème est la suivante :</text:p>
      <text:list text:style-name="L3">
        <text:list-item>
          <text:p text:style-name="P68">préparation géométrique initiale</text:p>
          <text:list>
            <text:list-item>
              <text:p text:style-name="P69">
                <text:span text:style-name="T121">identification des angles correspondant aux moyens de transport terrestre, en déduire les angles extrêmes (</text:span>
                <text:span text:style-name="T122">α</text:span>
                <text:span text:style-name="T123">max</text:span>
                <text:span text:style-name="T124">et </text:span>
                <text:span text:style-name="T122">α</text:span>
                <text:span text:style-name="T123">min</text:span>
                <text:span text:style-name="T124">) sur la période considérée.</text:span>
              </text:p>
            </text:list-item>
            <text:list-item>
              <text:p text:style-name="P70">
                <text:span text:style-name="T125">Déduire de </text:span>
                <text:span text:style-name="T29">α</text:span>
                <text:span text:style-name="T126">max</text:span>
                <text:span text:style-name="T125">et </text:span>
                <text:span text:style-name="T29">α</text:span>
                <text:span text:style-name="T126">min</text:span>
                <text:span text:style-name="T125">l’angle </text:span>
                <text:span text:style-name="T29">θ</text:span>
                <text:span text:style-name="T32">séparation</text:span>
                <text:span text:style-name="T125">de séparation des villes. Chaque couple de villes dont l’angle d’ouverture est plus grand que </text:span>
                <text:span text:style-name="T29">θ</text:span>
                <text:span text:style-name="T32">séparation</text:span>
                <text:span text:style-name="T125">ne sera point considéré pour la suite du traitement. </text:span>
              </text:p>
            </text:list-item>
            <text:list-item>
              <text:p text:style-name="P71">
                <text:span text:style-name="T125">Pour chaque couple de villes (V</text:span>
                <text:span text:style-name="T126">1</text:span>
                <text:span text:style-name="T125">-V</text:span>
                <text:span text:style-name="T126">2</text:span>
                <text:span text:style-name="T125">et V</text:span>
                <text:span text:style-name="T126">2</text:span>
                <text:span text:style-name="T125">-V</text:span>
                <text:span text:style-name="T126">1</text:span>
                <text:span text:style-name="T125">sont deux couples distincts), calculer les éléments géométriques suivants :</text:span>
              </text:p>
              <text:list>
                <text:list-item>
                  <text:p text:style-name="P72">angle d’ouverture</text:p>
                </text:list-item>
                <text:list-item>
                  <text:p text:style-name="P72">vecteur directeur unitaire dont l’origine est la première ville et pointant vers la seconde ville. Ce vecteur est exprimé dans le repère local de la première ville et dans le repère absolu.</text:p>
                </text:list-item>
                <text:list-item>
                  <text:p text:style-name="P72">Azimut de la seconde ville.</text:p>
                </text:list-item>
              </text:list>
            </text:list-item>
            <text:list-item>
              <text:p text:style-name="P73">Suppression des couples de villes qui n’auront jamais aucune intersection de cônes.</text:p>
            </text:list-item>
            <text:list-item>
              <text:p text:style-name="P74">
                <text:span text:style-name="T127">Pour chaque ville, identification des communes voisines les plus proches pour chaque secteur angulair</text:span>
                <text:span text:style-name="T128">e</text:span>
                <text:span text:style-name="T129">(voir algorithme 1 page 5 de Meshless Voronoi on the GPU.pdf). </text:span>
                <text:span text:style-name="T130">Par exemple la ville la plus proche pour chaque secteur angulaire de 10° ou les deux villes les plus proches pour chaque secteur angulaire de 1°. (à éprouver)</text:span>
              </text:p>
            </text:list-item>
            <text:list-item>
              <text:p text:style-name="P75">
                <text:span text:style-name="T125">P</text:span>
                <text:span text:style-name="T125">our chaque ville identification des distances maximales par rapport aux frontières du « pays ».</text:span>
              </text:p>
            </text:list-item>
          </text:list>
        </text:list-item>
        <text:list-item>
          <text:p text:style-name="P76">
            <text:span text:style-name="T129">M</text:span>
            <text:span text:style-name="T125">ise à jour pour une année définie</text:span>
          </text:p>
          <text:list>
            <text:list-item>
              <text:p text:style-name="P77">
                <text:span text:style-name="T130">Pour chaque ville, calcul de l’angle </text:span>
                <text:span text:style-name="T131">d’ouverture </text:span>
                <text:span text:style-name="T122">α</text:span>
                <text:span text:style-name="T132">i</text:span>
                <text:span text:style-name="T133">c</text:span>
                <text:span text:style-name="T134">orrespondant à</text:span>
                <text:span text:style-name="T133">chaque arête </text:span>
                <text:span text:style-name="T134">et détermination du caractère régulier du cône ( cône de révolution lorsqu’il n’y a qu’un seul type de moyen de transport terrestre pour la ville) avec son angle d’ouverture unique.</text:span>
              </text:p>
            </text:list-item>
            <text:list-item>
              <text:p text:style-name="P78">
                <text:soft-page-break/>
                <text:s text:c="3"/>
                <text:span text:style-name="T134">P</text:span>
                <text:span text:style-name="T29">our chaque ville A, déterminer deux à deux les villes proches susceptibles d’être en intersection. Puis pour chaque arête ar</text:span>
                <text:span text:style-name="T32">i</text:span>
                <text:span text:style-name="T135">de la ville A </text:span>
                <text:span text:style-name="T136">et une ville voisine concernée</text:span>
                <text:span text:style-name="T135"> :</text:span>
              </text:p>
              <text:list>
                <text:list-item>
                  <text:p text:style-name="P78">
                    <text:span text:style-name="T135">si la ville A et la ville voisine génèrent des cônes réguliers avec le même angle au sommet, alors</text:span>
                    <text:span text:style-name="T137">nous employons la relation 1 pour déterminer la longueur maximale des arêtes concernées.</text:span>
                  </text:p>
                </text:list-item>
                <text:list-item>
                  <text:p text:style-name="P79">
                    <text:span text:style-name="T137">S</text:span>
                    <text:span text:style-name="T135">i la ville A ou la ville voisine génèrent un cône irrégulier alors </text:span>
                    <text:span text:style-name="T138">à l’aide de la relation 2, nous déterminons les arêtes de la ville voisine susceptibles d’être en intersection avec l’arête de la ville A considérée puis nous utilisons les</text:span>
                    <text:span text:style-name="T102">travaux de Tomas Moller et de Ben Trumbore </text:span>
                    <text:span text:style-name="T139">pour calculer la longueur de l’arête par rapport à chaque facette de la ville voisine.</text:span>
                  </text:p>
                </text:list-item>
              </text:list>
            </text:list-item>
          </text:list>
        </text:list-item>
      </text:list>
      <text:p text:style-name="P80">
        <text:span text:style-name="T140">
          <text:s text:c="11"/>
        </text:span>
        <text:span text:style-name="T141">
          <text:s text:c="6"/>
        </text:span>
        <text:span text:style-name="T142">Traitement CPU</text:span>
      </text:p>
      <text:p text:style-name="P80">
        <text:span text:style-name="T143">
          <text:s text:c="11"/>
        </text:span>
        <text:span text:style-name="T141">
          <text:s text:c="7"/>
        </text:span>
        <text:span text:style-name="T142">Traitement GPU</text:span>
      </text:p>
      <text:h text:style-name="Heading_20_1" text:outline-level="1"><text:bookmark-start text:name="__RefHeading___Toc1455_2896945936"/>Annexe de migration - algorithme d'intersection retenu en 2026<text:bookmark-end text:name="__RefHeading___Toc1455_2896945936"/></text:h>
      <text:p text:style-name="P12">Cette annexe complète le raisonnement historique sans le remplacer. Elle formalise les décisions prises pendant la migration vers un pipeline de calcul indépendant du moteur de rendu, disposant d'une référence CPU puis de profils WebGL2 et WebGPU. Le rendu final pourra employer Babylon.js, mais aucune intersection ne doit dépendre de Babylon.js.</text:p>
      <text:h text:style-name="Heading_20_2" text:outline-level="2"><text:bookmark-start text:name="__RefHeading___Toc1457_2896945936"/>Objectif numérique précis<text:bookmark-end text:name="__RefHeading___Toc1457_2896945936"/></text:h>
      <text:p text:style-name="P12">Pour chaque couple dense (ville A, échantillon d'azimut), le calcul considère la demi-droite portée par le rayon brut du cône A. Il recherche la première distance positive t, exprimée en mètres, avant l'extrémité brute du rayon. Seuls les cônes des villes présentes dans overlapCandidates sont considérés. La réduction cône contre cône s'écrit coneIntersectionT = min(rawT, intersections avec les cônes voisins). Lorsque l'utilisateur active les limites pays, la réduction finale devient finalT = min(coneIntersectionT, countryBoundaryT). Sans clipping pays, finalT est égal à coneIntersectionT.</text:p>
      <text:p text:style-name="P12">Le besoin n'est donc pas de calculer ou paramétrer toute la courbe d'intersection entre deux surfaces. Il consiste à trouver, indépendamment pour chaque rayon échantillonné, le premier point qui limite ce rayon.</text:p>
      <text:h text:style-name="Heading_20_2" text:outline-level="2"><text:bookmark-start text:name="__RefHeading___Toc1459_2896945936"/>Décisions qui complètent ou corrigent l'algorithme historique<text:bookmark-end text:name="__RefHeading___Toc1459_2896945936"/></text:h>
      <text:list text:style-name="L4">
        <text:list-item>
          <text:p text:style-name="P81">Le voisinage statique overlapCandidates, construit à partir des villes proches distribuées par secteurs angulaires, reste le périmètre métier de la recherche.</text:p>
        </text:list-item>
        <text:list-item>
          <text:p text:style-name="P81">La condition de séparation par sphères ou cylindres englobants n'est pas retenue comme filtre principal. Comme indiqué dans le document historique, elle est trop ouverte à l'échelle terrestre et élimine peu de couples.</text:p>
        </text:list-item>
        <text:list-item>
          <text:p text:style-name="P81">L'algorithme cible ne distingue pas les cônes réguliers et irréguliers. Tous les cônes sont représentés uniformément par un éventail circulaire de triangles formés du sommet de la ville et de deux rayons consécutifs.</text:p>
        </text:list-item>
        <text:list-item>
          <text:p text:style-name="P81"><text:soft-page-break/>La longueur maximale de chaque cône est connue avant les intersections. Une longueur globale existe historiquement ; la migration doit aussi permettre une longueur locale explicite par ville.</text:p>
        </text:list-item>
        <text:list-item>
          <text:p text:style-name="P81">La réduction par les limites de pays intervient après la réduction cône contre cône. Les deux réductions restent conceptuellement séparées pour les tests CPU, mais pourront être fusionnées dans une même passe WebGPU.</text:p>
        </text:list-item>
      </text:list>
      <text:h text:style-name="Heading_20_2" text:outline-level="2"><text:bookmark-start text:name="__RefHeading___Toc1461_2896945936"/>Référence CPU exhaustive<text:bookmark-end text:name="__RefHeading___Toc1461_2896945936"/></text:h>
      <text:p text:style-name="P12">Une référence CPU exhaustive est nécessaire avant toute optimisation. Pour chaque rayon de A, elle teste toutes les faces de tous les voisins statiques retenus. Elle n'utilise volontairement ni filtre angulaire, ni parcours droite/gauche, ni hiérarchie de volumes englobants. Son résultat constitue l'oracle auquel toutes les stratégies accélérées doivent être comparées.</text:p>
      <text:p text:style-name="P12">La primitive actuellement retenue est l'intersection rayon-triangle de Möller-Trumbore en double face. La direction du rayon est normalisée, donc la valeur t retournée est directement une distance en mètres. La tolérance algébrique employée pour détecter un triangle parallèle ou dégénéré est distincte de la distance minimale admise devant l'origine du rayon.</text:p>
      <text:p text:style-name="P12">Pour chaque rayon, l'oracle produit la distance minimale, la position ECEF ciselée, l'index de la ville voisine gagnante, l'index de sa face gagnante et le nombre de faces testées. Les index et compteurs sont des sorties de test et de diagnostic ; seule la position ciselée est indispensable au rendu.</text:p>
      <text:h text:style-name="Heading_20_2" text:outline-level="2"><text:bookmark-start text:name="__RefHeading___Toc1463_2896945936"/>Rayon symétrique et ordre de parcours<text:bookmark-end text:name="__RefHeading___Toc1463_2896945936"/></text:h>
      <text:p text:style-name="P12">Pour un rayon d'azimut phiA porté par A, gammaAB désigne l'azimut de B depuis A et gammaBA l'azimut de A depuis B. On définit delta = wrapSigned(phiA - gammaAB), puis phiB0 = wrapPositive(gammaBA - delta). phiB0 est le rayon de B symétrique du rayon A par rapport au plan médian associé aux villes A et B.</text:p>
      <text:p text:style-name="P12">La zone ayant la probabilité la plus forte de contenir la première intersection est l'intervalle angulaire court allant de phiB0 vers gammaBA. L'ordre de parcours proposé commence donc près de phiB0, progresse vers gammaBA, continue éventuellement au-delà, puis explore le côté opposé. Cet ordre sert uniquement à trouver rapidement une petite valeur bestT ; il ne constitue pas un critère d'arrêt.</text:p>
      <text:p text:style-name="P12">
        <text:soft-page-break/>
        <text:s/>
        <draw:frame draw:style-name="fr3" draw:name="MigrationSchemaRayonSymetrique" text:anchor-type="as-char" svg:width="17cm" style:rel-width="100%" svg:height="10.98cm" style:rel-height="scale" draw:z-index="78">
          <draw:image xlink:href="Pictures/10000B2B000063520000402FAC16A269.svg" xlink:type="simple" xlink:show="embed" xlink:actuate="onLoad" draw:mime-type="image/svg+xml"/>
          <draw:image xlink:href="Pictures/10000001000003700000023814ADF29B.png" xlink:type="simple" xlink:show="embed" xlink:actuate="onLoad" draw:mime-type="image/png"/>
          <svg:title>Rayon symétrique et zone de recherche prioritaire</svg:title>
          <svg:desc>Le parcours commence près de phiB0 et progresse vers gammaBA. Le côté opposé ne peut être éliminé que par une borne géométrique garantie.</svg:desc>
        </draw:frame>
        <text:s text:c="3"/>
      </text:p>
      <text:p text:style-name="P12">Figure de synthèse : le rayon symétrique définit l'ordre probable de recherche, tandis que la condition blockEntryT supérieure ou égale à bestT reste le seul critère d'élimination garanti.</text:p>
      <text:h text:style-name="Heading_20_2" text:outline-level="2"><text:bookmark-start text:name="__RefHeading___Toc1465_2896945936"/>Prise en compte de l'angle alpha et de son atténuation<text:bookmark-end text:name="__RefHeading___Toc1465_2896945936"/></text:h>
      <text:p text:style-name="P12">Au moment de rechercher les intersections, chaque rayon du cône B possède déjà un azimut, une longueur et un angle alpha. Pour les cônes complexes, alpha est déterminé à partir des liaisons terrestres actives et d'une loi d'atténuation autour de leurs azimuts. Le domaine circulaire de B peut donc être découpé en intervalles sur lesquels alpha varie de manière monotone.</text:p>
      <text:p text:style-name="P12">Les bornes de ces intervalles sont notamment les azimuts des liaisons actives, les limites des zones d'atténuation, les changements d'influences sélectionnées, phiB0, gammaBA et le passage circulaire zéro/deux pi. Chaque intervalle peut porter ses bornes d'azimut, ses valeurs alpha minimale et maximale, le sens de variation d'alpha et la plage de faces correspondante.</text:p>
      <text:p text:style-name="P12">Le signe de la variation d'alpha améliore l'ordre de parcours et permet de resserrer des enveloppes géométriques. Il ne suffit cependant pas à prouver le sens de variation de t. La distance t dépend également de l'écart au rayon symétrique, des repères NED relatifs, de la courbure terrestre, de l'orientation des faces et de la longueur finie des cônes. Un alpha monotone peut donc coexister avec plusieurs minima locaux de t.</text:p>
      <text:p text:style-name="P12">
        <text:soft-page-break/>
        <text:s/>
        <draw:frame draw:style-name="fr3" draw:name="MigrationSchemaAlphaEtDistance" text:anchor-type="as-char" svg:width="17cm" style:rel-width="100%" svg:height="10.98cm" style:rel-height="scale" draw:z-index="79">
          <draw:image xlink:href="Pictures/1000090E000063520000402F72119772.svg" xlink:type="simple" xlink:show="embed" xlink:actuate="onLoad" draw:mime-type="image/svg+xml"/>
          <draw:image xlink:href="Pictures/10000001000003700000023885021CEA.png" xlink:type="simple" xlink:show="embed" xlink:actuate="onLoad" draw:mime-type="image/png"/>
          <svg:title>Alpha monotone et distance d'intersection non monotone</svg:title>
          <svg:desc>Un intervalle monotone d'alpha peut contenir plusieurs minima de la distance t à cause de la géométrie relative des cônes.</svg:desc>
        </draw:frame>
        <text:s text:c="3"/>
      </text:p>
      <text:p text:style-name="P12">Figure de synthèse : la variation connue d'alpha aide à ordonner la recherche, mais ne permet pas seule de conclure sur la variation de la distance t.</text:p>
      <text:h text:style-name="Heading_20_2" text:outline-level="2"><text:bookmark-start text:name="__RefHeading___Toc1580_4094019039"/>Cas limites des supports rapides dans le repère local de B<text:bookmark-end text:name="__RefHeading___Toc1580_4094019039"/></text:h>
      <text:p text:style-name="P12">Road est le moyen de transport terrestre de référence le plus lent. Les autres moyens proposés sont plus rapides. En conséquence, alpha est égal à roadAlpha dans la majorité des directions et devient strictement plus petit que roadAlpha uniquement dans les supports rapides et leurs zones d'atténuation.</text:p>
      <text:p text:style-name="P12">Pour une longueur de rayon fixe, la projection horizontale vaut coneLengthMeters multiplié par cos(alpha). Quand alpha diminue, cette portée horizontale augmente. Une zone rapide de B peut donc avancer localement le bord du cône en vue de dessus et produire une intersection plus proche avec le rayon considéré de A.</text:p>
      <text:p text:style-name="P12">Quatre cas doivent être distingués autour du rayon symétrique phiB0 : aucun support rapide proche ; un support rapide du côté du couloir allant vers gammaBA ; un support rapide du côté opposé mais proche ; des supports rapides des deux côtés. Dans les cas unilatéraux, le support concerné doit être priorisé. Dans le cas bilatéral, aucun sens gauche ou droite unique n'est fiable.</text:p>
      <text:p text:style-name="P12">
        <text:soft-page-break/>
        <text:s/>
        <draw:frame draw:style-name="fr3" draw:name="MigrationSchemaCasLimitesAlphaB" text:anchor-type="as-char" svg:width="17cm" style:rel-width="100%" svg:height="12.749cm" style:rel-height="scale" draw:z-index="81">
          <draw:image xlink:href="Pictures/100013FE00007C2000005D1F7A9B6E1F.svg" xlink:type="simple" xlink:show="embed" xlink:actuate="onLoad" draw:mime-type="image/svg+xml"/>
          <draw:image xlink:href="Pictures/100000010000033000000264DDBA3F29.png" xlink:type="simple" xlink:show="embed" xlink:actuate="onLoad" draw:mime-type="image/png"/>
          <svg:title>Cas limites des supports rapides autour de phiB0 dans le repère local de B</svg:title>
          <svg:desc>Quatre vues de dessus distinguent les supports rapides absents, situés du côté du couloir, du côté opposé ou des deux côtés.</svg:desc>
        </draw:frame>
        <text:s/>
      </text:p>
      <text:p text:style-name="P12">Figure de synthèse : les longues plages Road forment le cas majoritaire régulier. Les supports rapides rares modifient l'ordre prioritaire autour de phiB0, mais une zone éloignée ne peut être rejetée sans borne géométrique.</text:p>
      <text:h text:style-name="Heading_20_2" text:outline-level="2"><text:bookmark-start text:name="__RefHeading___Toc1582_4094019039"/>Fourchette prioritaire candidate<text:bookmark-end text:name="__RefHeading___Toc1582_4094019039"/></text:h>
      <text:p text:style-name="P12">La fourchette initiale candidate est l'union de l'intervalle court phiB0 vers gammaBA, des faces contenant ses bornes, des supports rapides qui chevauchent cet intervalle et des supports rapides qui croisent un voisinage bilatéral de phiB0.</text:p>
      <text:p text:style-name="P12">Le voisinage de phiB0 est un paramètre de caractérisation exprimé en radians ou en nombre de faces. Il doit être évalué par benchmark et ne constitue pas encore une constante métier. Les longues plages Road et les supports rapides éloignés peuvent être regroupés en blocs. Un bloc n'est éliminé que si sa borne conservatrice blockEntryT est supérieure ou égale au meilleur t déjà trouvé.</text:p>
      <text:p text:style-name="P12">
        <text:soft-page-break/>
        <text:s/>
        <draw:frame draw:style-name="fr3" draw:name="MigrationSchemaFourchetteAlpha" text:anchor-type="as-char" svg:width="17cm" style:rel-width="100%" svg:height="9.633cm" style:rel-height="scale" draw:z-index="82">
          <draw:image xlink:href="Pictures/10000F0800007C200000466207AE83C1.svg" xlink:type="simple" xlink:show="embed" xlink:actuate="onLoad" draw:mime-type="image/svg+xml"/>
          <draw:image xlink:href="Pictures/10000001000003AB00000214D99BC6C8.png" xlink:type="simple" xlink:show="embed" xlink:actuate="onLoad" draw:mime-type="image/png"/>
          <svg:title>Construction de la fourchette prioritaire consciente d'alpha</svg:title>
          <svg:desc>Le couloir symétrique est enrichi par les supports rapides proches. Les blocs restants sont ordonnés et rejetés uniquement par borne conservatrice.</svg:desc>
        </draw:frame>
        <text:s/>
      </text:p>
      <text:p text:style-name="P12">Figure de synthèse : la fourchette réduit le rang probable de découverte du minimum. Elle ne réduit sûrement le nombre de faces testées qu'en combinaison avec des blocs disposant d'une borne géométrique conservatrice.</text:p>
      <text:h text:style-name="Heading_20_2" text:outline-level="2"><text:bookmark-start text:name="__RefHeading___Toc1467_2896945936"/>Critère d'arrêt garanti et BVH circulaire<text:bookmark-end text:name="__RefHeading___Toc1467_2896945936"/></text:h>
      <text:p text:style-name="P12">Une augmentation locale des dernières distances d'intersection n'autorise pas l'arrêt : une déformation plus éloignée peut encore produire une intersection plus courte. Le critère d'arrêt garanti repose sur une borne géométrique conservatrice.</text:p>
      <text:p text:style-name="P12">Les faces consécutives du cône B sont regroupées dans une hiérarchie circulaire de volumes englobants. Une intersection entre le rayon A et le volume d'un bloc fournit blockEntryT, borne inférieure de toute intersection avec les faces de ce bloc. Le bloc peut être rejeté sans risque lorsque blockEntryT est supérieur ou égal à bestT.</text:p>
      <text:p text:style-name="P12">La variante privilégiée aligne les feuilles et blocs de cette BVH circulaire sur les intervalles monotones d'alpha et les limites d'atténuation. Les bornes conjointes d'azimut et d'alpha devraient produire des volumes plus serrés qu'un découpage arbitraire en groupes de faces. Ce gain doit néanmoins être comparé au coût de construction et aux divergences de parcours GPU.</text:p>
      <text:p text:style-name="P12">
        <text:soft-page-break/>
        <text:s/>
        <draw:frame draw:style-name="fr3" draw:name="MigrationSchemaBvhCirculaire" text:anchor-type="as-char" svg:width="17cm" style:rel-width="100%" svg:height="11.509cm" style:rel-height="scale" draw:z-index="80">
          <draw:image xlink:href="Pictures/10000A6A00006352000043489EBD199B.svg" xlink:type="simple" xlink:show="embed" xlink:actuate="onLoad" draw:mime-type="image/svg+xml"/>
          <draw:image xlink:href="Pictures/100000010000035B00000246F386CC8B.png" xlink:type="simple" xlink:show="embed" xlink:actuate="onLoad" draw:mime-type="image/png"/>
          <svg:title>BVH circulaire alignée sur les intervalles monotones d'alpha</svg:title>
          <svg:desc>Les blocs les plus probables sont visités en premier. Un bloc est rejeté uniquement lorsque sa borne d'entrée ne peut plus améliorer bestT.</svg:desc>
        </draw:frame>
        <text:s text:c="3"/>
      </text:p>
      <text:p text:style-name="P12">Figure de synthèse : l'ordre de visite reste heuristique, mais le rejet d'un bloc repose sur une borne conservatrice et conserve donc la conformité avec l'oracle exhaustif.</text:p>
      <text:h text:style-name="Heading_20_2" text:outline-level="2"><text:bookmark-start text:name="__RefHeading___Toc1469_2896945936"/>Loi d'atténuation à évaluer<text:bookmark-end text:name="__RefHeading___Toc1469_2896945936"/></text:h>
      <text:p text:style-name="P12">La loi historique interpole directement alpha à l'aide de smoothstep. Elle est continue et monotone entre deux influences inchangées, mais elle n'est pas nécessairement la meilleure interprétation scientifique ou géométrique. Trois variantes doivent être comparées avant toute modification du modèle de production : interpolation directe de alpha ; interpolation de cos(alpha), liée au rapport vitesse ambiante sur vitesse maximale ; interpolation de tan(alpha), liée à la pente géométrique de la surface.</text:p>
      <text:p text:style-name="P12">La comparaison doit mesurer la continuité, la forme des cônes, la variation réelle de t, le nombre de minima locaux, le nombre de faces visitées et le coût CPU/GPU. La loi historique reste la référence tant qu'une variante n'a pas été explicitement validée.</text:p>
      <text:h text:style-name="Heading_20_2" text:outline-level="2"><text:bookmark-start text:name="__RefHeading___Toc1471_2896945936"/>Profils de calcul et organisation WebGPU<text:bookmark-end text:name="__RefHeading___Toc1471_2896945936"/></text:h>
      <text:p text:style-name="P12">Le profil CPU exprime les fonctions de référence testables. Le profil WebGL2 constitue le premier fallback graphique. Le profil WebGPU est la cible pour les calculs intensifs. L'ordre de repli est WebGPU, puis WebGL2, puis CPU.</text:p>
      <text:p text:style-name="P12">Pour WebGPU, une invocation correspond à un couple dense (ville, échantillon d'azimut). Les grands tableaux typés constituent la source de vérité : matrices NED vers ECEF des villes, bords <text:soft-page-break/>bruts, voisinages, longueurs, intervalles d'alpha et sorties ciselées. Les objets applicatifs ne doivent être que des vues ou getters sur ces tableaux.</text:p>
      <text:h text:style-name="Heading_20_2" text:outline-level="2">Cache mémoire des distances après intersection cône contre cône</text:h>
      <text:p text:style-name="P12">La génération des ciseled cones étant une phase dynamique coûteuse, les distances coneIntersectionT sont mises en cache par année pour être réutilisées lors d'un retour vers une année déjà calculée. Le cache appartient uniquement à l'instance courante de l'application. Une nouvelle instance commence avec un cache vide et le chargement d'un nouveau dataset vide intégralement le cache existant.</text:p>
      <text:p text:style-name="P12">La résolution angulaire est un invariant applicatif fixé à un degré, soit exactement 360 rayons par ville. L'utilisateur ne peut pas la modifier. La clé du cache est donc uniquement l'année dans le dataset courant. Le contrat minimal est une Map associant une année à un Float32Array.</text:p>
      <text:p text:style-name="P12">Chaque Float32Array contient uniquement coneIntersectionDistanceMeters indexé par ville puis azimut. Il ne contient pas les positions ECEF ciselées, qui peuvent être reconstruites à partir du sommet de la ville, de la direction du rayon brut et de t. Il ne contient surtout pas finalT après clipping pays, car l'utilisateur peut activer ou désactiver les limites pays à tout moment sans devoir recalculer les intersections entre cônes.</text:p>
      <text:p text:style-name="P12">Pour 5000 villes et 360 rayons, une année représente 7 200 000 octets ou environ 6,87 Mio. Cette taille est raisonnable pour quelques années consultées. Le premier contrat conserve les années consultées dans une Map sans persistance ni compression. Une politique LRU ne sera ajoutée que si les mesures de sessions réelles démontrent la nécessité d'un budget mémoire explicite.</text:p>
      <text:p text:style-name="P12">Les benchmarks de filtration doivent contourner le cache afin de comparer exhaustivement les algorithmes. Des mesures séparées doivent évaluer le temps d'un cache hit, le temps de reconstruction ECEF, le taux de hit lors des changements d'année et la mémoire consommée selon le nombre d'années consultées.</text:p>
      <text:h text:style-name="Heading_20_2" text:outline-level="2"><text:bookmark-start text:name="__RefHeading___Toc1473_2896945936"/>Stratégies et benchmarks obligatoires<text:bookmark-end text:name="__RefHeading___Toc1473_2896945936"/></text:h>
      <text:p text:style-name="P12">Les stratégies à comparer sont : l'oracle exhaustif limité aux voisins statiques ; l'ordre par rayon symétrique sans élimination ; l'heuristique droite/gauche à seule fin de caractérisation ; le filtre par intervalle d'azimuts possible ; une BVH circulaire à blocs fixes ; une BVH circulaire consciente d'alpha.</text:p>
      <text:p text:style-name="P12">Chaque rapport doit mesurer la durée totale et par phase, la moyenne et le percentile 95 des faces et blocs visités, les taux de rejet, la position de la face gagnante dans l'ordre de parcours, la proportion des minima situés entre phiB0 et gammaBA, les changements de signe de la suite des t, les intersections manquées et l'écart par rapport à l'oracle.</text:p>
      <text:p text:style-name="P12">Une stratégie de production doit manquer exactement zéro intersection sur les jeux de conformité. Toute règle d'arrêt empirique reste exclue tant qu'elle n'est pas remplacée par une borne conservatrice démontrée ou validée contre l'oracle.</text:p>
      <text:h text:style-name="Heading_20_2" text:outline-level="2"><text:bookmark-start text:name="__RefHeading___Toc1475_2896945936"/>État d'implémentation au 7 juin 2026<text:bookmark-end text:name="__RefHeading___Toc1475_2896945936"/></text:h>
      <text:p text:style-name="P12">La migration dispose déjà des cônes bruts CPU, des voisins statiques, des matrices NED vers ECEF, de la primitive Möller-Trumbore double face, de l'oracle exhaustif CPU et de son benchmark. Le parcours exhaustif ordonné par rayon symétrique est également implémenté et mesure le rang auquel la face finalement gagnante est découverte, sans éliminer aucune face. La filtration alpha-aware, la fourchette prioritaire et le cache mémoire par année sont définis conceptuellement et documentés. La prochaine étape consiste à implémenter la filtration dans le profil CPU puis à la comparer exhaustivement avec l'oracle avant de construire la BVH et les profils GPU.</text:p>
      <text:p text:style-name="P12">Les spécifications détaillées, cas d'étude illustrés et contrats de buffers sont maintenus dans docs/cone-intersection-architecture.md, docs/cone-intersection-alpha-aware-case-studies.md, docs/precompute-dataflow-cpu-gpu.md et docs/migration-test-strategy.m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84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standard" style:family="graphic">
      <style:graphic-properties fo:background-color="#729fcf" style:background-transparency="0%" draw:fill="solid" draw:fill-color="#729fcf" draw:opacity="100%" fo:padding-left="0.25cm" fo:padding-right="0.25cm" fo:padding-top="0.125cm" fo:padding-bottom="0.125cm" fo:border="none"/>
    </style:style>
    <style:style style:name="objectwitharrow" style:family="graphic" style:parent-style-name="standard"/>
    <style:style style:name="objectwithshadow" style:family="graphic" style:parent-style-name="standard"/>
    <style:style style:name="objectwithoutfill" style:family="graphic" style:parent-style-name="standard">
      <style:graphic-properties fo:background-color="transparent" draw:fill="none" draw:fill-color="#729fcf"/>
    </style:style>
    <style:style style:name="text" style:family="graphic" style:parent-style-name="standard">
      <style:graphic-properties fo:background-color="transparent" draw:fill="none" draw:fill-color="#729fcf"/>
    </style:style>
    <style:style style:name="textbody" style:family="graphic" style:parent-style-name="standard">
      <style:graphic-properties fo:background-color="transparent" draw:fill="none" draw:fill-color="#729fcf"/>
    </style:style>
    <style:style style:name="textbodyjustfied" style:family="graphic" style:parent-style-name="standard">
      <style:graphic-properties fo:background-color="transparent" draw:fill="none" draw:fill-color="#729fcf"/>
    </style:style>
    <style:style style:name="textbodyindent" style:family="graphic" style:parent-style-name="standard">
      <style:graphic-properties fo:background-color="transparent" draw:fill="none" draw:fill-color="#729fcf"/>
    </style:style>
    <style:style style:name="title" style:family="graphic" style:parent-style-name="standard">
      <style:graphic-properties fo:background-color="transparent" draw:fill="none" draw:fill-color="#729fcf"/>
    </style:style>
    <style:style style:name="title1" style:family="graphic" style:parent-style-name="standard">
      <style:graphic-properties fo:background-color="#008080" style:background-transparency="0%" draw:fill="solid" draw:fill-color="#008080" draw:opacity="100%"/>
    </style:style>
    <style:style style:name="title2" style:family="graphic" style:parent-style-name="standard">
      <style:graphic-properties draw:fill-color="#ffcc99"/>
    </style:style>
    <style:style style:name="headline" style:family="graphic" style:parent-style-name="standard">
      <style:graphic-properties fo:background-color="transparent" draw:fill="none" draw:fill-color="#729fcf"/>
    </style:style>
    <style:style style:name="headline1" style:family="graphic" style:parent-style-name="standard">
      <style:graphic-properties fo:background-color="transparent" draw:fill="none" draw:fill-color="#729fcf"/>
    </style:style>
    <style:style style:name="headline2" style:family="graphic" style:parent-style-name="standard">
      <style:graphic-properties fo:background-color="transparent" draw:fill="none" draw:fill-color="#729fcf"/>
    </style:style>
    <style:style style:name="measure" style:family="graphic" style:parent-style-name="standard">
      <style:graphic-properties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8cm" fo:page-height="21.001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cus" style:page-layout-name="Mpm2" draw:style-name="Mdp1"/>
    <style:master-page style:name="Focus1" style:page-layout-name="Mpm2" draw:style-name="Mdp1"/>
    <style:master-page style:name="Focus2" style:page-layout-name="Mpm2" draw:style-name="Mdp1"/>
    <style:master-page style:name="Focus3"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26T20:05:46.251540075</meta:creation-date>
    <meta:generator>LibreOffice/25.8.7.3$Linux_X86_64 LibreOffice_project/580$Build-3</meta:generator>
    <dc:date>2026-06-07T14:40:26.159282448</dc:date>
    <meta:editing-duration>P3DT10H21M39S</meta:editing-duration>
    <meta:editing-cycles>263</meta:editing-cycles>
    <meta:document-statistic meta:table-count="0" meta:image-count="10" meta:object-count="70" meta:page-count="19" meta:paragraph-count="185" meta:word-count="4210" meta:character-count="25699" meta:non-whitespace-character-count="21386"/>
  </office:meta>
</office:document-meta>
</file>

<file path=Object 1/content.xml><?xml version="1.0" encoding="utf-8"?>
<math xmlns="http://www.w3.org/1998/Math/MathML" display="block">
  <semantics>
    <mrow>
      <msub>
        <mi>α</mi>
        <mi mathvariant="italic">min</mi>
      </msub>
      <mi mathvariant="italic">et</mi>
      <msub>
        <mi>α</mi>
        <mi mathvariant="italic">max</mi>
      </msub>
    </mrow>
    <annotation encoding="StarMath 5.0">%alpha_min et %alpha_max</annotation>
  </semantics>
</math>
</file>

<file path=Object 10/content.xml><?xml version="1.0" encoding="utf-8"?>
<math xmlns="http://www.w3.org/1998/Math/MathML" display="block">
  <semantics>
    <mrow>
      <mi>M</mi>
      <mmultiscripts>
        <mrow>
          <mo fence="true" stretchy="true">(</mo>
          <mrow>
            <mtable>
              <mtr>
                <mtd>
                  <mi>x</mi>
                </mtd>
              </mtr>
              <mtr>
                <mtd>
                  <mi>y</mi>
                </mtd>
              </mtr>
              <mtr>
                <mtd>
                  <mi>z</mi>
                </mtd>
              </mtr>
            </mtable>
          </mrow>
          <mo fence="true" stretchy="true">)</mo>
        </mrow>
        <mprescripts/>
        <msub>
          <mi mathvariant="italic">NED</mi>
          <mn>1</mn>
        </msub>
        <none/>
      </mmultiscripts>
      <mrow>
        <mtext> </mtext>
        <mo stretchy="false">∈</mo>
        <mtext> </mtext>
      </mrow>
      <mrow>
        <mo fence="true" stretchy="false">(</mo>
        <mrow>
          <mi>P</mi>
        </mrow>
        <mo fence="true" stretchy="false">)</mo>
      </mrow>
      <mi mathvariant="italic">et</mi>
      <mi>R</mi>
      <mtext>le rayon de la Terre</mtext>
    </mrow>
    <annotation encoding="StarMath 5.0">M left ( stack{x# y # z}  right )  lsub{NED_1} " " in " " ( P ) et R "le rayon de la Terre"</annotation>
  </semantics>
</math>
</file>

<file path=Object 11/content.xml><?xml version="1.0" encoding="utf-8"?>
<math xmlns="http://www.w3.org/1998/Math/MathML" display="block">
  <semantics>
    <mrow>
      <mrow>
        <mover accent="true">
          <mi mathvariant="italic">CM</mi>
          <mo stretchy="true">⃗</mo>
        </mover>
        <mo stretchy="false">⊥</mo>
        <mover accent="true">
          <mi>n</mi>
          <mo stretchy="true">⃗</mo>
        </mover>
      </mrow>
      <mtext> et </mtext>
      <mrow>
        <mi>C</mi>
        <mo stretchy="false">=</mo>
        <mmultiscripts>
          <mrow>
            <mo fence="true" stretchy="true">(</mo>
            <mrow>
              <mtable>
                <mtr>
                  <mtd>
                    <mn>0</mn>
                  </mtd>
                </mtr>
                <mtr>
                  <mtd>
                    <mn>0</mn>
                  </mtd>
                </mtr>
                <mtr>
                  <mtd>
                    <mi>R</mi>
                  </mtd>
                </mtr>
              </mtable>
            </mrow>
            <mo fence="true" stretchy="true">)</mo>
          </mrow>
          <mprescripts/>
          <msub>
            <mi mathvariant="italic">NED</mi>
            <mn>1</mn>
          </msub>
          <none/>
        </mmultiscripts>
      </mrow>
    </mrow>
    <annotation encoding="StarMath 5.0">widevec {CM}  ortho   widevec {n} " et " C = left ( stack{0 # 0 # R}  right )  lsub{NED_1} </annotation>
  </semantics>
</math>
</file>

<file path=Object 12/content.xml><?xml version="1.0" encoding="utf-8"?>
<math xmlns="http://www.w3.org/1998/Math/MathML" display="block">
  <semantics>
    <mrow>
      <mi>cos</mi>
      <mi>γ</mi>
      <mn>.</mn>
      <mi>cos</mi>
      <mfrac>
        <mi>θ</mi>
        <mn>2</mn>
      </mfrac>
      <mn>.</mn>
      <mrow>
        <mi>x</mi>
        <mo stretchy="false">+</mo>
        <mi>sin</mi>
      </mrow>
      <mi>γ</mi>
      <mn>.</mn>
      <mi>cos</mi>
      <mfrac>
        <mi>θ</mi>
        <mn>2</mn>
      </mfrac>
      <mn>.</mn>
      <mrow>
        <mi>y</mi>
        <mo stretchy="false">+</mo>
        <mi>sin</mi>
      </mrow>
      <mfrac>
        <mi>θ</mi>
        <mn>2</mn>
      </mfrac>
      <mn>.</mn>
      <mrow>
        <mrow>
          <mo fence="true" stretchy="false">(</mo>
          <mrow>
            <mrow>
              <mi>z</mi>
              <mo stretchy="false">−</mo>
              <mi>R</mi>
            </mrow>
          </mrow>
          <mo fence="true" stretchy="false">)</mo>
        </mrow>
        <mo stretchy="false">=</mo>
        <mn>0</mn>
      </mrow>
    </mrow>
    <annotation encoding="StarMath 5.0">cos%gamma .cos{%theta}over{2} .x + sin%gamma .cos{%theta}over{2} .y+ sin{%theta}over{2} .( z-R )=0</annotation>
  </semantics>
</math>
</file>

<file path=Object 13/content.xml><?xml version="1.0" encoding="utf-8"?>
<math xmlns="http://www.w3.org/1998/Math/MathML" display="block">
  <semantics>
    <mrow>
      <mi>A</mi>
      <mmultiscripts>
        <mrow>
          <mo fence="true" stretchy="true">(</mo>
          <mrow>
            <mtable>
              <mtr>
                <mtd>
                  <msub>
                    <mi>x</mi>
                    <mi>A</mi>
                  </msub>
                </mtd>
              </mtr>
              <mtr>
                <mtd>
                  <msub>
                    <mi>y</mi>
                    <mi>A</mi>
                  </msub>
                </mtd>
              </mtr>
              <mtr>
                <mtd>
                  <msub>
                    <mi>z</mi>
                    <mi>A</mi>
                  </msub>
                </mtd>
              </mtr>
            </mtable>
          </mrow>
          <mo fence="true" stretchy="true">)</mo>
        </mrow>
        <mprescripts/>
        <msub>
          <mi mathvariant="italic">NED</mi>
          <mn>1</mn>
        </msub>
        <none/>
      </mmultiscripts>
    </mrow>
    <annotation encoding="StarMath 5.0">A left ( stack{x_A# y_A # z_A}  right )  lsub{NED_1} </annotation>
  </semantics>
</math>
</file>

<file path=Object 14/content.xml><?xml version="1.0" encoding="utf-8"?>
<math xmlns="http://www.w3.org/1998/Math/MathML" display="block">
  <semantics>
    <mrow>
      <msub>
        <mi>d</mi>
        <mrow>
          <mi>A</mi>
          <mi>,</mi>
          <mi>P</mi>
        </mrow>
      </msub>
      <mo stretchy="false">=</mo>
      <mrow>
        <mo fence="true" stretchy="true">|</mo>
        <mrow>
          <mrow>
            <mi>cos</mi>
            <mi>γ</mi>
            <mn>.</mn>
            <mi>cos</mi>
            <mfrac>
              <mi>θ</mi>
              <mn>2</mn>
            </mfrac>
            <mn>.</mn>
            <mrow>
              <msub>
                <mi>x</mi>
                <mi>A</mi>
              </msub>
              <mo stretchy="false">+</mo>
              <mi>sin</mi>
            </mrow>
            <mi>γ</mi>
            <mn>.</mn>
            <mi>cos</mi>
            <mfrac>
              <mi>θ</mi>
              <mn>2</mn>
            </mfrac>
            <mn>.</mn>
            <mrow>
              <msub>
                <mi>y</mi>
                <mi>A</mi>
              </msub>
              <mo stretchy="false">+</mo>
              <mi>sin</mi>
            </mrow>
            <mfrac>
              <mi>θ</mi>
              <mn>2</mn>
            </mfrac>
            <mn>.</mn>
            <mrow>
              <mo fence="true" stretchy="false">(</mo>
              <mrow>
                <mrow>
                  <msub>
                    <mi>z</mi>
                    <mi>A</mi>
                  </msub>
                  <mo stretchy="false">−</mo>
                  <mi>R</mi>
                </mrow>
              </mrow>
              <mo fence="true" stretchy="false">)</mo>
            </mrow>
          </mrow>
        </mrow>
        <mo fence="true" stretchy="true">|</mo>
      </mrow>
    </mrow>
    <annotation encoding="StarMath 5.0">d_{A,P }= abs{cos%gamma .cos{%theta}over{2} .x_A + sin%gamma .cos{%theta}over{2} .y_A+ sin{%theta}over{2} .( z_A-R )}  </annotation>
  </semantics>
</math>
</file>

<file path=Object 15/content.xml><?xml version="1.0" encoding="utf-8"?>
<math xmlns="http://www.w3.org/1998/Math/MathML" display="block">
  <semantics>
    <mstyle mathsize="10pt">
      <mrow>
        <msub>
          <mi>d</mi>
          <mrow>
            <msub>
              <mi>M</mi>
              <mn>1</mn>
            </msub>
            <mi>,</mi>
            <mi>P</mi>
          </mrow>
        </msub>
        <mo stretchy="false">=</mo>
        <mrow>
          <mo fence="true" stretchy="true">|</mo>
          <mrow>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n>.</mn>
              <mrow>
                <mo fence="true" stretchy="false">(</mo>
                <mrow>
                  <mrow>
                    <mi>r</mi>
                    <mn>.</mn>
                    <mi>sin</mi>
                    <mrow>
                      <mi>α</mi>
                      <mo stretchy="false">−</mo>
                      <mi>R</mi>
                    </mrow>
                  </mrow>
                </mrow>
                <mo fence="true" stretchy="false">)</mo>
              </mrow>
            </mrow>
          </mrow>
          <mo fence="true" stretchy="true">|</mo>
        </mrow>
      </mrow>
    </mstyle>
    <annotation encoding="StarMath 5.0">size 10 { d_{M_1,P }= abs{cos%gamma .cos{%theta}over{2} .r.cos%PHI .cos%alpha
+sin%gamma .cos{%theta}over{2}.r.sin%PHI .cos%alpha+  
sin{%theta}over{2} .( r.sin%alpha-R )}}  </annotation>
  </semantics>
</math>
</file>

<file path=Object 16/content.xml><?xml version="1.0" encoding="utf-8"?>
<math xmlns="http://www.w3.org/1998/Math/MathML" display="block">
  <semantics>
    <mrow>
      <mtext>avec </mtext>
      <mrow>
        <mi>t</mi>
        <mo stretchy="false">=</mo>
        <mi>tan</mi>
      </mrow>
      <mfrac>
        <mi mathvariant="normal">Φ</mi>
        <mn>2</mn>
      </mfrac>
      <mtext>, </mtext>
      <mi>sin</mi>
      <mrow>
        <mi mathvariant="normal">Φ</mi>
        <mo stretchy="false">=</mo>
        <mfrac>
          <mrow>
            <mn>2.</mn>
            <mi>t</mi>
          </mrow>
          <mrow>
            <mn>1</mn>
            <mo stretchy="false">+</mo>
            <msup>
              <mi>t</mi>
              <mn>2</mn>
            </msup>
          </mrow>
        </mfrac>
      </mrow>
      <mtext> et </mtext>
      <mi>cos</mi>
      <mrow>
        <mi mathvariant="normal">Φ</mi>
        <mo stretchy="false">=</mo>
        <mfrac>
          <mrow>
            <mn>1</mn>
            <mo stretchy="false">−</mo>
            <msup>
              <mi>t</mi>
              <mn>2</mn>
            </msup>
          </mrow>
          <mrow>
            <mn>1</mn>
            <mo stretchy="false">+</mo>
            <msup>
              <mi>t</mi>
              <mn>2</mn>
            </msup>
          </mrow>
        </mfrac>
      </mrow>
    </mrow>
    <annotation encoding="StarMath 5.0">"avec " t= tan%PHI over {2}", "sin%PHI={ 2.t }over{ 1+t^2 }  " et " cos%PHI={ 1-t^2 }over{ 1+t^2 }</annotation>
  </semantics>
</math>
</file>

<file path=Object 17/content.xml><?xml version="1.0" encoding="utf-8"?>
<math xmlns="http://www.w3.org/1998/Math/MathML" display="block">
  <semantics>
    <mtable>
      <mtr>
        <mtd>
          <mn>0</mn>
        </mtd>
        <mtd>
          <mtext>=</mtext>
        </mtd>
        <mtd>
          <mrow>
            <mo fence="true" stretchy="false">[</mo>
            <mrow>
              <mrow>
                <mi>sin</mi>
                <mfrac>
                  <mi>θ</mi>
                  <mn>2</mn>
                </mfrac>
                <mn>.</mn>
                <mrow>
                  <mrow>
                    <mo fence="true" stretchy="false">(</mo>
                    <mrow>
                      <mrow>
                        <mi>r</mi>
                        <mn>.</mn>
                        <mi>sin</mi>
                        <mrow>
                          <mi>α</mi>
                          <mo stretchy="false">−</mo>
                          <mi>R</mi>
                        </mrow>
                      </mrow>
                    </mrow>
                    <mo fence="true" stretchy="false">)</mo>
                  </mrow>
                  <mo stretchy="false">−</mo>
                  <mi>cos</mi>
                </mrow>
                <mfrac>
                  <mi>θ</mi>
                  <mn>2.</mn>
                </mfrac>
                <mi>cos</mi>
                <mi>γ</mi>
                <mn>.</mn>
                <mi>r</mi>
                <mn>.</mn>
                <mi>cos</mi>
                <mi>α</mi>
              </mrow>
            </mrow>
            <mo fence="true" stretchy="false">]</mo>
          </mrow>
        </mtd>
        <mtd>
          <msup>
            <mi>t</mi>
            <mn>2</mn>
          </msup>
        </mtd>
      </mtr>
      <mtr>
        <mtd>
          <mspace width="2em"/>
        </mtd>
        <mtd>
          <mtext>+</mtext>
        </mtd>
        <mtd>
          <mrow>
            <mn>2.</mn>
            <mi>sin</mi>
            <mi>γ</mi>
            <mi>cos</mi>
            <mfrac>
              <mi>θ</mi>
              <mn>2</mn>
            </mfrac>
            <mn>.</mn>
            <mi>r</mi>
            <mn>.</mn>
            <mi>cos</mi>
            <mi>α</mi>
          </mrow>
        </mtd>
        <mtd>
          <mi>t</mi>
        </mtd>
      </mtr>
      <mtr>
        <mtd>
          <mspace width="2em"/>
        </mtd>
        <mtd>
          <mtext>+</mtext>
        </mtd>
        <mtd>
          <mrow>
            <mi>cos</mi>
            <mi>γ</mi>
            <mn>.</mn>
            <mi>cos</mi>
            <mfrac>
              <mi>θ</mi>
              <mn>2</mn>
            </mfrac>
            <mn>.</mn>
            <mi>r</mi>
            <mn>.</mn>
            <mi>cos</mi>
            <mrow>
              <mi>α</mi>
              <mo stretchy="false">+</mo>
              <mi>sin</mi>
            </mrow>
            <mfrac>
              <mi>θ</mi>
              <mn>2</mn>
            </mfrac>
            <mn>.</mn>
            <mrow>
              <mo fence="true" stretchy="false">(</mo>
              <mrow>
                <mrow>
                  <mi>r</mi>
                  <mn>.</mn>
                  <mi>sin</mi>
                  <mrow>
                    <mi>α</mi>
                    <mo stretchy="false">−</mo>
                    <mi>R</mi>
                  </mrow>
                </mrow>
              </mrow>
              <mo fence="true" stretchy="false">)</mo>
            </mrow>
          </mrow>
        </mtd>
        <mtd>
          <mspace width="2em"/>
        </mtd>
      </mtr>
    </mtable>
    <annotation encoding="StarMath 5.0">matrix{0 # "=" # [ sin %theta over 2 .(r.sin%alpha -R)-cos%theta over 2.cos%gamma .r.cos%alpha] # t^2 ##
~ # "+" #  2. sin%gamma cos%theta over 2 .r. cos%alpha  # t  ##
~# "+" # cos%gamma . cos%theta over 2  .r.cos%alpha+sin %theta over 2 .(r.sin%alpha -R)# ~}</annotation>
  </semantics>
</math>
</file>

<file path=Object 18/content.xml><?xml version="1.0" encoding="utf-8"?>
<math xmlns="http://www.w3.org/1998/Math/MathML" display="block">
  <semantics>
    <mover accent="true">
      <mi>n</mi>
      <mo stretchy="true">⃗</mo>
    </mover>
    <annotation encoding="StarMath 5.0">widevec {n} </annotation>
  </semantics>
</math>
</file>

<file path=Object 19/content.xml><?xml version="1.0" encoding="utf-8"?>
<math xmlns="http://www.w3.org/1998/Math/MathML" display="block">
  <semantics>
    <mrow>
      <mi mathvariant="normal">Φ</mi>
      <mo stretchy="false">=</mo>
      <mi>γ</mi>
    </mrow>
    <annotation encoding="StarMath 5.0">%PHI=%gamma</annotation>
  </semantics>
</math>
</file>

<file path=Object 2/content.xml><?xml version="1.0" encoding="utf-8"?>
<math xmlns="http://www.w3.org/1998/Math/MathML" display="block">
  <semantics>
    <mrow>
      <mrow>
        <mrow>
          <msubsup>
            <mi>x</mi>
            <mn>1</mn>
            <mn>2</mn>
          </msubsup>
          <mo stretchy="false">+</mo>
          <msubsup>
            <mi>y</mi>
            <mn>1</mn>
            <mn>2</mn>
          </msubsup>
        </mrow>
        <mo stretchy="false">=</mo>
        <msubsup>
          <mi>z</mi>
          <mn>1</mn>
          <mn>2</mn>
        </msubsup>
      </mrow>
      <msup>
        <mi>tan</mi>
        <mn>2</mn>
      </msup>
      <mrow>
        <mo fence="true" stretchy="false">(</mo>
        <mrow>
          <mrow>
            <mrow>
              <mi>π</mi>
              <mo stretchy="false">/</mo>
              <mn>2</mn>
            </mrow>
            <mo stretchy="false">−</mo>
            <mi>α</mi>
          </mrow>
        </mrow>
        <mo fence="true" stretchy="false">)</mo>
      </mrow>
    </mrow>
    <annotation encoding="StarMath 5.0">x_1^2+y_1^2=z_1^2 tan^2(%pi/2-%alpha  )</annotation>
  </semantics>
</math>
</file>

<file path=Object 20/content.xml><?xml version="1.0" encoding="utf-8"?>
<math xmlns="http://www.w3.org/1998/Math/MathML" display="block">
  <semantics>
    <mrow>
      <msub>
        <mi mathvariant="normal">Φ</mi>
        <mi mathvariant="italic">min</mi>
      </msub>
      <mtext> et </mtext>
      <msub>
        <mi mathvariant="normal">Φ</mi>
        <mi mathvariant="italic">max</mi>
      </msub>
    </mrow>
    <annotation encoding="StarMath 5.0">%PHI_min " et " %PHI_max</annotation>
  </semantics>
</math>
</file>

<file path=Object 21/content.xml><?xml version="1.0" encoding="utf-8"?>
<math xmlns="http://www.w3.org/1998/Math/MathML" display="block">
  <semantics>
    <mstyle mathsize="11pt">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row>
          <mrow>
            <mo fence="true" stretchy="false">(</mo>
            <mrow>
              <mrow>
                <mi>r</mi>
                <mn>.</mn>
                <mi>sin</mi>
                <mrow>
                  <mi>α</mi>
                  <mo stretchy="false">−</mo>
                  <mi>R</mi>
                </mrow>
              </mrow>
            </mrow>
            <mo fence="true" stretchy="false">)</mo>
          </mrow>
          <mo stretchy="false">=</mo>
          <mn>0</mn>
        </mrow>
      </mrow>
    </mstyle>
    <annotation encoding="StarMath 5.0">size 11 {cos%gamma .cos{%theta}over{2}.r.cos%PHI .cos%alpha
+sin%gamma .cos{%theta}over{2}.r.sin%PHI .cos%alpha+  
sin{%theta}over{2}( r.sin%alpha-R )= 0}</annotation>
  </semantics>
</math>
</file>

<file path=Object 22/content.xml><?xml version="1.0" encoding="utf-8"?>
<math xmlns="http://www.w3.org/1998/Math/MathML" display="block">
  <semantics>
    <mtable>
      <mtr>
        <mtd>
          <mrow>
            <mi>r</mi>
            <mo stretchy="false">=</mo>
            <mfrac>
              <mi>R</mi>
              <mrow>
                <mi>cos</mi>
                <mi>γ</mi>
                <mn>.</mn>
                <mi>cos</mi>
                <mfrac>
                  <mi>θ</mi>
                  <mn>2</mn>
                </mfrac>
                <mn>.</mn>
                <mi>cos</mi>
                <mi mathvariant="normal">Φ</mi>
                <mn>.</mn>
                <mi>cos</mi>
                <mrow>
                  <mi>α</mi>
                  <mo stretchy="false">+</mo>
                  <mi>sin</mi>
                </mrow>
                <mi>γ</mi>
                <mn>.</mn>
                <mi>cos</mi>
                <mfrac>
                  <mi>θ</mi>
                  <mn>2</mn>
                </mfrac>
                <mn>.</mn>
                <mi>sin</mi>
                <mi mathvariant="normal">Φ</mi>
                <mn>.</mn>
                <mi>cos</mi>
                <mrow>
                  <mi>α</mi>
                  <mo stretchy="false">+</mo>
                  <mi>sin</mi>
                </mrow>
                <mfrac>
                  <mi>θ</mi>
                  <mn>2</mn>
                </mfrac>
                <mi>sin</mi>
                <mi>α</mi>
              </mrow>
            </mfrac>
          </mrow>
        </mtd>
      </mtr>
      <mtr>
        <mtd>
          <mrow>
            <mspace width="2em"/>
            <mo stretchy="false">=</mo>
            <mfrac>
              <mi>R</mi>
              <mrow>
                <mi>cos</mi>
                <mrow>
                  <mo fence="true" stretchy="false">(</mo>
                  <mrow>
                    <mrow>
                      <mi>γ</mi>
                      <mo stretchy="false">−</mo>
                      <mi mathvariant="normal">Φ</mi>
                    </mrow>
                  </mrow>
                  <mo fence="true" stretchy="false">)</mo>
                </mrow>
                <mn>.</mn>
                <mi>cos</mi>
                <mfrac>
                  <mi>θ</mi>
                  <mn>2</mn>
                </mfrac>
                <mn>.</mn>
                <mi>cos</mi>
                <mrow>
                  <mi>α</mi>
                  <mo stretchy="false">+</mo>
                  <mi>sin</mi>
                </mrow>
                <mfrac>
                  <mi>θ</mi>
                  <mn>2</mn>
                </mfrac>
                <mi>sin</mi>
                <mi>α</mi>
              </mrow>
            </mfrac>
          </mrow>
        </mtd>
      </mtr>
    </mtable>
    <annotation encoding="StarMath 5.0">r=R over{ cos%gamma .cos{%theta}over{2}.cos%PHI .cos%alpha
+sin%gamma .cos{%theta}over{2}.sin%PHI .cos%alpha+  
sin{%theta}over{2} sin%alpha } newline
~=R over{ cos(%gamma-%PHI ).cos{%theta}over{2} .cos%alpha+  sin{%theta}over{2} sin%alpha }</annotation>
  </semantics>
</math>
</file>

<file path=Object 23/content.xml><?xml version="1.0" encoding="utf-8"?>
<math xmlns="http://www.w3.org/1998/Math/MathML" display="block">
  <semantics>
    <mrow>
      <msub>
        <mi>α</mi>
        <mrow>
          <mi mathvariant="italic">min</mi>
          <mn>1</mn>
        </mrow>
      </msub>
      <mi mathvariant="italic">et</mi>
      <msub>
        <mi>α</mi>
        <mrow>
          <mi mathvariant="italic">max</mi>
          <mn>1</mn>
        </mrow>
      </msub>
    </mrow>
    <annotation encoding="StarMath 5.0">%alpha_min1 et %alpha_max1</annotation>
  </semantics>
</math>
</file>

<file path=Object 24/content.xml><?xml version="1.0" encoding="utf-8"?>
<math xmlns="http://www.w3.org/1998/Math/MathML" display="block">
  <semantics>
    <mrow>
      <msub>
        <mi>α</mi>
        <mrow>
          <mi mathvariant="italic">min</mi>
          <mn>2</mn>
        </mrow>
      </msub>
      <mi mathvariant="italic">et</mi>
      <msub>
        <mi>α</mi>
        <mrow>
          <mi mathvariant="italic">max</mi>
          <mn>2</mn>
        </mrow>
      </msub>
    </mrow>
    <annotation encoding="StarMath 5.0">%alpha_min2 et %alpha_max2</annotation>
  </semantics>
</math>
</file>

<file path=Object 25/content.xml><?xml version="1.0" encoding="utf-8"?>
<math xmlns="http://www.w3.org/1998/Math/MathML" display="block">
  <semantics>
    <mrow>
      <mo stretchy="false">∃</mo>
      <mrow>
        <mrow>
          <mo fence="true" stretchy="false">(</mo>
          <mrow>
            <mrow>
              <msub>
                <mi mathvariant="normal">Φ</mi>
                <mrow>
                  <mn>1</mn>
                  <mi>i</mi>
                </mrow>
              </msub>
              <mi>,</mi>
              <mi>r</mi>
            </mrow>
          </mrow>
          <mo fence="true" stretchy="false">)</mo>
        </mrow>
        <mo stretchy="false">∈</mo>
        <mo stretchy="false">(</mo>
      </mrow>
      <mo stretchy="false">[</mo>
      <mn>0,2</mn>
      <mi>π</mi>
      <mo stretchy="false">[</mo>
      <mi>,</mi>
      <mo stretchy="false">[</mo>
      <mn>0</mn>
      <mi>,</mi>
      <mi>R</mi>
      <mo stretchy="false">]</mo>
      <mo stretchy="false">)</mo>
      <mtext>/</mtext>
      <mrow>
        <mmultiscripts>
          <mrow>
            <mo fence="true" stretchy="true">(</mo>
            <mrow>
              <mtable>
                <mtr>
                  <mtd>
                    <msub>
                      <mi>x</mi>
                      <mrow>
                        <mn>1</mn>
                        <mi>i</mi>
                      </mrow>
                    </msub>
                  </mtd>
                </mtr>
                <mtr>
                  <mtd>
                    <msub>
                      <mi>y</mi>
                      <mrow>
                        <mn>1</mn>
                        <mi>i</mi>
                      </mrow>
                    </msub>
                  </mtd>
                </mtr>
                <mtr>
                  <mtd>
                    <msub>
                      <mi>z</mi>
                      <mrow>
                        <mn>1</mn>
                        <mi>i</mi>
                      </mrow>
                    </msub>
                  </mtd>
                </mtr>
              </mtable>
            </mrow>
            <mo fence="true" stretchy="true">)</mo>
          </mrow>
          <mprescripts/>
          <msub>
            <mi mathvariant="italic">NED</mi>
            <mn>1</mn>
          </msub>
          <none/>
        </mmultiscripts>
        <mo stretchy="false">=</mo>
        <mmultiscripts>
          <mrow>
            <mo fence="true" stretchy="true">(</mo>
            <mrow>
              <mtable>
                <mtr>
                  <mtd>
                    <mrow>
                      <mi>r</mi>
                      <mn>.</mn>
                      <mi>cos</mi>
                      <msub>
                        <mi mathvariant="normal">Φ</mi>
                        <mrow>
                          <mn>1</mn>
                          <mi>i</mi>
                          <mn>.</mn>
                        </mrow>
                      </msub>
                      <mi>cos</mi>
                      <msub>
                        <mi>α</mi>
                        <mrow>
                          <mn>1</mn>
                          <mi>i</mi>
                        </mrow>
                      </msub>
                    </mrow>
                  </mtd>
                </mtr>
                <mtr>
                  <mtd>
                    <mrow>
                      <mi>r</mi>
                      <mn>.</mn>
                      <mi>sin</mi>
                      <msub>
                        <mi mathvariant="normal">Φ</mi>
                        <mrow>
                          <mn>1</mn>
                          <mi>i</mi>
                          <mn>.</mn>
                        </mrow>
                      </msub>
                      <mi>cos</mi>
                      <msub>
                        <mi>α</mi>
                        <mrow>
                          <mn>1</mn>
                          <mi>i</mi>
                        </mrow>
                      </msub>
                    </mrow>
                  </mtd>
                </mtr>
                <mtr>
                  <mtd>
                    <mrow>
                      <mi>r</mi>
                      <mn>.</mn>
                      <mi>sin</mi>
                      <msub>
                        <mi>α</mi>
                        <mrow>
                          <mn>1</mn>
                          <mi>i</mi>
                        </mrow>
                      </msub>
                    </mrow>
                  </mtd>
                </mtr>
              </mtable>
            </mrow>
            <mo fence="true" stretchy="true">)</mo>
          </mrow>
          <mprescripts/>
          <msub>
            <mi mathvariant="italic">NED</mi>
            <mn>1</mn>
          </msub>
          <none/>
        </mmultiscripts>
      </mrow>
    </mrow>
    <annotation encoding="StarMath 5.0">exists  (%PHI_1i,r) in \( \[0,2%pi\[, \[0,R\]  \) "/" left ( stack{x_{1i}# y_{1i} # z_{1i}}  right )  lsub{NED_1}=left ( stack{r.cos%PHI_1i.cos%alpha_1i # r.sin%PHI_1i.cos%alpha_1i # r.sin%alpha_1i}  right )  lsub{NED_1} </annotation>
  </semantics>
</math>
</file>

<file path=Object 26/content.xml><?xml version="1.0" encoding="utf-8"?>
<math xmlns="http://www.w3.org/1998/Math/MathML" display="block">
  <semantics>
    <msub>
      <mi>γ</mi>
      <mn>1</mn>
    </msub>
    <annotation encoding="StarMath 5.0">%gamma_1</annotation>
  </semantics>
</math>
</file>

<file path=Object 27/content.xml><?xml version="1.0" encoding="utf-8"?>
<math xmlns="http://www.w3.org/1998/Math/MathML" display="block">
  <semantics>
    <mrow>
      <mi>R</mi>
      <mn>.</mn>
      <mi>cos</mi>
      <msub>
        <mi>α</mi>
        <mrow>
          <mn>2</mn>
          <mi mathvariant="italic">max</mi>
        </mrow>
      </msub>
      <mtext> (respectivement </mtext>
      <mi>R</mi>
      <mn>.</mn>
      <mi>cos</mi>
      <msub>
        <mi>α</mi>
        <mrow>
          <mn>2</mn>
          <mi mathvariant="italic">min</mi>
        </mrow>
      </msub>
      <mtext>)</mtext>
    </mrow>
    <annotation encoding="StarMath 5.0">R.cos%alpha_{ 2max } " (respectivement "R.cos%alpha_{ 2min }")"</annotation>
  </semantics>
</math>
</file>

<file path=Object 28/content.xml><?xml version="1.0" encoding="utf-8"?>
<math xmlns="http://www.w3.org/1998/Math/MathML" display="block">
  <semantics>
    <msub>
      <mi>α</mi>
      <mrow>
        <mn>2</mn>
        <mi mathvariant="italic">max</mi>
      </mrow>
    </msub>
    <annotation encoding="StarMath 5.0">%alpha_2max</annotation>
  </semantics>
</math>
</file>

<file path=Object 29/content.xml><?xml version="1.0" encoding="utf-8"?>
<math xmlns="http://www.w3.org/1998/Math/MathML" display="block">
  <semantics>
    <msub>
      <mi>α</mi>
      <mrow>
        <mn>2</mn>
        <mi mathvariant="italic">min</mi>
      </mrow>
    </msub>
    <annotation encoding="StarMath 5.0">%alpha_2min</annotation>
  </semantics>
</math>
</file>

<file path=Object 3/content.xml><?xml version="1.0" encoding="utf-8"?>
<math xmlns="http://www.w3.org/1998/Math/MathML" display="block">
  <semantics>
    <mrow>
      <mrow>
        <msubsup>
          <mi>x</mi>
          <mn>1</mn>
          <mn>2</mn>
        </msubsup>
        <mo stretchy="false">+</mo>
        <msubsup>
          <mi>y</mi>
          <mn>1</mn>
          <mn>2</mn>
        </msubsup>
      </mrow>
      <mo stretchy="false">=</mo>
      <mfrac>
        <msubsup>
          <mi>z</mi>
          <mn>1</mn>
          <mn>2</mn>
        </msubsup>
        <mrow>
          <msup>
            <mi>tan</mi>
            <mn>2</mn>
          </msup>
          <mi>α</mi>
        </mrow>
      </mfrac>
    </mrow>
    <annotation encoding="StarMath 5.0">x_1^2+y_1^2= {z_1^2} over {tan^2%alpha  } </annotation>
  </semantics>
</math>
</file>

<file path=Object 30/content.xml><?xml version="1.0" encoding="utf-8"?>
<math xmlns="http://www.w3.org/1998/Math/MathML" display="block">
  <semantics>
    <msub>
      <mi>γ</mi>
      <mn>1</mn>
    </msub>
    <annotation encoding="StarMath 5.0">%gamma_1</annotation>
  </semantics>
</math>
</file>

<file path=Object 31/content.xml><?xml version="1.0" encoding="utf-8"?>
<math xmlns="http://www.w3.org/1998/Math/MathML" display="block">
  <semantics>
    <mrow>
      <mo stretchy="false">−</mo>
      <mi>θ</mi>
    </mrow>
    <annotation encoding="StarMath 5.0">-%theta</annotation>
  </semantics>
</math>
</file>

<file path=Object 32/content.xml><?xml version="1.0" encoding="utf-8"?>
<math xmlns="http://www.w3.org/1998/Math/MathML" display="block">
  <semantics>
    <mrow>
      <mi>π</mi>
      <mo stretchy="false">−</mo>
      <msub>
        <mi>γ</mi>
        <mn>2</mn>
      </msub>
    </mrow>
    <annotation encoding="StarMath 5.0">%pi-%gamma_2</annotation>
  </semantics>
</math>
</file>

<file path=Object 33/content.xml><?xml version="1.0" encoding="utf-8"?>
<math xmlns="http://www.w3.org/1998/Math/MathML" display="block">
  <semantics>
    <mrow>
      <mover accent="true">
        <mrow>
          <msub>
            <mi>V</mi>
            <mn>2</mn>
          </msub>
          <msub>
            <mi>V</mi>
            <mn>1</mn>
          </msub>
        </mrow>
        <mo stretchy="true">⃗</mo>
      </mover>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row>
    <annotation encoding="StarMath 5.0">widevec {V_2 V_1}  left ( stack{ldline widevec {V_1 V_2}  rdline.cos%theta/2 # 0 # ldline widevec {V_1 V_2}  rdline.sin%theta/2}  right )  lsub{NED_2'} </annotation>
  </semantics>
</math>
</file>

<file path=Object 34/content.xml><?xml version="1.0" encoding="utf-8"?>
<math xmlns="http://www.w3.org/1998/Math/MathML" display="block">
  <semantics>
    <mtable>
      <mtr>
        <mtd>
          <mrow>
            <mrow>
              <msub>
                <mi>M</mi>
                <mrow>
                  <mn>1</mn>
                  <mi>i</mi>
                </mrow>
              </msub>
              <mo stretchy="false">∈</mo>
              <msub>
                <mi>L</mi>
                <mrow>
                  <mn>2</mn>
                  <mi mathvariant="italic">max</mi>
                </mrow>
              </msub>
            </mrow>
            <mtext> (respectivement </mtext>
            <mrow>
              <msub>
                <mi>M</mi>
                <mrow>
                  <mn>1</mn>
                  <mi>i</mi>
                </mrow>
              </msub>
              <mo stretchy="false">∈</mo>
              <msub>
                <mi>L</mi>
                <mrow>
                  <mn>2</mn>
                  <mi mathvariant="italic">min</mi>
                </mrow>
              </msub>
            </mrow>
            <mtext>)</mtext>
            <mo stretchy="false">⇒</mo>
            <mspace/>
          </mrow>
        </mtd>
      </mtr>
      <mtr>
        <mtd>
          <mrow>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ax</mi>
                        </msub>
                      </mrow>
                    </mtd>
                  </mtr>
                  <mtr>
                    <mtd>
                      <mrow>
                        <mrow>
                          <mn>0</mn>
                          <mo stretchy="false">≤</mo>
                          <msub>
                            <mi>z</mi>
                            <mrow>
                              <mi>V</mi>
                              <mn>1</mn>
                              <mi>i</mi>
                            </mrow>
                          </msub>
                          <mo stretchy="false">≤</mo>
                          <mi>R</mi>
                        </mrow>
                        <mn>.</mn>
                        <mi>sin</mi>
                        <msub>
                          <mi>α</mi>
                          <mi mathvariant="italic">max</mi>
                        </msub>
                      </mrow>
                    </mtd>
                  </mtr>
                </mtable>
              </mrow>
            </mrow>
            <mtext> ( respectivement )</mtext>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in</mi>
                        </msub>
                      </mrow>
                    </mtd>
                  </mtr>
                  <mtr>
                    <mtd>
                      <mrow>
                        <mrow>
                          <mn>0</mn>
                          <mo stretchy="false">≤</mo>
                          <msub>
                            <mi>z</mi>
                            <mrow>
                              <mi>V</mi>
                              <mn>1</mn>
                              <mi>i</mi>
                            </mrow>
                          </msub>
                          <mo stretchy="false">≤</mo>
                          <mi>R</mi>
                        </mrow>
                        <mn>.</mn>
                        <mi>sin</mi>
                        <msub>
                          <mi>α</mi>
                          <mi mathvariant="italic">min</mi>
                        </msub>
                      </mrow>
                    </mtd>
                  </mtr>
                </mtable>
              </mrow>
            </mrow>
          </mrow>
        </mtd>
      </mtr>
    </mtable>
    <annotation encoding="StarMath 5.0">M_{1i} in L_2max " (respectivement "M_{1i} in L_2min")"  drarrow ~ newline 
left lbrace stack{x_{V1i}^2+y^2_{V1i}  &lt;=  R^2cos^2%alpha_max # 0&lt;=z_{V1i}&lt;=R.sin%alpha_max}  right none  
" ( respectivement )" 
 left lbrace stack{x_{V1i}^2+y^2_{V1i}  &lt;=  R^2cos^2%alpha_min # 0&lt;=z_{V1i}&lt;=R.sin%alpha_min}  right none  </annotation>
  </semantics>
</math>
</file>

<file path=Object 35/content.xml><?xml version="1.0" encoding="utf-8"?>
<math xmlns="http://www.w3.org/1998/Math/MathML" display="block">
  <semantics>
    <mrow>
      <mrow>
        <mi>Z</mi>
        <mo stretchy="false">∈</mo>
        <mo stretchy="false">{</mo>
      </mrow>
      <mi mathvariant="italic">max</mi>
      <mi>,</mi>
      <mi mathvariant="italic">min</mi>
      <mo stretchy="false">}</mo>
    </mrow>
    <annotation encoding="StarMath 5.0">Z in \{ max,min \}</annotation>
  </semantics>
</math>
</file>

<file path=Object 36/content.xml><?xml version="1.0" encoding="utf-8"?>
<math xmlns="http://www.w3.org/1998/Math/MathML" display="block">
  <semantics>
    <mover accent="true">
      <mrow>
        <msub>
          <mi>V</mi>
          <mn>2</mn>
        </msub>
        <msub>
          <mi>V</mi>
          <mn>1</mn>
        </msub>
      </mrow>
      <mo stretchy="true">⃗</mo>
    </mover>
    <annotation encoding="StarMath 5.0">widevec {V_2 V_1}</annotation>
  </semantics>
</math>
</file>

<file path=Object 37/content.xml><?xml version="1.0" encoding="utf-8"?>
<math xmlns="http://www.w3.org/1998/Math/MathML" display="block">
  <semantics>
    <mrow>
      <mn>2.</mn>
      <mi>R</mi>
      <mn>.</mn>
      <mi>cos</mi>
      <msub>
        <mi>α</mi>
        <mrow>
          <mn>1</mn>
          <mi mathvariant="italic">ou</mi>
          <mn>2</mn>
          <mi>Z</mi>
        </mrow>
      </msub>
    </mrow>
    <annotation encoding="StarMath 5.0">2.R.cos%alpha_{ 1ou2Z } </annotation>
  </semantics>
</math>
</file>

<file path=Object 38/content.xml><?xml version="1.0" encoding="utf-8"?>
<math xmlns="http://www.w3.org/1998/Math/MathML" display="block">
  <semantics>
    <mrow>
      <mo stretchy="false">−</mo>
      <mi>θ</mi>
    </mrow>
    <annotation encoding="StarMath 5.0">-%theta</annotation>
  </semantics>
</math>
</file>

<file path=Object 39/content.xml><?xml version="1.0" encoding="utf-8"?>
<math xmlns="http://www.w3.org/1998/Math/MathML" display="block">
  <semantics>
    <mrow>
      <mi>π</mi>
      <mo stretchy="false">−</mo>
      <msub>
        <mi>γ</mi>
        <mn>2</mn>
      </msub>
    </mrow>
    <annotation encoding="StarMath 5.0">%pi-%gamma_2</annotation>
  </semantics>
</math>
</file>

<file path=Object 4/content.xml><?xml version="1.0" encoding="utf-8"?>
<math xmlns="http://www.w3.org/1998/Math/MathML" display="block">
  <semantics>
    <mrow>
      <mrow>
        <msubsup>
          <mi>x</mi>
          <mn>2</mn>
          <mn>2</mn>
        </msubsup>
        <mo stretchy="false">+</mo>
        <msubsup>
          <mi>y</mi>
          <mn>2</mn>
          <mn>2</mn>
        </msubsup>
      </mrow>
      <mo stretchy="false">=</mo>
      <mfrac>
        <msubsup>
          <mi>z</mi>
          <mn>2</mn>
          <mn>2</mn>
        </msubsup>
        <mrow>
          <msup>
            <mi>tan</mi>
            <mn>2</mn>
          </msup>
          <mi>α</mi>
        </mrow>
      </mfrac>
    </mrow>
    <annotation encoding="StarMath 5.0">x_2^2+y_2^2= {z_2^2} over {tan^2%alpha  } </annotation>
  </semantics>
</math>
</file>

<file path=Object 40/content.xml><?xml version="1.0" encoding="utf-8"?>
<math xmlns="http://www.w3.org/1998/Math/MathML" display="block">
  <semantics>
    <msub>
      <mi mathvariant="normal">Φ</mi>
      <mrow>
        <mn>2</mn>
        <mi>i</mi>
      </mrow>
    </msub>
    <annotation encoding="StarMath 5.0">%PHI_2i</annotation>
  </semantics>
</math>
</file>

<file path=Object 41/content.xml><?xml version="1.0" encoding="utf-8"?>
<math xmlns="http://www.w3.org/1998/Math/MathML" display="block">
  <semantics>
    <msub>
      <mi>γ</mi>
      <mn>2</mn>
    </msub>
    <annotation encoding="StarMath 5.0">%gamma_2</annotation>
  </semantics>
</math>
</file>

<file path=Object 42/content.xml><?xml version="1.0" encoding="utf-8"?>
<math xmlns="http://www.w3.org/1998/Math/MathML" display="block">
  <semantics>
    <msub>
      <mi>M</mi>
      <mrow>
        <mrow>
          <msub>
            <mi mathvariant="italic">NED</mi>
            <mn>2</mn>
          </msub>
          <mo stretchy="false">→</mo>
          <mi mathvariant="italic">NED</mi>
        </mrow>
        <mn>1</mn>
      </mrow>
    </msub>
    <annotation encoding="StarMath 5.0">M_{ NED_2  toward NED1  }</annotation>
  </semantics>
</math>
</file>

<file path=Object 43/content.xml><?xml version="1.0" encoding="utf-8"?>
<math xmlns="http://www.w3.org/1998/Math/MathML" display="block">
  <semantics>
    <mtable>
      <mtr>
        <mtd>
          <mrow>
            <mrow>
              <msub>
                <mi>M</mi>
                <mrow>
                  <mrow>
                    <msub>
                      <mi mathvariant="italic">NED</mi>
                      <mn>2</mn>
                    </msub>
                    <mo stretchy="false">→</mo>
                    <mi mathvariant="italic">NED</mi>
                  </mrow>
                  <mn>1</mn>
                </mrow>
              </msub>
              <mo stretchy="false">=</mo>
              <msub>
                <mi>R</mi>
                <mi>z</mi>
              </msub>
            </mrow>
            <mrow>
              <mo fence="true" stretchy="false">(</mo>
              <mrow>
                <mrow>
                  <mi>π</mi>
                  <mo stretchy="false">−</mo>
                  <msub>
                    <mi>γ</mi>
                    <mn>2</mn>
                  </msub>
                </mrow>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i>cos</mi>
                        <mrow>
                          <mo fence="true" stretchy="false">(</mo>
                          <mrow>
                            <mrow>
                              <mi>π</mi>
                              <mo stretchy="false">−</mo>
                              <msub>
                                <mi>γ</mi>
                                <mn>2</mn>
                              </msub>
                            </mrow>
                          </mrow>
                          <mo fence="true" stretchy="false">)</mo>
                        </mrow>
                      </mrow>
                    </mtd>
                    <mtd>
                      <mrow>
                        <mrow>
                          <mo stretchy="false">−</mo>
                          <mi>sin</mi>
                        </mrow>
                        <mrow>
                          <mo fence="true" stretchy="false">(</mo>
                          <mrow>
                            <mrow>
                              <mi>π</mi>
                              <mo stretchy="false">−</mo>
                              <msub>
                                <mi>γ</mi>
                                <mn>2</mn>
                              </msub>
                            </mrow>
                          </mrow>
                          <mo fence="true" stretchy="false">)</mo>
                        </mrow>
                      </mrow>
                    </mtd>
                    <mtd>
                      <mn>0</mn>
                    </mtd>
                  </mtr>
                  <mtr>
                    <mtd>
                      <mrow>
                        <mi>sin</mi>
                        <mrow>
                          <mo fence="true" stretchy="false">(</mo>
                          <mrow>
                            <mrow>
                              <mi>π</mi>
                              <mo stretchy="false">−</mo>
                              <msub>
                                <mi>γ</mi>
                                <mn>2</mn>
                              </msub>
                            </mrow>
                          </mrow>
                          <mo fence="true" stretchy="false">)</mo>
                        </mrow>
                      </mrow>
                    </mtd>
                    <mtd>
                      <mrow>
                        <mi>cos</mi>
                        <mrow>
                          <mo fence="true" stretchy="false">(</mo>
                          <mrow>
                            <mrow>
                              <mi>π</mi>
                              <mo stretchy="false">−</mo>
                              <msub>
                                <mi>γ</mi>
                                <mn>2</mn>
                              </msub>
                            </mrow>
                          </mrow>
                          <mo fence="true" stretchy="false">)</mo>
                        </mrow>
                      </mrow>
                    </mtd>
                    <mtd>
                      <mn>0</mn>
                    </mtd>
                  </mtr>
                  <mtr>
                    <mtd>
                      <mn>0</mn>
                    </mtd>
                    <mtd>
                      <mn>0</mn>
                    </mtd>
                    <mtd>
                      <mn>1</mn>
                    </mtd>
                  </mtr>
                </mtable>
              </mrow>
              <mo fence="true" stretchy="true">)</mo>
            </mrow>
            <mn>.</mn>
            <mrow>
              <mo fence="true" stretchy="true">(</mo>
              <mrow>
                <mtable>
                  <mtr>
                    <mtd>
                      <mrow>
                        <mi>cos</mi>
                        <mrow>
                          <mo fence="true" stretchy="false">(</mo>
                          <mrow>
                            <mrow>
                              <mo stretchy="false">−</mo>
                              <mi>θ</mi>
                            </mrow>
                          </mrow>
                          <mo fence="true" stretchy="false">)</mo>
                        </mrow>
                      </mrow>
                    </mtd>
                    <mtd>
                      <mn>0</mn>
                    </mtd>
                    <mtd>
                      <mrow>
                        <mi>sin</mi>
                        <mrow>
                          <mo fence="true" stretchy="false">(</mo>
                          <mrow>
                            <mrow>
                              <mo stretchy="false">−</mo>
                              <mi>θ</mi>
                            </mrow>
                          </mrow>
                          <mo fence="true" stretchy="false">)</mo>
                        </mrow>
                      </mrow>
                    </mtd>
                  </mtr>
                  <mtr>
                    <mtd>
                      <mn>0</mn>
                    </mtd>
                    <mtd>
                      <mn>1</mn>
                    </mtd>
                    <mtd>
                      <mn>0</mn>
                    </mtd>
                  </mtr>
                  <mtr>
                    <mtd>
                      <mrow>
                        <mrow>
                          <mo stretchy="false">−</mo>
                          <mi>sin</mi>
                        </mrow>
                        <mrow>
                          <mo fence="true" stretchy="false">(</mo>
                          <mrow>
                            <mrow>
                              <mo stretchy="false">−</mo>
                              <mi>θ</mi>
                            </mrow>
                          </mrow>
                          <mo fence="true" stretchy="false">)</mo>
                        </mrow>
                      </mrow>
                    </mtd>
                    <mtd>
                      <mn>0</mn>
                    </mtd>
                    <mtd>
                      <mrow>
                        <mi>cos</mi>
                        <mrow>
                          <mo fence="true" stretchy="false">(</mo>
                          <mrow>
                            <mrow>
                              <mo stretchy="false">−</mo>
                              <mi>θ</mi>
                            </mrow>
                          </mrow>
                          <mo fence="true" stretchy="false">)</mo>
                        </mrow>
                      </mrow>
                    </mtd>
                  </mtr>
                </mtable>
              </mrow>
              <mo fence="true" stretchy="true">)</mo>
            </mrow>
            <mn>.</mn>
            <mrow>
              <mo fence="true" stretchy="true">(</mo>
              <mrow>
                <mtable>
                  <mtr>
                    <mtd>
                      <mrow>
                        <mi>cos</mi>
                        <mrow>
                          <mo fence="true" stretchy="false">(</mo>
                          <mrow>
                            <msub>
                              <mi>γ</mi>
                              <mn>1</mn>
                            </msub>
                          </mrow>
                          <mo fence="true" stretchy="false">)</mo>
                        </mrow>
                      </mrow>
                    </mtd>
                    <mtd>
                      <mrow>
                        <mrow>
                          <mo stretchy="false">−</mo>
                          <mi>sin</mi>
                        </mrow>
                        <mrow>
                          <mo fence="true" stretchy="false">(</mo>
                          <mrow>
                            <msub>
                              <mi>γ</mi>
                              <mn>1</mn>
                            </msub>
                          </mrow>
                          <mo fence="true" stretchy="false">)</mo>
                        </mrow>
                      </mrow>
                    </mtd>
                    <mtd>
                      <mn>0</mn>
                    </mtd>
                  </mtr>
                  <mtr>
                    <mtd>
                      <mrow>
                        <mi>sin</mi>
                        <mrow>
                          <mo fence="true" stretchy="false">(</mo>
                          <mrow>
                            <msub>
                              <mi>γ</mi>
                              <mn>1</mn>
                            </msub>
                          </mrow>
                          <mo fence="true" stretchy="false">)</mo>
                        </mrow>
                      </mrow>
                    </mtd>
                    <mtd>
                      <mrow>
                        <mi>cos</mi>
                        <mrow>
                          <mo fence="true" stretchy="false">(</mo>
                          <mrow>
                            <msub>
                              <mi>γ</mi>
                              <mn>1</mn>
                            </msub>
                          </mrow>
                          <mo fence="true" stretchy="false">)</mo>
                        </mrow>
                      </mrow>
                    </mtd>
                    <mtd>
                      <mn>0</mn>
                    </mtd>
                  </mtr>
                  <mtr>
                    <mtd>
                      <mn>0</mn>
                    </mtd>
                    <mtd>
                      <mn>0</mn>
                    </mtd>
                    <mtd>
                      <mn>1</mn>
                    </mtd>
                  </mtr>
                </mtable>
              </mrow>
              <mo fence="true" stretchy="true">)</mo>
            </mrow>
          </mrow>
        </mtd>
      </mtr>
    </mtable>
    <annotation encoding="StarMath 5.0">M_{ NED_2  toward NED1  }=R_z( %pi-%gamma_2 ).R_y( -%theta ).R_z( %gamma_1 )=~
newline 
left ( matrix{ cos(%pi-%gamma_2)#-sin(%pi-%gamma_2)#0## sin(%pi-%gamma_2)# cos(%pi-%gamma_2)#0##0#0#1} right).left ( matrix{ cos(-%theta)#0#sin(-%theta)## 0# 1#0##-sin(-%theta)#0#cos(-%theta)} right).left ( matrix{ cos(%gamma_1)#-sin(%gamma_1)#0## sin(%gamma_1)# cos(%gamma_1)#0##0#0#1} right)
</annotation>
  </semantics>
</math>
</file>

<file path=Object 44/content.xml><?xml version="1.0" encoding="utf-8"?>
<math xmlns="http://www.w3.org/1998/Math/MathML" display="block">
  <semantics>
    <msub>
      <mi>M</mi>
      <mrow>
        <msub>
          <mi mathvariant="italic">NED</mi>
          <mn>2</mn>
        </msub>
        <mrow>
          <mi>'</mi>
          <mo stretchy="false">→</mo>
          <mi mathvariant="italic">NED</mi>
        </mrow>
        <mn>1</mn>
      </mrow>
    </msub>
    <annotation encoding="StarMath 5.0">M_{ NED_2'  toward NED1  }</annotation>
  </semantics>
</math>
</file>

<file path=Object 45/content.xml><?xml version="1.0" encoding="utf-8"?>
<math xmlns="http://www.w3.org/1998/Math/MathML" display="block">
  <semantics>
    <mtable>
      <mtr>
        <mtd>
          <mrow>
            <mrow>
              <msub>
                <mi>M</mi>
                <mrow>
                  <msub>
                    <mi mathvariant="italic">NED</mi>
                    <mn>2</mn>
                  </msub>
                  <mrow>
                    <mi>'</mi>
                    <mo stretchy="false">→</mo>
                    <mi mathvariant="italic">NED</mi>
                  </mrow>
                  <mn>1</mn>
                </mrow>
              </msub>
              <mo stretchy="false">=</mo>
              <msub>
                <mi>R</mi>
                <mi>z</mi>
              </msub>
            </mrow>
            <mrow>
              <mo fence="true" stretchy="false">(</mo>
              <mrow>
                <mi>π</mi>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o stretchy="false">−</mo>
                        <mn>1</mn>
                      </mrow>
                    </mtd>
                    <mtd>
                      <mn>0</mn>
                    </mtd>
                    <mtd>
                      <mn>0</mn>
                    </mtd>
                  </mtr>
                  <mtr>
                    <mtd>
                      <mn>0</mn>
                    </mtd>
                    <mtd>
                      <mrow>
                        <mo stretchy="false">−</mo>
                        <mn>1</mn>
                      </mrow>
                    </mtd>
                    <mtd>
                      <mn>0</mn>
                    </mtd>
                  </mtr>
                  <mtr>
                    <mtd>
                      <mn>0</mn>
                    </mtd>
                    <mtd>
                      <mn>0</mn>
                    </mtd>
                    <mtd>
                      <mn>1</mn>
                    </mtd>
                  </mtr>
                </mtable>
              </mrow>
              <mo fence="true" stretchy="true">)</mo>
            </mrow>
            <mn>.</mn>
            <mrow>
              <mo fence="true" stretchy="true">(</mo>
              <mrow>
                <mtable>
                  <mtr>
                    <mtd>
                      <mrow>
                        <mi>cos</mi>
                        <mi>θ</mi>
                      </mrow>
                    </mtd>
                    <mtd>
                      <mn>0</mn>
                    </mtd>
                    <mtd>
                      <mrow>
                        <mrow>
                          <mo stretchy="false">−</mo>
                          <mi>sin</mi>
                        </mrow>
                        <mi>θ</mi>
                      </mrow>
                    </mtd>
                  </mtr>
                  <mtr>
                    <mtd>
                      <mn>0</mn>
                    </mtd>
                    <mtd>
                      <mn>1</mn>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row>
              <mo fence="true" stretchy="true">(</mo>
              <mrow>
                <mtable>
                  <mtr>
                    <mtd>
                      <mrow>
                        <mrow>
                          <mo stretchy="false">−</mo>
                          <mi>cos</mi>
                        </mrow>
                        <mi>θ</mi>
                      </mrow>
                    </mtd>
                    <mtd>
                      <mn>0</mn>
                    </mtd>
                    <mtd>
                      <mrow>
                        <mi>sin</mi>
                        <mi>θ</mi>
                      </mrow>
                    </mtd>
                  </mtr>
                  <mtr>
                    <mtd>
                      <mn>0</mn>
                    </mtd>
                    <mtd>
                      <mrow>
                        <mo stretchy="false">−</mo>
                        <mn>1</mn>
                      </mrow>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td>
      </mtr>
    </mtable>
    <annotation encoding="StarMath 5.0">M_{ NED_2'  toward NED1  }=R_z( %pi ).R_y( -%theta ).R_z( %gamma_1 )=~
newline 
left ( matrix{ -1#0#0## 0# -1#0##0#0#1} right).left ( matrix{ cos%theta#0#-sin%theta## 0# 1#0##sin%theta#0#cos%theta} right).left ( matrix{ cos%gamma_1#-sin%gamma_1#0## sin%gamma_1# cos%gamma_1#0##0#0#1} right)=~
newline
left ( matrix{ -cos%theta#0#sin%theta## 0# -1#0##sin%theta#0#cos%theta} right).left ( matrix{ cos%gamma_1#-sin%gamma_1#0## sin%gamma_1# cos%gamma_1#0##0#0#1} right)=~
newline
left ( matrix{ -cos%gamma_1 .cos%theta#sin%gamma_1 .cos%theta#sin%theta## -sin%gamma_1# -cos%gamma_1#0##cos%gamma_1 .sin%theta#-sin%gamma_1 .sin%theta#1} right)
</annotation>
  </semantics>
</math>
</file>

<file path=Object 46/content.xml><?xml version="1.0" encoding="utf-8"?>
<math xmlns="http://www.w3.org/1998/Math/MathML" display="block">
  <semantics>
    <mtable>
      <mtr>
        <mtd>
          <mrow>
            <mover accent="true">
              <mrow>
                <msub>
                  <mi>V</mi>
                  <mn>2</mn>
                </msub>
                <msub>
                  <mi>M</mi>
                  <mrow>
                    <mn>1</mn>
                    <mi>i</mi>
                  </mrow>
                </msub>
              </mrow>
              <mo stretchy="true">⃗</mo>
            </mover>
            <mo stretchy="false">=</mo>
            <mrow>
              <mover accent="true">
                <mrow>
                  <msub>
                    <mi>V</mi>
                    <mn>2</mn>
                  </msub>
                  <msub>
                    <mi>V</mi>
                    <mn>1</mn>
                  </msub>
                </mrow>
                <mo stretchy="true">⃗</mo>
              </mover>
              <mo stretchy="false">+</mo>
              <mover accent="true">
                <mrow>
                  <msub>
                    <mi>V</mi>
                    <mn>1</mn>
                  </msub>
                  <msub>
                    <mi>M</mi>
                    <mrow>
                      <mn>1</mn>
                      <mi>i</mi>
                    </mrow>
                  </msub>
                </mrow>
                <mo stretchy="true">⃗</mo>
              </mover>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multiscripts>
                <mrow>
                  <mo fence="true" stretchy="true">[</mo>
                  <mrow>
                    <mrow>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n>.</mn>
                      <mrow>
                        <mo fence="true" stretchy="true">(</mo>
                        <mrow>
                          <mtable>
                            <mtr>
                              <mtd>
                                <mrow>
                                  <mi>r</mi>
                                  <mn>.</mn>
                                  <mi>cos</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α</mi>
                                        <mrow>
                                          <mn>1</mn>
                                          <mi>i</mi>
                                        </mrow>
                                      </msub>
                                    </mrow>
                                    <mo fence="true" stretchy="false">)</mo>
                                  </mrow>
                                </mrow>
                              </mtd>
                            </mtr>
                          </mtable>
                        </mrow>
                        <mo fence="true" stretchy="true">)</mo>
                      </mrow>
                    </mrow>
                  </mrow>
                  <mo fence="true" stretchy="true">]</mo>
                </mrow>
                <mprescripts/>
                <mrow>
                  <msub>
                    <mi mathvariant="italic">NED</mi>
                    <mn>2</mn>
                  </msub>
                  <mi>'</mi>
                </mrow>
                <none/>
              </mmultiscripts>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i>r</mi>
            </mrow>
            <mn>.</mn>
            <mrow>
              <mmultiscripts>
                <mrow>
                  <mo fence="true" stretchy="true">(</mo>
                  <mrow>
                    <mtable>
                      <mtr>
                        <mtd>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td>
                      </mtr>
                      <mtr>
                        <mtd>
                          <mrow>
                            <mrow>
                              <mo stretchy="false">−</mo>
                              <mi>cos</mi>
                            </mrow>
                            <msub>
                              <mi>α</mi>
                              <mrow>
                                <mn>1</mn>
                                <mi>i</mi>
                              </mrow>
                            </msub>
                            <mn>.</mn>
                            <mi>sin</mi>
                            <mrow>
                              <mo fence="true" stretchy="false">(</mo>
                              <mrow>
                                <mrow>
                                  <msub>
                                    <mi>γ</mi>
                                    <mn>1</mn>
                                  </msub>
                                  <mo stretchy="false">+</mo>
                                  <msub>
                                    <mi mathvariant="normal">Φ</mi>
                                    <mrow>
                                      <mn>1</mn>
                                      <mi>i</mi>
                                    </mrow>
                                  </msub>
                                </mrow>
                              </mrow>
                              <mo fence="true" stretchy="false">)</mo>
                            </mrow>
                          </mrow>
                        </mtd>
                      </mtr>
                      <mtr>
                        <mtd>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td>
                      </mtr>
                    </mtable>
                  </mrow>
                  <mo fence="true" stretchy="true">)</mo>
                </mrow>
                <mprescripts/>
                <mrow>
                  <msub>
                    <mi mathvariant="italic">NED</mi>
                    <mn>2</mn>
                  </msub>
                  <mi>'</mi>
                </mrow>
                <none/>
              </mmultiscripts>
              <mo stretchy="false">=</mo>
              <mspace/>
            </mrow>
          </mrow>
        </mtd>
      </mtr>
      <mtr>
        <mtd>
          <mmultiscripts>
            <mrow>
              <mo fence="true" stretchy="true">(</mo>
              <mrow>
                <mtable>
                  <mtr>
                    <mtd>
                      <msub>
                        <mi>x</mi>
                        <mrow>
                          <mi>V</mi>
                          <mn>1</mn>
                          <mi>i</mi>
                        </mrow>
                      </msub>
                    </mtd>
                  </mtr>
                  <mtr>
                    <mtd>
                      <msub>
                        <mi>y</mi>
                        <mrow>
                          <mi>V</mi>
                          <mn>1</mn>
                          <mi>i</mi>
                        </mrow>
                      </msub>
                    </mtd>
                  </mtr>
                  <mtr>
                    <mtd>
                      <msub>
                        <mi>z</mi>
                        <mrow>
                          <mi>V</mi>
                          <mn>1</mn>
                          <mi>i</mi>
                        </mrow>
                      </msub>
                    </mtd>
                  </mtr>
                </mtable>
              </mrow>
              <mo fence="true" stretchy="true">)</mo>
            </mrow>
            <mprescripts/>
            <mrow>
              <msub>
                <mi mathvariant="italic">NED</mi>
                <mn>2</mn>
              </msub>
              <mi>'</mi>
            </mrow>
            <none/>
          </mmultiscripts>
        </mtd>
      </mtr>
    </mtable>
    <annotation encoding="StarMath 5.0">widevec{V_2 M_{ 1i }}=widevec{ V_2 V_1 }+widevec{ V_1 M_{ 1i } }=~
newline
left ( stack{ldline widevec {V_1 V_2}  rdline.cos%theta/2 # 0 # ldline widevec {V_1 V_2}  rdline.sin%theta/2}  right )  lsub{NED_2'}+
left[ left ( matrix{ -cos%gamma_1 .cos%theta#sin%gamma_1 .cos%theta#sin%theta## -sin%gamma_1# -cos%gamma_1#0##cos%gamma_1 .sin%theta#-sin%gamma_1 .sin%theta#1} right).left ( stack{r.cos(%PHI_1i).cos(%alpha_1i) # r.sin(%PHI_1i).cos(%alpha_1i) # r.sin(%alpha_1i)}  right ) right ]lsub{NED_2'}
=~newline
left ( stack{ldline widevec {V_1 V_2}  rdline.cos%theta/2 # 0 # ldline widevec {V_1 V_2}  rdline.sin%theta/2}  right )  lsub{NED_2'}+ r. left ( stack{cos%theta . cos%alpha_1i . cos(%gamma_1+%PHI_1i)+sin%theta . sin%alpha_1i # -cos%alpha_1i . sin(%gamma_1+%PHI_1i) # sin%theta . cos%alpha_1i .cos(%gamma_1+%PHI_1i) +sin%alpha_1i}  right )  lsub{NED_2'} 
 =~newline
left ( stack{x_{V1i} # y_{V1i} # z_{V1i}}  right )  lsub{NED_2'} </annotation>
  </semantics>
</math>
</file>

<file path=Object 47/content.xml><?xml version="1.0" encoding="utf-8"?>
<math xmlns="http://www.w3.org/1998/Math/MathML" display="block">
  <semantics>
    <mrow>
      <mi>R</mi>
      <mn>.</mn>
      <mi>sin</mi>
      <msub>
        <mi>α</mi>
        <mrow>
          <mn>2</mn>
          <mi mathvariant="italic">max</mi>
        </mrow>
      </msub>
      <mtext> (respectivement </mtext>
      <mi>R</mi>
      <mn>.</mn>
      <mi>sin</mi>
      <msub>
        <mi>α</mi>
        <mrow>
          <mn>2</mn>
          <mi mathvariant="italic">min</mi>
        </mrow>
      </msub>
      <mtext>)</mtext>
    </mrow>
    <annotation encoding="StarMath 5.0">R.sin%alpha_{ 2max } " (respectivement "R.sin%alpha_{ 2min }")"</annotation>
  </semantics>
</math>
</file>

<file path=Object 48/content.xml><?xml version="1.0" encoding="utf-8"?>
<math xmlns="http://www.w3.org/1998/Math/MathML" display="block">
  <semantics>
    <mtable>
      <mtr>
        <mtd>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Z</mi>
                      </msub>
                    </mrow>
                  </mtd>
                </mtr>
                <mtr>
                  <mtd>
                    <mrow>
                      <mrow>
                        <mn>0</mn>
                        <mo stretchy="false">≤</mo>
                        <msub>
                          <mi>z</mi>
                          <mrow>
                            <mi>V</mi>
                            <mn>1</mn>
                            <mi>i</mi>
                          </mrow>
                        </msub>
                        <mo stretchy="false">≤</mo>
                        <mi>R</mi>
                      </mrow>
                      <mn>.</mn>
                      <mi>sin</mi>
                      <msub>
                        <mi>α</mi>
                        <mi>Z</mi>
                      </msub>
                    </mrow>
                  </mtd>
                </mtr>
              </mtable>
            </mrow>
          </mrow>
        </mtd>
      </mtr>
      <mtr>
        <mtd>
          <mrow>
            <mo stretchy="false">⇒</mo>
            <mrow>
              <mo fence="true" stretchy="true">{</mo>
              <mrow>
                <mtable>
                  <mtr>
                    <mtd>
                      <mtable>
                        <mtr>
                          <mtd>
                            <mn>0</mn>
                          </mtd>
                          <mtd>
                            <mrow>
                              <mspace width="2em"/>
                              <mo stretchy="false">=</mo>
                              <mspace width="2em"/>
                            </mrow>
                          </mtd>
                          <mtd>
                            <mrow>
                              <mo fence="true" stretchy="false">[</mo>
                              <mrow>
                                <mrow>
                                  <msup>
                                    <mi>cos</mi>
                                    <mn>2</mn>
                                  </msup>
                                  <msub>
                                    <mi>α</mi>
                                    <mrow>
                                      <mn>1</mn>
                                      <mi>i</mi>
                                    </mrow>
                                  </msub>
                                  <mn>.</mn>
                                  <msup>
                                    <mi>sin</mi>
                                    <mn>2</mn>
                                  </msup>
                                  <mrow>
                                    <mrow>
                                      <mo fence="true" stretchy="false">(</mo>
                                      <mrow>
                                        <mrow>
                                          <msub>
                                            <mi>γ</mi>
                                            <mn>1</mn>
                                          </msub>
                                          <mo stretchy="false">+</mo>
                                          <msub>
                                            <mi mathvariant="normal">Φ</mi>
                                            <mrow>
                                              <mn>1</mn>
                                              <mi>i</mi>
                                            </mrow>
                                          </msub>
                                        </mrow>
                                      </mrow>
                                      <mo fence="true" stretchy="false">)</mo>
                                    </mrow>
                                    <mo stretchy="false">+</mo>
                                    <msup>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n>2</mn>
                                    </msup>
                                  </mrow>
                                </mrow>
                              </mrow>
                              <mo fence="true" stretchy="false">]</mo>
                            </mrow>
                          </mtd>
                          <mtd>
                            <mrow>
                              <mn>.</mn>
                              <msup>
                                <mi>r</mi>
                                <mn>2</mn>
                              </msup>
                            </mrow>
                          </mtd>
                        </mtr>
                        <mtr>
                          <mtd>
                            <mspace width="2em"/>
                          </mtd>
                          <mtd>
                            <mrow>
                              <mspace width="2em"/>
                              <mo stretchy="false">+</mo>
                              <mspace width="2em"/>
                            </mrow>
                          </mtd>
                          <mtd>
                            <mrow>
                              <mn>2</mn>
                              <mrow>
                                <mo fence="true" stretchy="false">‖</mo>
                                <mrow>
                                  <mover accent="true">
                                    <mrow>
                                      <msub>
                                        <mi>V</mi>
                                        <mn>1</mn>
                                      </msub>
                                      <msub>
                                        <mi>V</mi>
                                        <mn>2</mn>
                                      </msub>
                                    </mrow>
                                    <mo stretchy="true">⃗</mo>
                                  </mover>
                                </mrow>
                                <mo fence="true" stretchy="false">‖</mo>
                              </mrow>
                              <mi>cos</mi>
                              <mfrac>
                                <mi>θ</mi>
                                <mn>2</mn>
                              </mfrac>
                              <mn>.</mn>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row>
                          </mtd>
                          <mtd>
                            <mrow>
                              <mn>.</mn>
                              <mi>r</mi>
                            </mrow>
                          </mtd>
                        </mtr>
                        <mtr>
                          <mtd>
                            <mspace width="2em"/>
                          </mtd>
                          <mtd>
                            <mrow>
                              <mspace width="2em"/>
                              <mo stretchy="false">+</mo>
                              <mspace width="2em"/>
                            </mrow>
                          </mtd>
                          <mtd>
                            <mrow>
                              <mo fence="true" stretchy="false">(</mo>
                              <mrow>
                                <mrow>
                                  <msup>
                                    <mrow>
                                      <mo fence="true" stretchy="false">‖</mo>
                                      <mrow>
                                        <mover accent="true">
                                          <mrow>
                                            <msub>
                                              <mi>V</mi>
                                              <mn>1</mn>
                                            </msub>
                                            <msub>
                                              <mi>V</mi>
                                              <mn>2</mn>
                                            </msub>
                                          </mrow>
                                          <mo stretchy="true">⃗</mo>
                                        </mover>
                                      </mrow>
                                      <mo fence="true" stretchy="false">‖</mo>
                                    </mrow>
                                    <mn>2</mn>
                                  </msup>
                                  <mn>.</mn>
                                  <msup>
                                    <mi>cos</mi>
                                    <mn>2</mn>
                                  </msup>
                                  <mrow>
                                    <mfrac>
                                      <mi>θ</mi>
                                      <mn>2</mn>
                                    </mfrac>
                                    <mo stretchy="false">−</mo>
                                    <msup>
                                      <mi>R</mi>
                                      <mn>2</mn>
                                    </msup>
                                  </mrow>
                                  <mn>.</mn>
                                  <msup>
                                    <mi>cos</mi>
                                    <mn>2</mn>
                                  </msup>
                                  <msub>
                                    <mi>α</mi>
                                    <mi>Z</mi>
                                  </msub>
                                </mrow>
                              </mrow>
                              <mo fence="true" stretchy="false">)</mo>
                            </mrow>
                          </mtd>
                          <mtd>
                            <mspace width="2em"/>
                          </mtd>
                        </mtr>
                      </mtable>
                    </mtd>
                  </mtr>
                  <mtr>
                    <mtd>
                      <mrow>
                        <mn>0</mn>
                        <mo stretchy="false">≤</mo>
                        <mi>r</mi>
                        <mo stretchy="false">≤</mo>
                        <mfrac>
                          <mrow>
                            <mi>R</mi>
                            <mn>.</mn>
                            <mi>sin</mi>
                            <mrow>
                              <msub>
                                <mi>α</mi>
                                <mi>Z</mi>
                              </msub>
                              <mo stretchy="false">−</mo>
                              <mrow>
                                <mo fence="true" stretchy="false">‖</mo>
                                <mrow>
                                  <mover accent="true">
                                    <mrow>
                                      <msub>
                                        <mi>V</mi>
                                        <mn>1</mn>
                                      </msub>
                                      <msub>
                                        <mi>V</mi>
                                        <mn>2</mn>
                                      </msub>
                                    </mrow>
                                    <mo stretchy="true">⃗</mo>
                                  </mover>
                                </mrow>
                                <mo fence="true" stretchy="false">‖</mo>
                              </mrow>
                            </mrow>
                            <mn>.</mn>
                            <mi>sin</mi>
                            <mrow>
                              <mi>θ</mi>
                              <mo stretchy="false">/</mo>
                              <mn>2</mn>
                            </mrow>
                          </mrow>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frac>
                      </mrow>
                    </mtd>
                  </mtr>
                </mtable>
              </mrow>
            </mrow>
          </mrow>
        </mtd>
      </mtr>
    </mtable>
    <annotation encoding="StarMath 5.0">left lbrace stack{x_{V1i}^2+y^2_{V1i}  =  R^2cos^2%alpha_Z # 0&lt;=z_{V1i}&lt;=R.sin%alpha_Z}  right none newline
drarrow left lbrace stack{matrix{0#~=~#[cos^2%alpha_1i . sin^2(%gamma_1+%PHI_1i)+(cos%theta . cos%alpha_1i .cos(%gamma_1+%PHI_1i)+sin%theta .sin%alpha_1i)^2]#.r^2##~#~+~# 2ldline widevec {V_1 V_2}  rdline cos%theta over 2 .(cos%theta .cos%alpha_1i .cos(%gamma_1+%PHI_1i)+sin%theta .sin%alpha_1i)#.r##~#~+~#(ldline widevec {V_1 V_2}  rdline^2 .cos^2%theta over 2 -R^2 .cos^2%alpha_Z)#~} # 0&lt;=r&lt;={R.sin%alpha_Z -ldline widevec {V_1 V_2}  rdline.sin%theta/2}over{sin%theta . cos%alpha_1i .cos(%gamma_1+%PHI_1i) +sin%alpha_1i}}  right none </annotation>
  </semantics>
</math>
</file>

<file path=Object 49/content.xml><?xml version="1.0" encoding="utf-8"?>
<math xmlns="http://www.w3.org/1998/Math/MathML" display="block">
  <semantics>
    <mrow>
      <mn>2.</mn>
      <mi>R</mi>
      <mn>.</mn>
      <mi>sin</mi>
      <msub>
        <mi>α</mi>
        <mrow>
          <mn>1</mn>
          <mi mathvariant="italic">ou</mi>
          <mn>2</mn>
          <mi>Z</mi>
        </mrow>
      </msub>
    </mrow>
    <annotation encoding="StarMath 5.0">2.R.sin%alpha_{ 1ou2Z } </annotation>
  </semantics>
</math>
</file>

<file path=Object 5/content.xml><?xml version="1.0" encoding="utf-8"?>
<math xmlns="http://www.w3.org/1998/Math/MathML" display="block">
  <semantics>
    <mrow>
      <mo stretchy="false">∃</mo>
      <mrow>
        <mrow>
          <mo fence="true" stretchy="false">(</mo>
          <mrow>
            <mrow>
              <mi mathvariant="normal">Φ</mi>
              <mi>,</mi>
              <mi>r</mi>
            </mrow>
          </mrow>
          <mo fence="true" stretchy="false">)</mo>
        </mrow>
        <mo stretchy="false">∈</mo>
        <mo stretchy="false">(</mo>
      </mrow>
      <mo stretchy="false">[</mo>
      <mn>0,2</mn>
      <mi>π</mi>
      <mo stretchy="false">[</mo>
      <mi>,</mi>
      <mo stretchy="false">[</mo>
      <mn>0</mn>
      <mi>,</mi>
      <mi>R</mi>
      <mo stretchy="false">]</mo>
      <mo stretchy="false">)</mo>
      <mtext>/</mtext>
      <mrow>
        <msub>
          <mi>M</mi>
          <mn>1</mn>
        </msub>
        <mo stretchy="false">=</mo>
        <mmultiscripts>
          <mrow>
            <mo fence="true" stretchy="true">(</mo>
            <mrow>
              <mtable>
                <mtr>
                  <mtd>
                    <mrow>
                      <mi>r</mi>
                      <mn>.</mn>
                      <mi>cos</mi>
                      <mi mathvariant="normal">Φ</mi>
                      <mn>.</mn>
                      <mi>cos</mi>
                      <mi>α</mi>
                    </mrow>
                  </mtd>
                </mtr>
                <mtr>
                  <mtd>
                    <mrow>
                      <mi>r</mi>
                      <mn>.</mn>
                      <mi>sin</mi>
                      <mi mathvariant="normal">Φ</mi>
                      <mn>.</mn>
                      <mi>cos</mi>
                      <mi>α</mi>
                    </mrow>
                  </mtd>
                </mtr>
                <mtr>
                  <mtd>
                    <mrow>
                      <mi>r</mi>
                      <mn>.</mn>
                      <mi>sin</mi>
                      <mi>α</mi>
                    </mrow>
                  </mtd>
                </mtr>
              </mtable>
            </mrow>
            <mo fence="true" stretchy="true">)</mo>
          </mrow>
          <mprescripts/>
          <msub>
            <mi mathvariant="italic">NED</mi>
            <mn>1</mn>
          </msub>
          <none/>
        </mmultiscripts>
      </mrow>
    </mrow>
    <annotation encoding="StarMath 5.0">exists  (%PHI,r) in \( \[0,2%pi\[, \[0,R\]  \) "/" M_1= left ( stack{r.cos%PHI .cos%alpha # r.sin%PHI .cos%alpha # r.sin%alpha}  right )  lsub{NED_1} </annotation>
  </semantics>
</math>
</file>

<file path=Object 50/content.xml><?xml version="1.0" encoding="utf-8"?>
<math xmlns="http://www.w3.org/1998/Math/MathML" display="block">
  <semantics>
    <mover accent="true">
      <mi>A</mi>
      <mo stretchy="true">⃗</mo>
    </mover>
    <annotation encoding="StarMath 5.0">widevec {A} </annotation>
  </semantics>
</math>
</file>

<file path=Object 51/content.xml><?xml version="1.0" encoding="utf-8"?>
<math xmlns="http://www.w3.org/1998/Math/MathML" display="block">
  <semantics>
    <mfrac>
      <mover accent="true">
        <msub>
          <mi mathvariant="italic">CV</mi>
          <mn>1</mn>
        </msub>
        <mo stretchy="true">⃗</mo>
      </mover>
      <mrow>
        <mo fence="true" stretchy="false">‖</mo>
        <mrow>
          <mover accent="true">
            <msub>
              <mi mathvariant="italic">CV</mi>
              <mn>1</mn>
            </msub>
            <mo stretchy="true">⃗</mo>
          </mover>
        </mrow>
        <mo fence="true" stretchy="false">‖</mo>
      </mrow>
    </mfrac>
    <annotation encoding="StarMath 5.0">widevec{ CV_1 }over { ldline widevec{ CV_1 } rdline  }</annotation>
  </semantics>
</math>
</file>

<file path=Object 52/content.xml><?xml version="1.0" encoding="utf-8"?>
<math xmlns="http://www.w3.org/1998/Math/MathML" display="block">
  <semantics>
    <mover accent="true">
      <mi>B</mi>
      <mo stretchy="true">⃗</mo>
    </mover>
    <annotation encoding="StarMath 5.0">widevec {B} </annotation>
  </semantics>
</math>
</file>

<file path=Object 53/content.xml><?xml version="1.0" encoding="utf-8"?>
<math xmlns="http://www.w3.org/1998/Math/MathML" display="block">
  <semantics>
    <mrow>
      <mo fence="true" stretchy="false">(</mo>
      <mrow>
        <mrow>
          <mi>C</mi>
          <mi>,</mi>
          <mover accent="true">
            <mi>A</mi>
            <mo stretchy="true">⃗</mo>
          </mover>
          <mi>,</mi>
          <mover accent="true">
            <mi>B</mi>
            <mo stretchy="true">⃗</mo>
          </mover>
        </mrow>
      </mrow>
      <mo fence="true" stretchy="false">)</mo>
    </mrow>
    <annotation encoding="StarMath 5.0">( C,widevec A,widevec B )</annotation>
  </semantics>
</math>
</file>

<file path=Object 54/content.xml><?xml version="1.0" encoding="utf-8"?>
<math xmlns="http://www.w3.org/1998/Math/MathML" display="block">
  <semantics>
    <mrow>
      <mover accent="true">
        <mi mathvariant="italic">OD</mi>
        <mo stretchy="true">⃗</mo>
      </mover>
      <mrow>
        <mo fence="true" stretchy="true">{</mo>
        <mrow>
          <mtable>
            <mtr>
              <mtd>
                <mi>R</mi>
              </mtd>
            </mtr>
            <mtr>
              <mtd>
                <mrow>
                  <mi>R</mi>
                  <mn>.</mn>
                  <mi>cos</mi>
                  <msub>
                    <mi>α</mi>
                    <mrow>
                      <mn>1</mn>
                      <mi mathvariant="italic">max</mi>
                    </mrow>
                  </msub>
                </mrow>
              </mtd>
            </mtr>
          </mtable>
        </mrow>
      </mrow>
    </mrow>
    <annotation encoding="StarMath 5.0">widevec OD left lbrace  stack{R #R.cos%alpha_{ 1max } } right none </annotation>
  </semantics>
</math>
</file>

<file path=Object 55/content.xml><?xml version="1.0" encoding="utf-8"?>
<math xmlns="http://www.w3.org/1998/Math/MathML" display="block">
  <semantics>
    <mrow>
      <mover accent="true">
        <mi mathvariant="italic">OE</mi>
        <mo stretchy="true">⃗</mo>
      </mover>
      <mrow>
        <mo fence="true" stretchy="true">{</mo>
        <mrow>
          <mtable>
            <mtr>
              <mtd>
                <mi>R</mi>
              </mtd>
            </mtr>
            <mtr>
              <mtd>
                <mrow>
                  <mrow>
                    <mo stretchy="false">−</mo>
                    <mi>R</mi>
                  </mrow>
                  <mn>.</mn>
                  <mi>cos</mi>
                  <msub>
                    <mi>α</mi>
                    <mrow>
                      <mn>1</mn>
                      <mi mathvariant="italic">max</mi>
                    </mrow>
                  </msub>
                </mrow>
              </mtd>
            </mtr>
          </mtable>
        </mrow>
      </mrow>
    </mrow>
    <annotation encoding="StarMath 5.0">widevec OE left lbrace  stack{R #-R.cos%alpha_{ 1max } } right none </annotation>
  </semantics>
</math>
</file>

<file path=Object 56/content.xml><?xml version="1.0" encoding="utf-8"?>
<math xmlns="http://www.w3.org/1998/Math/MathML" display="block">
  <semantics>
    <mrow>
      <mover accent="true">
        <mi mathvariant="italic">OG</mi>
        <mo stretchy="true">⃗</mo>
      </mover>
      <mrow>
        <mo fence="true" stretchy="true">{</mo>
        <mrow>
          <mtable>
            <mtr>
              <mtd>
                <mrow>
                  <mrow>
                    <mi>R</mi>
                    <mo stretchy="false">−</mo>
                    <mi>R</mi>
                  </mrow>
                  <mn>.</mn>
                  <mi>sin</mi>
                  <msub>
                    <mi>α</mi>
                    <mrow>
                      <mn>1</mn>
                      <mi mathvariant="italic">min</mi>
                    </mrow>
                  </msub>
                </mrow>
              </mtd>
            </mtr>
            <mtr>
              <mtd>
                <mrow>
                  <mrow>
                    <mo stretchy="false">−</mo>
                    <mi>R</mi>
                  </mrow>
                  <mn>.</mn>
                  <mi>cos</mi>
                  <msub>
                    <mi>α</mi>
                    <mrow>
                      <mn>1</mn>
                      <mi mathvariant="italic">max</mi>
                    </mrow>
                  </msub>
                </mrow>
              </mtd>
            </mtr>
          </mtable>
        </mrow>
      </mrow>
    </mrow>
    <annotation encoding="StarMath 5.0">widevec OG left lbrace  stack{R-R.sin%alpha_{ 1min } #-R.cos%alpha_{ 1max } } right none </annotation>
  </semantics>
</math>
</file>

<file path=Object 57/content.xml><?xml version="1.0" encoding="utf-8"?>
<math xmlns="http://www.w3.org/1998/Math/MathML" display="block">
  <semantics>
    <mrow>
      <mover accent="true">
        <mi mathvariant="italic">OF</mi>
        <mo stretchy="true">⃗</mo>
      </mover>
      <mrow>
        <mo fence="true" stretchy="true">{</mo>
        <mrow>
          <mtable>
            <mtr>
              <mtd>
                <mrow>
                  <mrow>
                    <mi>R</mi>
                    <mo stretchy="false">−</mo>
                    <mi>R</mi>
                  </mrow>
                  <mn>.</mn>
                  <mi>sin</mi>
                  <msub>
                    <mi>α</mi>
                    <mrow>
                      <mn>1</mn>
                      <mi mathvariant="italic">min</mi>
                    </mrow>
                  </msub>
                </mrow>
              </mtd>
            </mtr>
            <mtr>
              <mtd>
                <mrow>
                  <mi>R</mi>
                  <mn>.</mn>
                  <mi>cos</mi>
                  <msub>
                    <mi>α</mi>
                    <mrow>
                      <mn>1</mn>
                      <mi mathvariant="italic">max</mi>
                    </mrow>
                  </msub>
                </mrow>
              </mtd>
            </mtr>
          </mtable>
        </mrow>
      </mrow>
    </mrow>
    <annotation encoding="StarMath 5.0">widevec OF left lbrace  stack{R-R.sin%alpha_{ 1min } #R.cos%alpha_{ 1max } } right none </annotation>
  </semantics>
</math>
</file>

<file path=Object 58/content.xml><?xml version="1.0" encoding="utf-8"?>
<math xmlns="http://www.w3.org/1998/Math/MathML" display="block">
  <semantics>
    <mrow>
      <mover accent="true">
        <mi mathvariant="italic">OF</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row>
                    <mrow>
                      <mi>R</mi>
                      <mo stretchy="false">−</mo>
                      <mi>R</mi>
                    </mrow>
                    <mn>.</mn>
                    <mi>sin</mi>
                    <msub>
                      <mi>α</mi>
                      <mrow>
                        <mn>1</mn>
                        <mi mathvariant="italic">max</mi>
                      </mrow>
                    </msub>
                  </mrow>
                </mtd>
              </mtr>
              <mtr>
                <mtd>
                  <mrow>
                    <mi>R</mi>
                    <mn>.</mn>
                    <mi>cos</mi>
                    <msub>
                      <mi>α</mi>
                      <mrow>
                        <mn>1</mn>
                        <mi mathvariant="italic">min</mi>
                      </mrow>
                    </msub>
                  </mrow>
                </mtd>
              </mtr>
            </mtable>
          </mrow>
          <mo fence="true" stretchy="true">)</mo>
        </mrow>
        <mo stretchy="false">=</mo>
        <mi>R</mi>
      </mrow>
      <mn>.</mn>
      <mrow>
        <mo fence="true" stretchy="true">(</mo>
        <mrow>
          <mtable>
            <mtr>
              <mtd>
                <mrow>
                  <mi>cos</mi>
                  <mi>θ</mi>
                  <mn>.</mn>
                  <mrow>
                    <mrow>
                      <mo fence="true" stretchy="false">(</mo>
                      <mrow>
                        <mrow>
                          <mrow>
                            <mn>1</mn>
                            <mo stretchy="false">−</mo>
                            <mi>sin</mi>
                          </mrow>
                          <msub>
                            <mi>α</mi>
                            <mrow>
                              <mn>1</mn>
                              <mi mathvariant="italic">min</mi>
                            </mrow>
                          </msub>
                        </mrow>
                      </mrow>
                      <mo fence="true" stretchy="false">)</mo>
                    </mrow>
                    <mo stretchy="false">−</mo>
                    <mi>sin</mi>
                  </mrow>
                  <mi>θ</mi>
                  <mn>.</mn>
                  <mi>cos</mi>
                  <msub>
                    <mi>α</mi>
                    <mrow>
                      <mn>1</mn>
                      <mi mathvariant="italic">max</mi>
                    </mrow>
                  </msub>
                </mrow>
              </mtd>
            </mtr>
            <mtr>
              <mtd>
                <mrow>
                  <mi>sin</mi>
                  <mi>θ</mi>
                  <mn>.</mn>
                  <mrow>
                    <mrow>
                      <mo fence="true" stretchy="false">(</mo>
                      <mrow>
                        <mrow>
                          <mrow>
                            <mn>1</mn>
                            <mo stretchy="false">−</mo>
                            <mi>sin</mi>
                          </mrow>
                          <msub>
                            <mi>α</mi>
                            <mrow>
                              <mn>1</mn>
                              <mi mathvariant="italic">min</mi>
                            </mrow>
                          </msub>
                        </mrow>
                      </mrow>
                      <mo fence="true" stretchy="false">)</mo>
                    </mrow>
                    <mo stretchy="false">+</mo>
                    <mi>cos</mi>
                  </mrow>
                  <mi>θ</mi>
                  <mn>.</mn>
                  <mi>cos</mi>
                  <msub>
                    <mi>α</mi>
                    <mrow>
                      <mn>1</mn>
                      <mi mathvariant="italic">max</mi>
                    </mrow>
                  </msub>
                </mrow>
              </mtd>
            </mtr>
          </mtable>
        </mrow>
        <mo fence="true" stretchy="true">)</mo>
      </mrow>
    </mrow>
    <annotation encoding="StarMath 5.0">widevec OF' =left ( matrix{ cos%theta#-sin%theta## sin%theta# cos%theta} right) left (  stack{R-R.sin%alpha_{ 1max } #R.cos%alpha_{ 1min } } right ) =R.left (  stack{cos%theta .(1-sin%alpha_1min)-sin%theta .cos%alpha_1max #sin%theta .(1-sin%alpha_1min)+cos%theta .cos%alpha_{ 1max } } right )</annotation>
  </semantics>
</math>
</file>

<file path=Object 59/content.xml><?xml version="1.0" encoding="utf-8"?>
<math xmlns="http://www.w3.org/1998/Math/MathML" display="block">
  <semantics>
    <mrow>
      <mover accent="true">
        <mi mathvariant="italic">OD</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i>R</mi>
                </mtd>
              </mtr>
              <mtr>
                <mtd>
                  <mrow>
                    <mi>R</mi>
                    <mn>.</mn>
                    <mi>cos</mi>
                    <msub>
                      <mi>α</mi>
                      <mrow>
                        <mn>1</mn>
                        <mi mathvariant="italic">max</mi>
                      </mrow>
                    </msub>
                  </mrow>
                </mtd>
              </mtr>
            </mtable>
          </mrow>
          <mo fence="true" stretchy="true">)</mo>
        </mrow>
        <mo stretchy="false">=</mo>
        <mi>R</mi>
      </mrow>
      <mn>.</mn>
      <mrow>
        <mo fence="true" stretchy="true">(</mo>
        <mrow>
          <mtable>
            <mtr>
              <mtd>
                <mrow>
                  <mi>cos</mi>
                  <mrow>
                    <mi>θ</mi>
                    <mo stretchy="false">−</mo>
                    <mi>sin</mi>
                  </mrow>
                  <mi>θ</mi>
                  <mn>.</mn>
                  <mi>cos</mi>
                  <msub>
                    <mi>α</mi>
                    <mrow>
                      <mn>1</mn>
                      <mi mathvariant="italic">max</mi>
                    </mrow>
                  </msub>
                </mrow>
              </mtd>
            </mtr>
            <mtr>
              <mtd>
                <mrow>
                  <mi>sin</mi>
                  <mrow>
                    <mi>θ</mi>
                    <mo stretchy="false">+</mo>
                    <mi>cos</mi>
                  </mrow>
                  <mi>θ</mi>
                  <mn>.</mn>
                  <mi>cos</mi>
                  <msub>
                    <mi>α</mi>
                    <mrow>
                      <mn>1</mn>
                      <mi mathvariant="italic">max</mi>
                    </mrow>
                  </msub>
                </mrow>
              </mtd>
            </mtr>
          </mtable>
        </mrow>
        <mo fence="true" stretchy="true">)</mo>
      </mrow>
    </mrow>
    <annotation encoding="StarMath 5.0">widevec OD'=left ( matrix{ cos%theta#-sin%theta## sin%theta# cos%theta} right) left (  stack{R #R.cos%alpha_{ 1max } } right ) =R.left (  stack{cos%theta-sin%theta .cos%alpha_1max #sin%theta+cos%theta .cos%alpha_{ 1max } } right )</annotation>
  </semantics>
</math>
</file>

<file path=Object 6/content.xml><?xml version="1.0" encoding="utf-8"?>
<math xmlns="http://www.w3.org/1998/Math/MathML" display="block">
  <semantics>
    <mover accent="true">
      <msub>
        <mi mathvariant="italic">CV</mi>
        <mn>1</mn>
      </msub>
      <mo stretchy="true">⃗</mo>
    </mover>
    <annotation encoding="StarMath 5.0">widevec {CV_1}  </annotation>
  </semantics>
</math>
</file>

<file path=Object 60/content.xml><?xml version="1.0" encoding="utf-8"?>
<math xmlns="http://www.w3.org/1998/Math/MathML" display="block">
  <semantics>
    <mrow>
      <mover accent="true">
        <mi mathvariant="italic">OE</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i>R</mi>
                </mtd>
              </mtr>
              <mtr>
                <mtd>
                  <mrow>
                    <mrow>
                      <mo stretchy="false">−</mo>
                      <mi>R</mi>
                    </mrow>
                    <mn>.</mn>
                    <mi>cos</mi>
                    <msub>
                      <mi>α</mi>
                      <mrow>
                        <mn>1</mn>
                        <mi mathvariant="italic">max</mi>
                      </mrow>
                    </msub>
                  </mrow>
                </mtd>
              </mtr>
            </mtable>
          </mrow>
          <mo fence="true" stretchy="true">)</mo>
        </mrow>
        <mo stretchy="false">=</mo>
        <mi>R</mi>
      </mrow>
      <mn>.</mn>
      <mrow>
        <mo fence="true" stretchy="true">(</mo>
        <mrow>
          <mtable>
            <mtr>
              <mtd>
                <mrow>
                  <mi>cos</mi>
                  <mrow>
                    <mi>θ</mi>
                    <mo stretchy="false">+</mo>
                    <mi>sin</mi>
                  </mrow>
                  <mi>θ</mi>
                  <mn>.</mn>
                  <mi>cos</mi>
                  <msub>
                    <mi>α</mi>
                    <mrow>
                      <mn>1</mn>
                      <mi mathvariant="italic">max</mi>
                    </mrow>
                  </msub>
                </mrow>
              </mtd>
            </mtr>
            <mtr>
              <mtd>
                <mrow>
                  <mi>sin</mi>
                  <mrow>
                    <mi>θ</mi>
                    <mo stretchy="false">−</mo>
                    <mi>cos</mi>
                  </mrow>
                  <mi>θ</mi>
                  <mn>.</mn>
                  <mi>cos</mi>
                  <msub>
                    <mi>α</mi>
                    <mrow>
                      <mn>1</mn>
                      <mi mathvariant="italic">max</mi>
                    </mrow>
                  </msub>
                </mrow>
              </mtd>
            </mtr>
          </mtable>
        </mrow>
        <mo fence="true" stretchy="true">)</mo>
      </mrow>
    </mrow>
    <annotation encoding="StarMath 5.0">widevec OE'  =left ( matrix{ cos%theta#-sin%theta## sin%theta# cos%theta} right) left (  stack{R #-R.cos%alpha_{ 1max } } right ) =R.left (  stack{cos%theta+sin%theta .cos%alpha_1max #sin%theta-cos%theta .cos%alpha_{ 1max } } right )</annotation>
  </semantics>
</math>
</file>

<file path=Object 61/content.xml><?xml version="1.0" encoding="utf-8"?>
<math xmlns="http://www.w3.org/1998/Math/MathML" display="block">
  <semantics>
    <mrow>
      <mover accent="true">
        <mi mathvariant="italic">OG</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row>
                    <mrow>
                      <mi>R</mi>
                      <mo stretchy="false">−</mo>
                      <mi>R</mi>
                    </mrow>
                    <mn>.</mn>
                    <mi>sin</mi>
                    <msub>
                      <mi>α</mi>
                      <mrow>
                        <mn>1</mn>
                        <mi mathvariant="italic">min</mi>
                      </mrow>
                    </msub>
                  </mrow>
                </mtd>
              </mtr>
              <mtr>
                <mtd>
                  <mrow>
                    <mrow>
                      <mo stretchy="false">−</mo>
                      <mi>R</mi>
                    </mrow>
                    <mn>.</mn>
                    <mi>cos</mi>
                    <msub>
                      <mi>α</mi>
                      <mrow>
                        <mn>1</mn>
                        <mi mathvariant="italic">max</mi>
                      </mrow>
                    </msub>
                  </mrow>
                </mtd>
              </mtr>
            </mtable>
          </mrow>
          <mo fence="true" stretchy="true">)</mo>
        </mrow>
        <mo stretchy="false">=</mo>
        <mi>R</mi>
      </mrow>
      <mn>.</mn>
      <mrow>
        <mo fence="true" stretchy="true">(</mo>
        <mrow>
          <mtable>
            <mtr>
              <mtd>
                <mrow>
                  <mi>cos</mi>
                  <mi>θ</mi>
                  <mn>.</mn>
                  <mrow>
                    <mrow>
                      <mo fence="true" stretchy="false">(</mo>
                      <mrow>
                        <mrow>
                          <mrow>
                            <mn>1</mn>
                            <mo stretchy="false">−</mo>
                            <mi>sin</mi>
                          </mrow>
                          <msub>
                            <mi>α</mi>
                            <mrow>
                              <mn>1</mn>
                              <mi mathvariant="italic">min</mi>
                            </mrow>
                          </msub>
                        </mrow>
                      </mrow>
                      <mo fence="true" stretchy="false">)</mo>
                    </mrow>
                    <mo stretchy="false">+</mo>
                    <mi>sin</mi>
                  </mrow>
                  <mi>θ</mi>
                  <mn>.</mn>
                  <mi>cos</mi>
                  <msub>
                    <mi>α</mi>
                    <mrow>
                      <mn>1</mn>
                      <mi mathvariant="italic">max</mi>
                    </mrow>
                  </msub>
                </mrow>
              </mtd>
            </mtr>
            <mtr>
              <mtd>
                <mrow>
                  <mi>sin</mi>
                  <mi>θ</mi>
                  <mn>.</mn>
                  <mrow>
                    <mrow>
                      <mo fence="true" stretchy="false">(</mo>
                      <mrow>
                        <mrow>
                          <mrow>
                            <mn>1</mn>
                            <mo stretchy="false">−</mo>
                            <mi>sin</mi>
                          </mrow>
                          <msub>
                            <mi>α</mi>
                            <mrow>
                              <mn>1</mn>
                              <mi mathvariant="italic">min</mi>
                            </mrow>
                          </msub>
                        </mrow>
                      </mrow>
                      <mo fence="true" stretchy="false">)</mo>
                    </mrow>
                    <mo stretchy="false">−</mo>
                    <mi>cos</mi>
                  </mrow>
                  <mi>θ</mi>
                  <mn>.</mn>
                  <mi>cos</mi>
                  <msub>
                    <mi>α</mi>
                    <mrow>
                      <mn>1</mn>
                      <mi mathvariant="italic">max</mi>
                    </mrow>
                  </msub>
                </mrow>
              </mtd>
            </mtr>
          </mtable>
        </mrow>
        <mo fence="true" stretchy="true">)</mo>
      </mrow>
    </mrow>
    <annotation encoding="StarMath 5.0">widevec OG' =left ( matrix{ cos%theta#-sin%theta## sin%theta# cos%theta} right) left (  stack{R-R.sin%alpha_{ 1min} #-R.cos%alpha_{ 1max } } right ) =R.left (  stack{cos%theta .(1-sin%alpha_1min)+sin%theta .cos%alpha_1max #sin%theta .(1-sin%alpha_1min)-cos%theta .cos%alpha_{ 1max } } right )</annotation>
  </semantics>
</math>
</file>

<file path=Object 62/content.xml><?xml version="1.0" encoding="utf-8"?>
<math xmlns="http://www.w3.org/1998/Math/MathML" display="block">
  <semantics>
    <mrow>
      <mrow>
        <msub>
          <mi>α</mi>
          <mrow>
            <mn>1</mn>
            <mi mathvariant="italic">max</mi>
          </mrow>
        </msub>
        <mo stretchy="false">≈</mo>
        <mn>44</mn>
      </mrow>
      <mi>°</mi>
      <mtext> et </mtext>
      <mrow>
        <msub>
          <mi>α</mi>
          <mrow>
            <mn>1</mn>
            <mi mathvariant="italic">min</mi>
          </mrow>
        </msub>
        <mo stretchy="false">≈</mo>
        <mn>75</mn>
      </mrow>
      <mi>°</mi>
    </mrow>
    <annotation encoding="StarMath 5.0">%alpha_1max  approx 44° " et "  %alpha_1min  approx 75°</annotation>
  </semantics>
</math>
</file>

<file path=Object 63/content.xml><?xml version="1.0" encoding="utf-8"?>
<math xmlns="http://www.w3.org/1998/Math/MathML" display="block">
  <semantics>
    <mrow>
      <mrow>
        <msub>
          <mi>θ</mi>
          <mi mathvariant="italic">separation</mi>
        </msub>
        <mo stretchy="false">≈</mo>
        <mn>174,576</mn>
      </mrow>
      <mi>°</mi>
    </mrow>
    <annotation encoding="StarMath 5.0">%theta_separation approx 174,576°</annotation>
  </semantics>
</math>
</file>

<file path=Object 64/content.xml><?xml version="1.0" encoding="utf-8"?>
<math xmlns="http://www.w3.org/1998/Math/MathML" display="block">
  <semantics>
    <mrow>
      <mi>cos</mi>
      <mi>θ</mi>
      <mn>.</mn>
      <mrow>
        <mrow>
          <mo fence="true" stretchy="false">(</mo>
          <mrow>
            <mrow>
              <mrow>
                <mn>1</mn>
                <mo stretchy="false">−</mo>
                <mi>sin</mi>
              </mrow>
              <msub>
                <mi>α</mi>
                <mrow>
                  <mn>1</mn>
                  <mi mathvariant="italic">min</mi>
                </mrow>
              </msub>
            </mrow>
          </mrow>
          <mo fence="true" stretchy="false">)</mo>
        </mrow>
        <mo stretchy="false">+</mo>
        <mi>sin</mi>
      </mrow>
      <mi>θ</mi>
      <mn>.</mn>
      <mi>cos</mi>
      <mrow>
        <msub>
          <mi>α</mi>
          <mrow>
            <mn>1</mn>
            <mi mathvariant="italic">max</mi>
          </mrow>
        </msub>
        <mo stretchy="false">≥</mo>
        <mrow>
          <mn>1</mn>
          <mo stretchy="false">−</mo>
          <mi>sin</mi>
        </mrow>
      </mrow>
      <msub>
        <mi>α</mi>
        <mrow>
          <mn>1</mn>
          <mi mathvariant="italic">min</mi>
        </mrow>
      </msub>
    </mrow>
    <annotation encoding="StarMath 5.0">cos%theta .(1-sin%alpha_1min)+sin%theta .cos%alpha_1max&gt;=1-sin%alpha_{ 1min }</annotation>
  </semantics>
</math>
</file>

<file path=Object 65/content.xml><?xml version="1.0" encoding="utf-8"?>
<math xmlns="http://www.w3.org/1998/Math/MathML" display="block">
  <semantics>
    <mrow>
      <mtext>avec </mtext>
      <mrow>
        <mi>t</mi>
        <mo stretchy="false">=</mo>
        <mi>tan</mi>
      </mrow>
      <mfrac>
        <mi>θ</mi>
        <mn>2</mn>
      </mfrac>
      <mtext>, </mtext>
      <mi>sin</mi>
      <mrow>
        <mi>θ</mi>
        <mo stretchy="false">=</mo>
        <mfrac>
          <mrow>
            <mn>2.</mn>
            <mi>t</mi>
          </mrow>
          <mrow>
            <mn>1</mn>
            <mo stretchy="false">+</mo>
            <msup>
              <mi>t</mi>
              <mn>2</mn>
            </msup>
          </mrow>
        </mfrac>
      </mrow>
      <mtext> et </mtext>
      <mi>cos</mi>
      <mrow>
        <mi>θ</mi>
        <mo stretchy="false">=</mo>
        <mfrac>
          <mrow>
            <mn>1</mn>
            <mo stretchy="false">−</mo>
            <msup>
              <mi>t</mi>
              <mn>2</mn>
            </msup>
          </mrow>
          <mrow>
            <mn>1</mn>
            <mo stretchy="false">+</mo>
            <msup>
              <mi>t</mi>
              <mn>2</mn>
            </msup>
          </mrow>
        </mfrac>
      </mrow>
    </mrow>
    <annotation encoding="StarMath 5.0">"avec " t= tan%theta over {2}", "sin%theta={ 2.t }over{ 1+t^2 }  " et " cos%theta={ 1-t^2 }over{ 1+t^2 }</annotation>
  </semantics>
</math>
</file>

<file path=Object 66/content.xml><?xml version="1.0" encoding="utf-8"?>
<math xmlns="http://www.w3.org/1998/Math/MathML" display="block">
  <semantics>
    <mrow>
      <mi>tan</mi>
      <mrow>
        <mfrac>
          <mi>θ</mi>
          <mn>2</mn>
        </mfrac>
        <mo stretchy="false">≤</mo>
        <mfrac>
          <mrow>
            <mi>cos</mi>
            <msub>
              <mi>α</mi>
              <mrow>
                <mn>1</mn>
                <mi mathvariant="italic">max</mi>
              </mrow>
            </msub>
          </mrow>
          <mrow>
            <mrow>
              <mn>1</mn>
              <mo stretchy="false">−</mo>
              <mi>sin</mi>
            </mrow>
            <msub>
              <mi>α</mi>
              <mrow>
                <mn>1</mn>
                <mi mathvariant="italic">min</mi>
              </mrow>
            </msub>
          </mrow>
        </mfrac>
      </mrow>
    </mrow>
    <annotation encoding="StarMath 5.0">tan %theta over2 &lt;= {cos%alpha_1max} over{ 1-sin%alpha_1min }</annotation>
  </semantics>
</math>
</file>

<file path=Object 67/content.xml><?xml version="1.0" encoding="utf-8"?>
<math xmlns="http://www.w3.org/1998/Math/MathML" display="block">
  <semantics>
    <mrow>
      <mrow>
        <mi>θ</mi>
        <mo stretchy="false">≥</mo>
        <mn>2.</mn>
      </mrow>
      <mi>arctan</mi>
      <mrow>
        <mo fence="true" stretchy="false">(</mo>
        <mrow>
          <mfrac>
            <mrow>
              <mi>cos</mi>
              <msub>
                <mi>α</mi>
                <mrow>
                  <mn>1</mn>
                  <mi mathvariant="italic">max</mi>
                </mrow>
              </msub>
            </mrow>
            <mrow>
              <mrow>
                <mn>1</mn>
                <mo stretchy="false">−</mo>
                <mi>sin</mi>
              </mrow>
              <msub>
                <mi>α</mi>
                <mrow>
                  <mn>1</mn>
                  <mi mathvariant="italic">min</mi>
                </mrow>
              </msub>
            </mrow>
          </mfrac>
        </mrow>
        <mo fence="true" stretchy="false">)</mo>
      </mrow>
    </mrow>
    <annotation encoding="StarMath 5.0">%theta &gt;=2. arctan( {cos%alpha_1max} over{ 1-sin%alpha_1min })</annotation>
  </semantics>
</math>
</file>

<file path=Object 68/content.xml><?xml version="1.0" encoding="utf-8"?>
<math xmlns="http://www.w3.org/1998/Math/MathML" display="block">
  <semantics>
    <mrow>
      <mrow>
        <mrow>
          <mo fence="true" stretchy="false">(</mo>
          <mrow>
            <mrow>
              <mi>λ</mi>
              <mi>,</mi>
              <mi>ϕ</mi>
            </mrow>
          </mrow>
          <mo fence="true" stretchy="false">)</mo>
        </mrow>
        <mo stretchy="false">∈</mo>
        <mo stretchy="false">[</mo>
      </mrow>
      <mn>0,2.</mn>
      <mi mathvariant="normal">Π</mi>
      <msup>
        <mo stretchy="false">[</mo>
        <mn>2</mn>
      </msup>
    </mrow>
    <annotation encoding="StarMath 5.0">( %lambda,%phi ) in   \[0,2.%PI\[^2  </annotation>
  </semantics>
</math>
</file>

<file path=Object 69/content.xml><?xml version="1.0" encoding="utf-8"?>
<math xmlns="http://www.w3.org/1998/Math/MathML" display="block">
  <semantics>
    <mrow>
      <mi>V</mi>
      <mrow>
        <mo fence="true" stretchy="true">{</mo>
        <mrow>
          <mtable>
            <mtr>
              <mtd>
                <mrow>
                  <mi>R</mi>
                  <mn>.</mn>
                  <mi>cos</mi>
                  <mi>λ</mi>
                  <mn>.</mn>
                  <mi>cos</mi>
                  <mi>ϕ</mi>
                </mrow>
              </mtd>
            </mtr>
            <mtr>
              <mtd>
                <mrow>
                  <mi>R</mi>
                  <mn>.</mn>
                  <mi>sin</mi>
                  <mi>λ</mi>
                  <mn>.</mn>
                  <mi>cos</mi>
                  <mi>ϕ</mi>
                </mrow>
              </mtd>
            </mtr>
            <mtr>
              <mtd>
                <mrow>
                  <mi>R</mi>
                  <mn>.</mn>
                  <mi>sin</mi>
                  <mi>ϕ</mi>
                </mrow>
              </mtd>
            </mtr>
          </mtable>
        </mrow>
      </mrow>
    </mrow>
    <annotation encoding="StarMath 5.0">V  left lbrace stack{R. cos%lambda .cos%phi#R. sin%lambda .cos%phi#R. sin%phi} right none</annotation>
  </semantics>
</math>
</file>

<file path=Object 7/content.xml><?xml version="1.0" encoding="utf-8"?>
<math xmlns="http://www.w3.org/1998/Math/MathML" display="block">
  <semantics>
    <mover accent="true">
      <msub>
        <mi mathvariant="italic">CV</mi>
        <mn>2</mn>
      </msub>
      <mo stretchy="true">⃗</mo>
    </mover>
    <annotation encoding="StarMath 5.0">widevec {CV_2}  </annotation>
  </semantics>
</math>
</file>

<file path=Object 70/content.xml><?xml version="1.0" encoding="utf-8"?>
<math xmlns="http://www.w3.org/1998/Math/MathML" display="block">
  <semantics>
    <mrow>
      <mrow>
        <mo fence="true" stretchy="false">(</mo>
        <mrow>
          <mrow>
            <mi>cos</mi>
            <msub>
              <mi>λ</mi>
              <mn>1</mn>
            </msub>
            <mn>.</mn>
            <mi>cos</mi>
            <mrow>
              <msub>
                <mi>ϕ</mi>
                <mn>1</mn>
              </msub>
              <mo stretchy="false">−</mo>
              <mi>cos</mi>
            </mrow>
            <msub>
              <mi>λ</mi>
              <mn>2</mn>
            </msub>
            <mn>.</mn>
            <mi>cos</mi>
            <msub>
              <mi>ϕ</mi>
              <mn>2</mn>
            </msub>
          </mrow>
        </mrow>
        <mo fence="true" stretchy="false">)</mo>
      </mrow>
      <mn>.</mn>
      <mrow>
        <mi>x</mi>
        <mo stretchy="false">+</mo>
        <mrow>
          <mo fence="true" stretchy="false">(</mo>
          <mrow>
            <mrow>
              <mi>sin</mi>
              <msub>
                <mi>λ</mi>
                <mn>1</mn>
              </msub>
              <mn>.</mn>
              <mi>cos</mi>
              <mrow>
                <msub>
                  <mi>ϕ</mi>
                  <mn>1</mn>
                </msub>
                <mo stretchy="false">−</mo>
                <mi>sin</mi>
              </mrow>
              <msub>
                <mi>λ</mi>
                <mn>2</mn>
              </msub>
              <mn>.</mn>
              <mi>cos</mi>
              <msub>
                <mi>ϕ</mi>
                <mn>2</mn>
              </msub>
            </mrow>
          </mrow>
          <mo fence="true" stretchy="false">)</mo>
        </mrow>
      </mrow>
      <mn>.</mn>
      <mrow>
        <mi>y</mi>
        <mo stretchy="false">+</mo>
        <mrow>
          <mo fence="true" stretchy="false">(</mo>
          <mrow>
            <mrow>
              <mi>sin</mi>
              <mrow>
                <msub>
                  <mi>ϕ</mi>
                  <mn>1</mn>
                </msub>
                <mo stretchy="false">−</mo>
                <mi>sin</mi>
              </mrow>
              <msub>
                <mi>ϕ</mi>
                <mn>2</mn>
              </msub>
            </mrow>
          </mrow>
          <mo fence="true" stretchy="false">)</mo>
        </mrow>
      </mrow>
      <mn>.</mn>
      <mrow>
        <mi>z</mi>
        <mo stretchy="false">=</mo>
        <mn>0</mn>
      </mrow>
    </mrow>
    <annotation encoding="StarMath 5.0">(cos%lambda_1 .cos%phi_1 -cos%lambda_2 .cos%phi_2) .x + (sin%lambda_1 .cos%phi_1 -sin%lambda_2 .cos%phi_2) .y+ (sin%phi_1 -sin%phi_2). z=0</annotation>
  </semantics>
</math>
</file>

<file path=Object 8/content.xml><?xml version="1.0" encoding="utf-8"?>
<math xmlns="http://www.w3.org/1998/Math/MathML" display="block">
  <semantics>
    <mfrac>
      <mrow>
        <mi>π</mi>
        <mo stretchy="false">−</mo>
        <mi>θ</mi>
      </mrow>
      <mn>2</mn>
    </mfrac>
    <annotation encoding="StarMath 5.0">{%pi -  %theta} over {2}</annotation>
  </semantics>
</math>
</file>

<file path=Object 9/content.xml><?xml version="1.0" encoding="utf-8"?>
<math xmlns="http://www.w3.org/1998/Math/MathML" display="block">
  <semantics>
    <mrow>
      <mover accent="true">
        <mi>n</mi>
        <mo stretchy="true">⃗</mo>
      </mover>
      <mo stretchy="false">=</mo>
      <mmultiscripts>
        <mrow>
          <mo fence="true" stretchy="true">(</mo>
          <mrow>
            <mtable>
              <mtr>
                <mtd>
                  <mrow>
                    <mi>cos</mi>
                    <mi>γ</mi>
                    <mn>.</mn>
                    <mi>cos</mi>
                    <mfrac>
                      <mi>θ</mi>
                      <mn>2</mn>
                    </mfrac>
                  </mrow>
                </mtd>
              </mtr>
              <mtr>
                <mtd>
                  <mrow>
                    <mi>sin</mi>
                    <mi>γ</mi>
                    <mn>.</mn>
                    <mi>cos</mi>
                    <mfrac>
                      <mi>θ</mi>
                      <mn>2</mn>
                    </mfrac>
                  </mrow>
                </mtd>
              </mtr>
              <mtr>
                <mtd>
                  <mrow>
                    <mi>sin</mi>
                    <mfrac>
                      <mi>θ</mi>
                      <mn>2</mn>
                    </mfrac>
                  </mrow>
                </mtd>
              </mtr>
            </mtable>
          </mrow>
          <mo fence="true" stretchy="true">)</mo>
        </mrow>
        <mprescripts/>
        <msub>
          <mi mathvariant="italic">NED</mi>
          <mn>1</mn>
        </msub>
        <none/>
      </mmultiscripts>
    </mrow>
    <annotation encoding="StarMath 5.0">widevec {n} = left ( stack{cos%gamma .cos{%theta}over{2} # sin%gamma .cos{%theta}over{2} # sin{%theta}over{2}}  right )  lsub{NED_1} </annotation>
  </semantics>
</math>
</file>