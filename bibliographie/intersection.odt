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setting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Configurations2/" manifest:media-type="application/vnd.sun.xml.ui.configuration"/>
  <manifest:file-entry manifest:full-path="Object 89/" manifest:version="1.3"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3" manifest:media-type="application/vnd.oasis.opendocument.formula"/>
  <manifest:file-entry manifest:full-path="Pictures/100000010000034900000253475BBA0631412D2D.png" manifest:media-type="image/png"/>
  <manifest:file-entry manifest:full-path="Pictures/100112600000741E00005222E4633E133D5ED420.svg" manifest:media-type="image/svg+xml"/>
  <manifest:file-entry manifest:full-path="Pictures/10000019000006A60000036D27B80B99C5691F20.gif" manifest:media-type="image/gif"/>
  <manifest:file-entry manifest:full-path="Pictures/1001334F0000741E000052229360D4B0D24A1E22.svg" manifest:media-type="image/svg+xml"/>
  <manifest:file-entry manifest:full-path="Pictures/1000000100000349000002530F127E05F2AC403D.png" manifest:media-type="image/png"/>
  <manifest:file-entry manifest:full-path="Pictures/10000001000007E3000005F12F21F5C7F9B87144.png" manifest:media-type="image/png"/>
  <manifest:file-entry manifest:full-path="Pictures/10000001000003490000025338F053C57C3F621E.png" manifest:media-type="image/png"/>
  <manifest:file-entry manifest:full-path="Pictures/1000B89F0000741E00005222364137B9190129E4.svg" manifest:media-type="image/svg+xml"/>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styles.xml" manifest:media-type="text/xml"/>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3" manifest:media-type="application/vnd.oasis.opendocument.formula"/>
  <manifest:file-entry manifest:full-path="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3" manifest:media-type="application/vnd.oasis.opendocument.formula"/>
  <manifest:file-entry manifest:full-path="Object 74/content.xml" manifest:media-type="text/xml"/>
  <manifest:file-entry manifest:full-path="Object 74/settings.xml" manifest:media-type="text/xml"/>
  <manifest:file-entry manifest:full-path="Object 74/Configurations2/" manifest:media-type="application/vnd.sun.xml.ui.configuration"/>
  <manifest:file-entry manifest:full-path="Object 74/"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9a016" officeooo:paragraph-rsid="0009a016"/>
    </style:style>
    <style:style style:name="P2" style:family="paragraph" style:parent-style-name="Title">
      <style:text-properties officeooo:rsid="0009a016" officeooo:paragraph-rsid="0009a016"/>
    </style:style>
    <style:style style:name="P3" style:family="paragraph" style:parent-style-name="Text_20_body">
      <style:text-properties officeooo:rsid="0012f99d" officeooo:paragraph-rsid="0012f99d"/>
    </style:style>
    <style:style style:name="P4" style:family="paragraph" style:parent-style-name="Text_20_body">
      <style:paragraph-properties fo:text-align="justify" style:justify-single-word="false"/>
      <style:text-properties officeooo:rsid="0012f99d" officeooo:paragraph-rsid="0012f99d"/>
    </style:style>
    <style:style style:name="P5" style:family="paragraph" style:parent-style-name="Text_20_body">
      <style:paragraph-properties fo:text-align="justify" style:justify-single-word="false"/>
      <style:text-properties officeooo:rsid="000e8384" officeooo:paragraph-rsid="000e8384"/>
    </style:style>
    <style:style style:name="P6" style:family="paragraph" style:parent-style-name="Text_20_body">
      <style:paragraph-properties fo:text-align="justify" style:justify-single-word="false"/>
      <style:text-properties officeooo:rsid="000c4ca2" officeooo:paragraph-rsid="000c4ca2"/>
    </style:style>
    <style:style style:name="P7" style:family="paragraph" style:parent-style-name="Text_20_body">
      <style:paragraph-properties fo:text-align="justify" style:justify-single-word="false"/>
      <style:text-properties officeooo:rsid="000cab3d" officeooo:paragraph-rsid="000cab3d"/>
    </style:style>
    <style:style style:name="P8" style:family="paragraph" style:parent-style-name="Text_20_body">
      <style:text-properties officeooo:rsid="0020383c" officeooo:paragraph-rsid="0020383c"/>
    </style:style>
    <style:style style:name="P9" style:family="paragraph" style:parent-style-name="Text_20_body">
      <style:text-properties officeooo:rsid="0021e861" officeooo:paragraph-rsid="0021e861"/>
    </style:style>
    <style:style style:name="P10" style:family="paragraph" style:parent-style-name="Text_20_body">
      <style:text-properties officeooo:rsid="0032a0a2" officeooo:paragraph-rsid="0032a0a2"/>
    </style:style>
    <style:style style:name="P11" style:family="paragraph" style:parent-style-name="Text_20_body">
      <style:text-properties officeooo:paragraph-rsid="00349898"/>
    </style:style>
    <style:style style:name="P12" style:family="paragraph" style:parent-style-name="Text_20_body">
      <style:text-properties officeooo:paragraph-rsid="00360bff"/>
    </style:style>
    <style:style style:name="P13" style:family="paragraph" style:parent-style-name="Text_20_body">
      <style:text-properties officeooo:paragraph-rsid="003a75db"/>
    </style:style>
    <style:style style:name="P14" style:family="paragraph" style:parent-style-name="Text_20_body">
      <style:text-properties officeooo:rsid="003c6589" officeooo:paragraph-rsid="003c6589"/>
    </style:style>
    <style:style style:name="P15" style:family="paragraph" style:parent-style-name="Text_20_body">
      <style:text-properties officeooo:rsid="003dddec" officeooo:paragraph-rsid="003dddec"/>
    </style:style>
    <style:style style:name="P16" style:family="paragraph" style:parent-style-name="Text_20_body">
      <style:text-properties style:text-position="0% 100%" fo:font-style="normal" officeooo:rsid="003dddec" officeooo:paragraph-rsid="003dddec" style:font-style-asian="normal" style:font-style-complex="normal"/>
    </style:style>
    <style:style style:name="P17" style:family="paragraph" style:parent-style-name="Text_20_body">
      <style:text-properties style:text-position="0% 100%" fo:font-style="normal" officeooo:rsid="00427fa3" officeooo:paragraph-rsid="00427fa3" style:font-style-asian="normal" style:font-style-complex="normal"/>
    </style:style>
    <style:style style:name="P18" style:family="paragraph" style:parent-style-name="Text_20_body">
      <style:text-properties style:text-position="0% 100%" fo:font-style="normal" officeooo:rsid="00429960" officeooo:paragraph-rsid="00429960" style:font-style-asian="normal" style:font-style-complex="normal"/>
    </style:style>
    <style:style style:name="P19" style:family="paragraph" style:parent-style-name="Text_20_body">
      <style:text-properties style:text-position="0% 100%" fo:font-style="normal" officeooo:rsid="0047c41c" officeooo:paragraph-rsid="0047c41c" style:font-style-asian="normal" style:font-style-complex="normal"/>
    </style:style>
    <style:style style:name="P20" style:family="paragraph" style:parent-style-name="Text_20_body">
      <style:text-properties style:text-position="0% 100%" fo:font-style="normal" officeooo:rsid="004b5168" officeooo:paragraph-rsid="004b5168" style:font-style-asian="normal" style:font-style-complex="normal"/>
    </style:style>
    <style:style style:name="P21" style:family="paragraph" style:parent-style-name="Text_20_body">
      <style:paragraph-properties fo:padding="0.049cm" fo:border="0.99pt solid #ff3333"/>
      <style:text-properties style:text-position="0% 100%" fo:font-style="normal" officeooo:rsid="003c6589" officeooo:paragraph-rsid="003c6589" style:font-style-asian="normal" style:font-style-complex="normal"/>
    </style:style>
    <style:style style:name="P22" style:family="paragraph" style:parent-style-name="Text_20_body">
      <style:text-properties style:text-position="0% 100%" style:font-name="Liberation Serif" fo:font-style="normal" officeooo:rsid="004f011f" officeooo:paragraph-rsid="004f011f" style:font-style-asian="normal" style:font-style-complex="normal"/>
    </style:style>
    <style:style style:name="P23" style:family="paragraph" style:parent-style-name="Text_20_body">
      <style:text-properties style:text-position="0% 100%" style:font-name="Liberation Serif" fo:font-style="normal" officeooo:rsid="00559067" officeooo:paragraph-rsid="00559067" style:font-style-asian="normal" style:font-style-complex="normal"/>
    </style:style>
    <style:style style:name="P24" style:family="paragraph" style:parent-style-name="Text_20_body">
      <style:text-properties style:text-position="0% 100%" style:font-name="Liberation Serif" fo:font-style="normal" officeooo:rsid="004ccff4" officeooo:paragraph-rsid="004b5168" style:font-style-asian="normal" style:font-style-complex="normal"/>
    </style:style>
    <style:style style:name="P25" style:family="paragraph" style:parent-style-name="Text_20_body">
      <style:text-properties style:text-position="0% 100%" officeooo:rsid="0090ecd7" officeooo:paragraph-rsid="0090ecd7"/>
    </style:style>
    <style:style style:name="P26" style:family="paragraph" style:parent-style-name="Text_20_body">
      <style:text-properties style:text-position="0% 100%" officeooo:rsid="00b1557e" officeooo:paragraph-rsid="00b1557e"/>
    </style:style>
    <style:style style:name="P27" style:family="paragraph" style:parent-style-name="Text_20_body">
      <style:text-properties style:text-position="0% 100%" officeooo:rsid="00a3df36" officeooo:paragraph-rsid="00c1d98e"/>
    </style:style>
    <style:style style:name="P28" style:family="paragraph" style:parent-style-name="Text_20_body">
      <style:text-properties style:text-position="0% 100%" officeooo:rsid="0089f18f" officeooo:paragraph-rsid="00a1edcc"/>
    </style:style>
    <style:style style:name="P29" style:family="paragraph" style:parent-style-name="Text_20_body">
      <style:text-properties style:text-position="0% 100%" officeooo:rsid="00e43c32" officeooo:paragraph-rsid="00e43c32"/>
    </style:style>
    <style:style style:name="P30" style:family="paragraph" style:parent-style-name="Text_20_body">
      <style:text-properties style:text-position="0% 100%" officeooo:rsid="00ee4b3b" officeooo:paragraph-rsid="00ee4b3b"/>
    </style:style>
    <style:style style:name="P31" style:family="paragraph" style:parent-style-name="Text_20_body">
      <style:text-properties style:text-position="0% 100%" officeooo:rsid="015aadb7" officeooo:paragraph-rsid="015a31eb"/>
    </style:style>
    <style:style style:name="P32" style:family="paragraph" style:parent-style-name="Text_20_body">
      <style:text-properties style:text-position="0% 100%" officeooo:rsid="015bd3ff" officeooo:paragraph-rsid="015aaf11"/>
    </style:style>
    <style:style style:name="P33" style:family="paragraph" style:parent-style-name="Text_20_body">
      <style:text-properties style:text-position="0% 100%" officeooo:rsid="015e8940" officeooo:paragraph-rsid="015aaf11"/>
    </style:style>
    <style:style style:name="P34" style:family="paragraph" style:parent-style-name="Text_20_body">
      <style:text-properties style:text-position="0% 100%" officeooo:rsid="01784a65" officeooo:paragraph-rsid="01784a65"/>
    </style:style>
    <style:style style:name="P35" style:family="paragraph" style:parent-style-name="Text_20_body">
      <style:text-properties officeooo:paragraph-rsid="004b5168"/>
    </style:style>
    <style:style style:name="P36" style:family="paragraph" style:parent-style-name="Text_20_body">
      <style:text-properties officeooo:rsid="007615d2" officeooo:paragraph-rsid="007615d2"/>
    </style:style>
    <style:style style:name="P37" style:family="paragraph" style:parent-style-name="Text_20_body">
      <style:text-properties officeooo:paragraph-rsid="007ced5f"/>
    </style:style>
    <style:style style:name="P38" style:family="paragraph" style:parent-style-name="Text_20_body">
      <style:text-properties officeooo:paragraph-rsid="0081710c"/>
    </style:style>
    <style:style style:name="P39" style:family="paragraph" style:parent-style-name="Text_20_body">
      <style:text-properties officeooo:rsid="00843460" officeooo:paragraph-rsid="00843460"/>
    </style:style>
    <style:style style:name="P40" style:family="paragraph" style:parent-style-name="Text_20_body">
      <style:text-properties officeooo:paragraph-rsid="00a1edcc"/>
    </style:style>
    <style:style style:name="P41" style:family="paragraph" style:parent-style-name="Text_20_body">
      <style:text-properties officeooo:rsid="00224f17" officeooo:paragraph-rsid="00a777cf"/>
    </style:style>
    <style:style style:name="P42" style:family="paragraph" style:parent-style-name="Text_20_body">
      <style:text-properties officeooo:rsid="00b1557e" officeooo:paragraph-rsid="00b1557e"/>
    </style:style>
    <style:style style:name="P43" style:family="paragraph" style:parent-style-name="Text_20_body">
      <style:text-properties officeooo:paragraph-rsid="00c1d98e"/>
    </style:style>
    <style:style style:name="P44" style:family="paragraph" style:parent-style-name="Text_20_body">
      <style:text-properties officeooo:paragraph-rsid="00f89cec"/>
    </style:style>
    <style:style style:name="P45" style:family="paragraph" style:parent-style-name="Text_20_body">
      <style:text-properties officeooo:paragraph-rsid="0136315c"/>
    </style:style>
    <style:style style:name="P46" style:family="paragraph" style:parent-style-name="Text_20_body">
      <style:text-properties officeooo:rsid="01364a04" officeooo:paragraph-rsid="01364a04"/>
    </style:style>
    <style:style style:name="P47" style:family="paragraph" style:parent-style-name="Text_20_body">
      <style:text-properties officeooo:rsid="0137d6d7" officeooo:paragraph-rsid="0137d6d7"/>
    </style:style>
    <style:style style:name="P48" style:family="paragraph" style:parent-style-name="Text_20_body">
      <style:text-properties officeooo:rsid="0139cb92" officeooo:paragraph-rsid="0139cb92"/>
    </style:style>
    <style:style style:name="P49" style:family="paragraph" style:parent-style-name="Text_20_body">
      <style:text-properties officeooo:paragraph-rsid="00559067"/>
    </style:style>
    <style:style style:name="P50" style:family="paragraph" style:parent-style-name="Figure">
      <style:paragraph-properties fo:text-align="center" style:justify-single-word="false"/>
    </style:style>
    <style:style style:name="P51" style:family="paragraph" style:parent-style-name="Text_20_body">
      <style:paragraph-properties fo:padding="0.049cm" fo:border="0.99pt solid #0000cc"/>
      <style:text-properties officeooo:paragraph-rsid="00aebd94"/>
    </style:style>
    <style:style style:name="P52" style:family="paragraph" style:parent-style-name="Text_20_body" style:master-page-name="">
      <style:paragraph-properties style:page-number="auto" fo:padding="0.049cm" fo:border="1.25pt solid #0000cc"/>
      <style:text-properties officeooo:rsid="0023af20" officeooo:paragraph-rsid="00a777cf"/>
    </style:style>
    <style:style style:name="P53" style:family="paragraph" style:parent-style-name="Text_20_body">
      <style:paragraph-properties fo:padding="0.049cm" fo:border="0.51pt solid #ff3333"/>
      <style:text-properties officeooo:paragraph-rsid="00f93a44"/>
    </style:style>
    <style:style style:name="P54" style:family="paragraph" style:parent-style-name="Text_20_body">
      <style:paragraph-properties fo:padding="0.049cm" fo:border="none"/>
      <style:text-properties officeooo:rsid="0147e7e8" officeooo:paragraph-rsid="0148b426"/>
    </style:style>
    <style:style style:name="P55" style:family="paragraph" style:parent-style-name="Text_20_body">
      <style:text-properties officeooo:rsid="014fc079" officeooo:paragraph-rsid="014fc079"/>
    </style:style>
    <style:style style:name="P56" style:family="paragraph" style:parent-style-name="Text_20_body">
      <style:text-properties officeooo:rsid="014fe182" officeooo:paragraph-rsid="014fe182"/>
    </style:style>
    <style:style style:name="P57" style:family="paragraph" style:parent-style-name="Text_20_body">
      <style:text-properties officeooo:rsid="01598293" officeooo:paragraph-rsid="01598293"/>
    </style:style>
    <style:style style:name="P58" style:family="paragraph" style:parent-style-name="Text_20_body">
      <style:paragraph-properties fo:text-align="justify" style:justify-single-word="false"/>
      <style:text-properties officeooo:rsid="015a31eb" officeooo:paragraph-rsid="015a31eb"/>
    </style:style>
    <style:style style:name="P59" style:family="paragraph" style:parent-style-name="Text_20_body">
      <style:text-properties officeooo:rsid="015aaf11" officeooo:paragraph-rsid="015aaf11"/>
    </style:style>
    <style:style style:name="P60" style:family="paragraph" style:parent-style-name="Text_20_body">
      <loext:graphic-properties draw:fill-gradient-name="gradient" draw:fill-hatch-name="hatch"/>
      <style:paragraph-properties fo:text-align="justify" style:justify-single-word="false" fo:padding="0.049cm" fo:border="none">
        <style:tab-stops/>
      </style:paragraph-properties>
      <style:text-properties officeooo:rsid="015aaf11" officeooo:paragraph-rsid="015aaf11"/>
    </style:style>
    <style:style style:name="P61" style:family="paragraph" style:parent-style-name="Text_20_body">
      <style:text-properties officeooo:rsid="015faeaf" officeooo:paragraph-rsid="015faeaf"/>
    </style:style>
    <style:style style:name="P62" style:family="paragraph" style:parent-style-name="Text_20_body">
      <style:text-properties officeooo:rsid="0161ba17" officeooo:paragraph-rsid="0161ba17"/>
    </style:style>
    <style:style style:name="P63" style:family="paragraph" style:parent-style-name="Text_20_body">
      <loext:graphic-properties draw:fill-gradient-name="gradient" draw:fill-hatch-name="hatch"/>
      <style:paragraph-properties fo:padding="0.049cm" fo:border="none" style:shadow="none"/>
      <style:text-properties officeooo:rsid="0161ba17" officeooo:paragraph-rsid="0161ba17"/>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Text_20_body">
      <style:text-properties officeooo:rsid="01717ae5" officeooo:paragraph-rsid="01717ae5"/>
    </style:style>
    <style:style style:name="P67" style:family="paragraph" style:parent-style-name="Text_20_body">
      <loext:graphic-properties draw:fill-hatch-name="hatch"/>
      <style:paragraph-properties fo:padding="0.049cm" fo:border="1.5pt solid #ff0000" style:shadow="#a9a9a9 0cm 0cm"/>
      <style:text-properties officeooo:rsid="0172e9a6" officeooo:paragraph-rsid="0172e9a6"/>
    </style:style>
    <style:style style:name="P68" style:family="paragraph" style:parent-style-name="Text_20_body">
      <loext:graphic-properties draw:fill="solid" draw:fill-color="#ffc0cb" draw:fill-gradient-name="Gradient_20_4" draw:fill-hatch-name="hatch"/>
      <style:paragraph-properties fo:background-color="#ffc0cb" fo:padding="0.049cm" fo:border="none" style:shadow="none"/>
      <style:text-properties officeooo:rsid="017d4746" officeooo:paragraph-rsid="017e7ed0"/>
    </style:style>
    <style:style style:name="P69" style:family="paragraph" style:parent-style-name="Text_20_body">
      <loext:graphic-properties draw:fill="solid" draw:fill-color="#ffc0cb" draw:fill-gradient-name="Gradient_20_4" draw:fill-hatch-name="hatch"/>
      <style:paragraph-properties fo:background-color="#ffc0cb" fo:padding="0.049cm" fo:border="none" style:shadow="none"/>
      <style:text-properties officeooo:rsid="0180164f" officeooo:paragraph-rsid="0180164f"/>
    </style:style>
    <style:style style:name="P70" style:family="paragraph" style:parent-style-name="Text_20_body">
      <style:text-properties officeooo:paragraph-rsid="014fc079"/>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Heading_20_1">
      <style:paragraph-properties fo:break-before="page"/>
    </style:style>
    <style:style style:name="P75" style:family="paragraph" style:parent-style-name="Heading_20_2">
      <style:text-properties officeooo:rsid="00d8f01b" officeooo:paragraph-rsid="00d8f01b"/>
    </style:style>
    <style:style style:name="P76" style:family="paragraph" style:parent-style-name="Heading_20_2">
      <style:text-properties officeooo:paragraph-rsid="00da1e31"/>
    </style:style>
    <style:style style:name="P77" style:family="paragraph" style:parent-style-name="Heading_20_3">
      <style:text-properties officeooo:rsid="017bad58" officeooo:paragraph-rsid="017bad58"/>
    </style:style>
    <style:style style:name="P78" style:family="paragraph" style:parent-style-name="Text_20_body" style:list-style-name="L1">
      <style:text-properties officeooo:paragraph-rsid="0062ec9a"/>
    </style:style>
    <style:style style:name="P79" style:family="paragraph" style:parent-style-name="Text_20_body" style:list-style-name="L2">
      <loext:graphic-properties draw:fill-gradient-name="gradient" draw:fill-hatch-name="hatch"/>
      <style:paragraph-properties fo:padding="0.049cm" fo:border="0.74pt solid #ff0000" style:shadow="#808080 0.176cm 0.176cm"/>
      <style:text-properties officeooo:rsid="015faeaf" officeooo:paragraph-rsid="015faeaf"/>
    </style:style>
    <style:style style:name="P80" style:family="paragraph" style:parent-style-name="Text_20_body" style:list-style-name="L3">
      <loext:graphic-properties draw:fill="solid" draw:fill-color="#ffc0cb" draw:fill-gradient-name="Gradient_20_4" draw:fill-hatch-name="hatch"/>
      <style:paragraph-properties fo:background-color="#ffc0cb" fo:padding="0.049cm" fo:border="none" style:shadow="none"/>
      <style:text-properties officeooo:paragraph-rsid="017e7ed0"/>
    </style:style>
    <style:style style:name="P81" style:family="paragraph" style:parent-style-name="Text_20_body" style:list-style-name="L3">
      <loext:graphic-properties draw:fill="solid" draw:fill-color="#ffc0cb" draw:fill-gradient-name="Gradient_20_4" draw:fill-hatch-name="hatch"/>
      <style:paragraph-properties fo:background-color="#ffc0cb" fo:padding="0.049cm" fo:border="none" style:shadow="none"/>
      <style:text-properties officeooo:paragraph-rsid="017e9689"/>
    </style:style>
    <style:style style:name="P82" style:family="paragraph" style:parent-style-name="Text_20_body" style:list-style-name="L3">
      <loext:graphic-properties draw:fill="solid" draw:fill-color="#ffc0cb" draw:fill-gradient-name="Gradient_20_4" draw:fill-hatch-name="hatch"/>
      <style:paragraph-properties fo:background-color="#ffc0cb" fo:padding="0.049cm" fo:border="none" style:shadow="none"/>
      <style:text-properties officeooo:rsid="017e7ed0" officeooo:paragraph-rsid="017e7ed0"/>
    </style:style>
    <style:style style:name="P83" style:family="paragraph" style:parent-style-name="Text_20_body" style:list-style-name="L4">
      <loext:graphic-properties draw:fill="solid" draw:fill-color="#ffc0cb" draw:fill-gradient-name="Gradient_20_4" draw:fill-hatch-name="hatch"/>
      <style:paragraph-properties fo:background-color="#ffc0cb" fo:padding="0.049cm" fo:border="none" style:shadow="none"/>
      <style:text-properties officeooo:rsid="0180164f" officeooo:paragraph-rsid="0180164f"/>
    </style:style>
    <style:style style:name="P84" style:family="paragraph" style:parent-style-name="Text_20_body" style:list-style-name="L5">
      <style:paragraph-properties fo:padding="0.049cm" fo:border="0.51pt solid #ff9900"/>
      <style:text-properties officeooo:paragraph-rsid="0139cb92"/>
    </style:style>
    <style:style style:name="P85" style:family="paragraph" style:parent-style-name="Text_20_body" style:list-style-name="L5">
      <style:paragraph-properties fo:padding="0.049cm" fo:border="0.51pt solid #ff9900"/>
      <style:text-properties officeooo:paragraph-rsid="013dcad0"/>
    </style:style>
    <style:style style:name="P86" style:family="paragraph" style:parent-style-name="Text_20_body" style:list-style-name="L5">
      <style:paragraph-properties fo:padding="0.049cm" fo:border="0.51pt solid #ff9900"/>
      <style:text-properties officeooo:paragraph-rsid="0141aa1c"/>
    </style:style>
    <style:style style:name="P87" style:family="paragraph" style:parent-style-name="Text_20_body" style:list-style-name="L5">
      <style:paragraph-properties fo:padding="0.049cm" fo:border="none"/>
      <style:text-properties style:text-underline-style="solid" style:text-underline-width="auto" style:text-underline-color="font-color" officeooo:rsid="0141aa1c" officeooo:paragraph-rsid="0141aa1c"/>
    </style:style>
    <style:style style:name="P88" style:family="paragraph" style:parent-style-name="Text_20_body" style:list-style-name="L5">
      <style:paragraph-properties fo:padding="0.049cm" fo:border="0.51pt solid #ff9900"/>
      <style:text-properties officeooo:rsid="0139cb92" officeooo:paragraph-rsid="013b245d"/>
    </style:style>
    <style:style style:name="P89" style:family="paragraph" style:parent-style-name="Text_20_body" style:list-style-name="L5">
      <style:paragraph-properties fo:padding="0.049cm" fo:border="0.51pt solid #009900"/>
      <style:text-properties officeooo:rsid="013b245d" officeooo:paragraph-rsid="013b245d"/>
    </style:style>
    <style:style style:name="P90" style:family="paragraph" style:parent-style-name="Text_20_body" style:list-style-name="L5">
      <style:paragraph-properties fo:padding="0.049cm" fo:border="0.51pt solid #009900"/>
      <style:text-properties style:font-name="Liberation Serif1" officeooo:rsid="013b245d" officeooo:paragraph-rsid="013b245d"/>
    </style:style>
    <style:style style:name="P91" style:family="paragraph" style:parent-style-name="Text_20_body" style:list-style-name="L5">
      <style:paragraph-properties fo:padding="0.049cm" fo:border="0.51pt solid #ff9900"/>
      <style:text-properties style:font-name="Liberation Serif1" officeooo:rsid="013dcad0" officeooo:paragraph-rsid="013dcad0"/>
    </style:style>
    <style:style style:name="P92" style:family="paragraph" style:parent-style-name="Text_20_body" style:list-style-name="L5">
      <style:paragraph-properties fo:padding="0.049cm" fo:border="0.51pt solid #ff9900"/>
      <style:text-properties style:font-name="Liberation Serif1" officeooo:rsid="0141aa1c" officeooo:paragraph-rsid="0141aa1c"/>
    </style:style>
    <style:style style:name="P93" style:family="paragraph" style:parent-style-name="Text_20_body" style:list-style-name="L5">
      <style:text-properties officeooo:rsid="0141aa1c" officeooo:paragraph-rsid="0141aa1c"/>
    </style:style>
    <style:style style:name="P94" style:family="paragraph" style:parent-style-name="Text_20_body" style:list-style-name="L5">
      <style:paragraph-properties fo:padding="0.049cm" fo:border="0.51pt solid #009900"/>
      <style:text-properties officeooo:rsid="01456617" officeooo:paragraph-rsid="01456617"/>
    </style:style>
    <style:style style:name="P95" style:family="paragraph" style:parent-style-name="Text_20_body" style:list-style-name="L5">
      <style:paragraph-properties fo:padding="0.049cm" fo:border="0.51pt solid #009900"/>
      <style:text-properties officeooo:rsid="0147e7e8" officeooo:paragraph-rsid="0148b426"/>
    </style:style>
    <style:style style:name="T1" style:family="text">
      <style:text-properties style:font-name="Liberation Sans" fo:font-size="18.2000007629395pt" fo:font-weight="bold" officeooo:rsid="000bb003" style:font-name-asian="Noto Sans CJK SC" style:font-size-asian="18.2000007629395pt" style:font-weight-asian="bold" style:font-name-complex="Lohit Devanagari1" style:font-size-complex="18.2000007629395pt" style:font-weight-complex="bold"/>
    </style:style>
    <style:style style:name="T2" style:family="text">
      <style:text-properties officeooo:rsid="0010024a"/>
    </style:style>
    <style:style style:name="T3" style:family="text">
      <style:text-properties officeooo:rsid="001aaf9d"/>
    </style:style>
    <style:style style:name="T4" style:family="text">
      <style:text-properties text:display="none"/>
    </style:style>
    <style:style style:name="T5" style:family="text">
      <style:text-properties officeooo:rsid="0023af20"/>
    </style:style>
    <style:style style:name="T6" style:family="text">
      <style:text-properties officeooo:rsid="002a3337"/>
    </style:style>
    <style:style style:name="T7" style:family="text">
      <style:text-properties style:text-position="sub 58%"/>
    </style:style>
    <style:style style:name="T8" style:family="text">
      <style:text-properties style:text-position="sub 58%" officeooo:rsid="00332345"/>
    </style:style>
    <style:style style:name="T9" style:family="text">
      <style:text-properties style:text-position="sub 58%" officeooo:rsid="00349898"/>
    </style:style>
    <style:style style:name="T10" style:family="text">
      <style:text-properties style:text-position="sub 58%" fo:font-style="normal" style:font-style-asian="normal" style:font-style-complex="normal"/>
    </style:style>
    <style:style style:name="T11" style:family="text">
      <style:text-properties style:text-position="sub 58%" fo:font-style="normal" officeooo:rsid="0032a0a2" style:font-style-asian="normal" style:font-style-complex="normal"/>
    </style:style>
    <style:style style:name="T12" style:family="text">
      <style:text-properties style:text-position="sub 58%" fo:font-style="normal" officeooo:rsid="003aa28e" style:font-style-asian="normal" style:font-style-complex="normal"/>
    </style:style>
    <style:style style:name="T13" style:family="text">
      <style:text-properties style:text-position="sub 58%" fo:font-style="normal" officeooo:rsid="004119ff" style:font-style-asian="normal" style:font-style-complex="normal"/>
    </style:style>
    <style:style style:name="T14" style:family="text">
      <style:text-properties style:text-position="sub 58%" style:font-name="Liberation Serif"/>
    </style:style>
    <style:style style:name="T15" style:family="text">
      <style:text-properties style:text-position="sub 58%" style:font-name="Liberation Serif" officeooo:rsid="00429960"/>
    </style:style>
    <style:style style:name="T16" style:family="text">
      <style:text-properties style:text-position="sub 58%" style:font-name="Liberation Serif" fo:font-style="normal" officeooo:rsid="00653aba" style:font-style-asian="normal" style:font-style-complex="normal"/>
    </style:style>
    <style:style style:name="T17" style:family="text">
      <style:text-properties style:text-position="sub 58%" style:font-name="Liberation Serif" fo:font-style="normal" officeooo:rsid="00680733" style:font-style-asian="normal" style:font-style-complex="normal"/>
    </style:style>
    <style:style style:name="T18" style:family="text">
      <style:text-properties style:text-position="sub 58%" style:font-name="Liberation Serif" officeooo:rsid="0142e5ad"/>
    </style:style>
    <style:style style:name="T19" style:family="text">
      <style:text-properties style:text-position="sub 58%" officeooo:rsid="007ced5f"/>
    </style:style>
    <style:style style:name="T20" style:family="text">
      <style:text-properties style:text-position="sub 58%" officeooo:rsid="007df4f0"/>
    </style:style>
    <style:style style:name="T21" style:family="text">
      <style:text-properties style:text-position="sub 58%" officeooo:rsid="008158b2"/>
    </style:style>
    <style:style style:name="T22" style:family="text">
      <style:text-properties style:text-position="sub 58%" officeooo:rsid="0081710c"/>
    </style:style>
    <style:style style:name="T23" style:family="text">
      <style:text-properties style:text-position="sub 58%" officeooo:rsid="00893830"/>
    </style:style>
    <style:style style:name="T24" style:family="text">
      <style:text-properties style:text-position="sub 58%" officeooo:rsid="0089f18f"/>
    </style:style>
    <style:style style:name="T25" style:family="text">
      <style:text-properties style:text-position="sub 58%" officeooo:rsid="00a1edcc"/>
    </style:style>
    <style:style style:name="T26" style:family="text">
      <style:text-properties style:text-position="sub 58%" officeooo:rsid="00a3df36"/>
    </style:style>
    <style:style style:name="T27" style:family="text">
      <style:text-properties style:text-position="sub 58%" officeooo:rsid="00a532dc"/>
    </style:style>
    <style:style style:name="T28" style:family="text">
      <style:text-properties style:text-position="sub 58%" officeooo:rsid="00b1557e"/>
    </style:style>
    <style:style style:name="T29" style:family="text">
      <style:text-properties style:text-position="sub 58%" style:font-name="Liberation Serif1"/>
    </style:style>
    <style:style style:name="T30" style:family="text">
      <style:text-properties style:text-position="sub 58%" style:font-name="Liberation Serif1" officeooo:rsid="00db9798"/>
    </style:style>
    <style:style style:name="T31" style:family="text">
      <style:text-properties style:text-position="sub 58%" style:font-name="Liberation Serif1" officeooo:rsid="00e18e22"/>
    </style:style>
    <style:style style:name="T32" style:family="text">
      <style:text-properties style:text-position="sub 58%" style:font-name="Liberation Serif1" officeooo:rsid="00f89cec"/>
    </style:style>
    <style:style style:name="T33" style:family="text">
      <style:text-properties style:text-position="sub 58%" style:font-name="Liberation Serif1" fo:font-weight="bold" officeooo:rsid="00f89cec" style:font-weight-asian="bold" style:font-weight-complex="bold"/>
    </style:style>
    <style:style style:name="T34" style:family="text">
      <style:text-properties style:text-position="sub 58%" style:font-name="Liberation Serif1" officeooo:rsid="00f93a44"/>
    </style:style>
    <style:style style:name="T35" style:family="text">
      <style:text-properties style:text-position="sub 58%" style:font-name="Liberation Serif1" officeooo:rsid="0139cb92"/>
    </style:style>
    <style:style style:name="T36" style:family="text">
      <style:text-properties style:text-position="sub 58%" officeooo:rsid="01519296"/>
    </style:style>
    <style:style style:name="T37" style:family="text">
      <style:text-properties style:text-position="sub 58%" officeooo:rsid="01569683"/>
    </style:style>
    <style:style style:name="T38" style:family="text">
      <style:text-properties style:text-position="sub 58%" officeooo:rsid="015aadb7"/>
    </style:style>
    <style:style style:name="T39" style:family="text">
      <style:text-properties officeooo:rsid="00332345"/>
    </style:style>
    <style:style style:name="T40" style:family="text">
      <style:text-properties officeooo:rsid="00349898"/>
    </style:style>
    <style:style style:name="T41" style:family="text">
      <style:text-properties officeooo:rsid="00360bff"/>
    </style:style>
    <style:style style:name="T42" style:family="text">
      <style:text-properties style:font-name="Liberation Serif"/>
    </style:style>
    <style:style style:name="T43" style:family="text">
      <style:text-properties style:font-name="Liberation Serif" officeooo:rsid="00360bff"/>
    </style:style>
    <style:style style:name="T44" style:family="text">
      <style:text-properties style:font-name="Liberation Serif" officeooo:rsid="00429960"/>
    </style:style>
    <style:style style:name="T45" style:family="text">
      <style:text-properties style:font-name="Liberation Serif" officeooo:rsid="004ac774"/>
    </style:style>
    <style:style style:name="T46" style:family="text">
      <style:text-properties style:font-name="Liberation Serif" fo:font-size="10pt" officeooo:rsid="004ac774" style:font-size-asian="10pt" style:font-size-complex="10pt"/>
    </style:style>
    <style:style style:name="T47" style:family="text">
      <style:text-properties style:font-name="Liberation Serif" officeooo:rsid="0139cb92"/>
    </style:style>
    <style:style style:name="T48" style:family="text">
      <style:text-properties style:font-name="Liberation Serif" officeooo:rsid="0142e5ad"/>
    </style:style>
    <style:style style:name="T49" style:family="text">
      <style:text-properties style:font-name="Liberation Serif" officeooo:rsid="0141aa1c"/>
    </style:style>
    <style:style style:name="T50" style:family="text">
      <style:text-properties officeooo:rsid="00380b19"/>
    </style:style>
    <style:style style:name="T51" style:family="text">
      <style:text-properties officeooo:rsid="00395c61"/>
    </style:style>
    <style:style style:name="T52" style:family="text">
      <style:text-properties fo:font-style="normal" officeooo:rsid="003a75db" style:font-style-asian="normal" style:font-style-complex="normal"/>
    </style:style>
    <style:style style:name="T53" style:family="text">
      <style:text-properties fo:font-style="normal" officeooo:rsid="0032a0a2" style:font-style-asian="normal" style:font-style-complex="normal"/>
    </style:style>
    <style:style style:name="T54" style:family="text">
      <style:text-properties style:text-position="0% 100%"/>
    </style:style>
    <style:style style:name="T55" style:family="text">
      <style:text-properties style:text-position="0% 100%" fo:font-style="normal" style:font-style-asian="normal" style:font-style-complex="normal"/>
    </style:style>
    <style:style style:name="T56" style:family="text">
      <style:text-properties style:text-position="0% 100%" fo:font-style="normal" officeooo:rsid="003a75db" style:font-style-asian="normal" style:font-style-complex="normal"/>
    </style:style>
    <style:style style:name="T57" style:family="text">
      <style:text-properties style:text-position="0% 100%" fo:font-style="normal" officeooo:rsid="0032a0a2" style:font-style-asian="normal" style:font-style-complex="normal"/>
    </style:style>
    <style:style style:name="T58" style:family="text">
      <style:text-properties style:text-position="0% 100%" fo:font-style="normal" officeooo:rsid="003aa28e" style:font-style-asian="normal" style:font-style-complex="normal"/>
    </style:style>
    <style:style style:name="T59" style:family="text">
      <style:text-properties style:text-position="0% 100%" fo:font-style="normal" officeooo:rsid="003b35b1" style:font-style-asian="normal" style:font-style-complex="normal"/>
    </style:style>
    <style:style style:name="T60" style:family="text">
      <style:text-properties style:text-position="0% 100%" fo:font-style="normal" officeooo:rsid="003c6589" style:font-style-asian="normal" style:font-style-complex="normal"/>
    </style:style>
    <style:style style:name="T61" style:family="text">
      <style:text-properties style:text-position="0% 100%" fo:font-style="normal" officeooo:rsid="004119ff" style:font-style-asian="normal" style:font-style-complex="normal"/>
    </style:style>
    <style:style style:name="T62" style:family="text">
      <style:text-properties style:text-position="0% 100%" style:font-name="Liberation Serif"/>
    </style:style>
    <style:style style:name="T63" style:family="text">
      <style:text-properties style:text-position="0% 100%" style:font-name="Liberation Serif" fo:font-style="normal" officeooo:rsid="004b5168" style:font-style-asian="normal" style:font-style-complex="normal"/>
    </style:style>
    <style:style style:name="T64" style:family="text">
      <style:text-properties style:text-position="0% 100%" style:font-name="Liberation Serif" fo:font-style="normal" officeooo:rsid="004ccff4" style:font-style-asian="normal" style:font-style-complex="normal"/>
    </style:style>
    <style:style style:name="T65" style:family="text">
      <style:text-properties style:text-position="0% 100%" style:font-name="Liberation Serif" fo:font-style="normal" officeooo:rsid="004dcfef" style:font-style-asian="normal" style:font-style-complex="normal"/>
    </style:style>
    <style:style style:name="T66" style:family="text">
      <style:text-properties style:text-position="0% 100%" style:font-name="Liberation Serif" fo:font-style="normal" officeooo:rsid="0062ec9a" style:font-style-asian="normal" style:font-style-complex="normal"/>
    </style:style>
    <style:style style:name="T67" style:family="text">
      <style:text-properties style:text-position="0% 100%" style:font-name="Liberation Serif" fo:font-style="normal" officeooo:rsid="00653aba" style:font-style-asian="normal" style:font-style-complex="normal"/>
    </style:style>
    <style:style style:name="T68" style:family="text">
      <style:text-properties style:text-position="0% 100%" style:font-name="Liberation Serif" fo:font-style="normal" officeooo:rsid="0066bc14" style:font-style-asian="normal" style:font-style-complex="normal"/>
    </style:style>
    <style:style style:name="T69" style:family="text">
      <style:text-properties style:text-position="0% 100%" style:font-name="Liberation Serif" fo:font-style="normal" officeooo:rsid="0067395b" style:font-style-asian="normal" style:font-style-complex="normal"/>
    </style:style>
    <style:style style:name="T70" style:family="text">
      <style:text-properties style:text-position="0% 100%" style:font-name="Liberation Serif" fo:font-style="normal" officeooo:rsid="00680733" style:font-style-asian="normal" style:font-style-complex="normal"/>
    </style:style>
    <style:style style:name="T71" style:family="text">
      <style:text-properties style:text-position="0% 100%" style:font-name="Liberation Serif" fo:font-style="normal" officeooo:rsid="006d9b52" style:font-style-asian="normal" style:font-style-complex="normal"/>
    </style:style>
    <style:style style:name="T72" style:family="text">
      <style:text-properties style:text-position="0% 100%" style:font-name="Liberation Serif" fo:font-style="normal" officeooo:rsid="00da1e31" style:font-style-asian="normal" style:font-style-complex="normal"/>
    </style:style>
    <style:style style:name="T73" style:family="text">
      <style:text-properties style:text-position="0% 100%" style:font-name="Liberation Serif" fo:font-style="normal" officeooo:rsid="01472207" style:font-style-asian="normal" style:font-style-complex="normal"/>
    </style:style>
    <style:style style:name="T74" style:family="text">
      <style:text-properties style:text-position="0% 100%" style:font-name="Liberation Serif" fo:font-style="normal" officeooo:rsid="00559067" style:font-style-asian="normal" style:font-style-complex="normal"/>
    </style:style>
    <style:style style:name="T75" style:family="text">
      <style:text-properties style:text-position="0% 100%" style:font-name="Liberation Serif" fo:font-style="normal" officeooo:rsid="00567fd8" style:font-style-asian="normal" style:font-style-complex="normal"/>
    </style:style>
    <style:style style:name="T76" style:family="text">
      <style:text-properties style:text-position="0% 100%" style:font-name="Liberation Serif" fo:font-style="normal" fo:font-weight="bold" officeooo:rsid="0067395b" style:font-style-asian="normal" style:font-weight-asian="bold" style:font-style-complex="normal" style:font-weight-complex="bold"/>
    </style:style>
    <style:style style:name="T77" style:family="text">
      <style:text-properties style:text-position="0% 100%" style:font-name="Liberation Serif" officeooo:rsid="00db9798"/>
    </style:style>
    <style:style style:name="T78" style:family="text">
      <style:text-properties style:text-position="0% 100%" style:font-name="Liberation Serif" officeooo:rsid="00f89cec"/>
    </style:style>
    <style:style style:name="T79" style:family="text">
      <style:text-properties style:text-position="0% 100%" style:font-name="Liberation Serif" fo:font-weight="bold" officeooo:rsid="00f89cec" style:font-weight-asian="bold" style:font-weight-complex="bold"/>
    </style:style>
    <style:style style:name="T80" style:family="text">
      <style:text-properties style:text-position="0% 100%" style:font-name="Liberation Serif" officeooo:rsid="0147cae1"/>
    </style:style>
    <style:style style:name="T81" style:family="text">
      <style:text-properties style:text-position="0% 100%" style:font-name="Liberation Serif" officeooo:rsid="0147e7e8"/>
    </style:style>
    <style:style style:name="T82" style:family="text">
      <style:text-properties style:text-position="0% 100%" style:font-name="Liberation Serif" officeooo:rsid="0148b426"/>
    </style:style>
    <style:style style:name="T83" style:family="text">
      <style:text-properties style:text-position="0% 100%" officeooo:rsid="007ced5f"/>
    </style:style>
    <style:style style:name="T84" style:family="text">
      <style:text-properties style:text-position="0% 100%" officeooo:rsid="007df4f0"/>
    </style:style>
    <style:style style:name="T85" style:family="text">
      <style:text-properties style:text-position="0% 100%" officeooo:rsid="007f6640"/>
    </style:style>
    <style:style style:name="T86" style:family="text">
      <style:text-properties style:text-position="0% 100%" officeooo:rsid="00811678"/>
    </style:style>
    <style:style style:name="T87" style:family="text">
      <style:text-properties style:text-position="0% 100%" officeooo:rsid="008158b2"/>
    </style:style>
    <style:style style:name="T88" style:family="text">
      <style:text-properties style:text-position="0% 100%" officeooo:rsid="00862648"/>
    </style:style>
    <style:style style:name="T89" style:family="text">
      <style:text-properties style:text-position="0% 100%" officeooo:rsid="0088aa0c"/>
    </style:style>
    <style:style style:name="T90" style:family="text">
      <style:text-properties style:text-position="0% 100%" officeooo:rsid="00893830"/>
    </style:style>
    <style:style style:name="T91" style:family="text">
      <style:text-properties style:text-position="0% 100%" officeooo:rsid="0089f18f"/>
    </style:style>
    <style:style style:name="T92" style:family="text">
      <style:text-properties style:text-position="0% 100%" officeooo:rsid="009773c1"/>
    </style:style>
    <style:style style:name="T93" style:family="text">
      <style:text-properties style:text-position="0% 100%" officeooo:rsid="00a1edcc"/>
    </style:style>
    <style:style style:name="T94" style:family="text">
      <style:text-properties style:text-position="0% 100%" officeooo:rsid="00a2c35c"/>
    </style:style>
    <style:style style:name="T95" style:family="text">
      <style:text-properties style:text-position="0% 100%" officeooo:rsid="00a3df36"/>
    </style:style>
    <style:style style:name="T96" style:family="text">
      <style:text-properties style:text-position="0% 100%" officeooo:rsid="00a532dc"/>
    </style:style>
    <style:style style:name="T97" style:family="text">
      <style:text-properties style:text-position="0% 100%" officeooo:rsid="00b2b040"/>
    </style:style>
    <style:style style:name="T98" style:family="text">
      <style:text-properties style:text-position="0% 100%" officeooo:rsid="00b3214c"/>
    </style:style>
    <style:style style:name="T99" style:family="text">
      <style:text-properties style:text-position="0% 100%" officeooo:rsid="00b1557e"/>
    </style:style>
    <style:style style:name="T100" style:family="text">
      <style:text-properties style:text-position="0% 100%" officeooo:rsid="00cb6a96"/>
    </style:style>
    <style:style style:name="T101" style:family="text">
      <style:text-properties style:text-position="0% 100%" officeooo:rsid="00db9798"/>
    </style:style>
    <style:style style:name="T102" style:family="text">
      <style:text-properties style:text-position="0% 100%" style:font-name="Liberation Serif1" officeooo:rsid="00db9798"/>
    </style:style>
    <style:style style:name="T103" style:family="text">
      <style:text-properties style:text-position="0% 100%" style:font-name="Liberation Serif1" officeooo:rsid="00e18e22"/>
    </style:style>
    <style:style style:name="T104" style:family="text">
      <style:text-properties style:text-position="0% 100%" style:font-name="Liberation Serif1" officeooo:rsid="00f89cec"/>
    </style:style>
    <style:style style:name="T105" style:family="text">
      <style:text-properties style:text-position="0% 100%" style:font-name="Liberation Serif1" fo:font-weight="bold" officeooo:rsid="00f89cec" style:font-weight-asian="bold" style:font-weight-complex="bold"/>
    </style:style>
    <style:style style:name="T106" style:family="text">
      <style:text-properties style:text-position="0% 100%" style:font-name="Liberation Serif1" fo:font-style="italic" officeooo:rsid="00f93a44" style:font-style-asian="italic" style:font-style-complex="italic"/>
    </style:style>
    <style:style style:name="T107" style:family="text">
      <style:text-properties style:text-position="0% 100%" style:font-name="Liberation Serif1" officeooo:rsid="00f93a44"/>
    </style:style>
    <style:style style:name="T108" style:family="text">
      <style:text-properties style:text-position="0% 100%" style:font-name="Liberation Serif1" officeooo:rsid="00fa37e9"/>
    </style:style>
    <style:style style:name="T109" style:family="text">
      <style:text-properties style:text-position="0% 100%" style:font-name="Liberation Serif1" officeooo:rsid="0148b426"/>
    </style:style>
    <style:style style:name="T110" style:family="text">
      <style:text-properties style:text-position="0% 100%" style:font-name="Liberation Serif1" officeooo:rsid="0148b426" loext:padding="0.049cm" loext:border="0.51pt solid #ff9900"/>
    </style:style>
    <style:style style:name="T111" style:family="text">
      <style:text-properties style:text-position="0% 100%" style:font-name="Liberation Serif1" officeooo:rsid="0148b426" loext:padding="0.049cm" loext:border="none"/>
    </style:style>
    <style:style style:name="T112" style:family="text">
      <style:text-properties style:text-position="0% 100%" style:font-name="Liberation Serif1" officeooo:rsid="0148b426" loext:padding="0.049cm" loext:border="0.51pt solid #009900"/>
    </style:style>
    <style:style style:name="T113" style:family="text">
      <style:text-properties style:text-position="0% 100%" style:font-name="Liberation Serif1" officeooo:rsid="014ab204" loext:padding="0.049cm" loext:border="none"/>
    </style:style>
    <style:style style:name="T114" style:family="text">
      <style:text-properties style:text-position="0% 100%" officeooo:rsid="00e14ae9"/>
    </style:style>
    <style:style style:name="T115" style:family="text">
      <style:text-properties style:text-position="0% 100%" officeooo:rsid="00f89cec"/>
    </style:style>
    <style:style style:name="T116" style:family="text">
      <style:text-properties style:text-position="0% 100%" officeooo:rsid="015aadb7"/>
    </style:style>
    <style:style style:name="T117" style:family="text">
      <style:text-properties style:text-position="0% 100%" officeooo:rsid="015bd3ff"/>
    </style:style>
    <style:style style:name="T118" style:family="text">
      <style:text-properties style:text-position="0% 100%" officeooo:rsid="015e8940"/>
    </style:style>
    <style:style style:name="T119" style:family="text">
      <style:text-properties style:text-position="0% 100%" officeooo:rsid="016003d8"/>
    </style:style>
    <style:style style:name="T120" style:family="text">
      <style:text-properties style:text-position="0% 100%" officeooo:rsid="0161ba17"/>
    </style:style>
    <style:style style:name="T121" style:family="text">
      <style:text-properties style:text-position="super 58%" style:font-name="Liberation Serif" fo:font-style="normal" officeooo:rsid="0062ec9a" style:font-style-asian="normal" style:font-style-complex="normal"/>
    </style:style>
    <style:style style:name="T122" style:family="text">
      <style:text-properties style:text-position="super 58%" officeooo:rsid="007ced5f"/>
    </style:style>
    <style:style style:name="T123" style:family="text">
      <style:text-properties officeooo:rsid="00662500"/>
    </style:style>
    <style:style style:name="T124" style:family="text">
      <style:text-properties officeooo:rsid="007ced5f"/>
    </style:style>
    <style:style style:name="T125" style:family="text">
      <style:text-properties officeooo:rsid="0081710c"/>
    </style:style>
    <style:style style:name="T126" style:family="text">
      <style:text-properties officeooo:rsid="00852639"/>
    </style:style>
    <style:style style:name="T127" style:family="text">
      <style:text-properties officeooo:rsid="010a7a9b"/>
    </style:style>
    <style:style style:name="T128" style:family="text">
      <style:text-properties officeooo:rsid="0136315c"/>
    </style:style>
    <style:style style:name="T129" style:family="text">
      <style:text-properties officeooo:rsid="0139cb92"/>
    </style:style>
    <style:style style:name="T130" style:family="text">
      <style:text-properties style:font-name="Liberation Serif1"/>
    </style:style>
    <style:style style:name="T131" style:family="text">
      <style:text-properties style:font-name="Liberation Serif1" officeooo:rsid="0139cb92"/>
    </style:style>
    <style:style style:name="T132" style:family="text">
      <style:text-properties style:font-name="Liberation Serif1" officeooo:rsid="013eeb5c"/>
    </style:style>
    <style:style style:name="T133" style:family="text">
      <style:text-properties style:font-name="Liberation Serif1" officeooo:rsid="013dcad0"/>
    </style:style>
    <style:style style:name="T134" style:family="text">
      <style:text-properties style:font-name="Liberation Serif1" officeooo:rsid="01407c7f"/>
    </style:style>
    <style:style style:name="T135" style:family="text">
      <style:text-properties style:font-name="Liberation Serif1" officeooo:rsid="0141aa1c"/>
    </style:style>
    <style:style style:name="T136" style:family="text">
      <style:text-properties style:font-name="Liberation Serif1" officeooo:rsid="0142e5ad"/>
    </style:style>
    <style:style style:name="T137" style:family="text">
      <style:text-properties style:font-name="Liberation Serif1" fo:font-size="11pt" fo:font-style="normal" fo:font-weight="normal" style:font-size-asian="11pt" style:font-style-asian="normal" style:font-weight-asian="normal"/>
    </style:style>
    <style:style style:name="T138" style:family="text">
      <style:text-properties style:font-name="Liberation Serif1" fo:font-size="11pt" fo:font-style="normal" fo:font-weight="normal" officeooo:rsid="01703348" style:font-size-asian="11pt" style:font-style-asian="normal" style:font-weight-asian="normal"/>
    </style:style>
    <style:style style:name="T139" style:family="text">
      <style:text-properties style:font-name="Liberation Serif1" fo:font-size="11pt" fo:font-style="normal" fo:font-weight="normal" officeooo:rsid="0172e9a6" style:font-size-asian="11pt" style:font-style-asian="normal" style:font-weight-asian="normal"/>
    </style:style>
    <style:style style:name="T140" style:family="text">
      <style:text-properties officeooo:rsid="0147e7e8"/>
    </style:style>
    <style:style style:name="T141" style:family="text">
      <style:text-properties officeooo:rsid="00567fd8"/>
    </style:style>
    <style:style style:name="T142" style:family="text">
      <style:text-properties officeooo:rsid="014fe182"/>
    </style:style>
    <style:style style:name="T143" style:family="text">
      <style:text-properties officeooo:rsid="01519296"/>
    </style:style>
    <style:style style:name="T144" style:family="text">
      <style:text-properties officeooo:rsid="0152d283"/>
    </style:style>
    <style:style style:name="T145" style:family="text">
      <style:text-properties officeooo:rsid="01569683"/>
    </style:style>
    <style:style style:name="T146" style:family="text">
      <style:text-properties officeooo:rsid="0157fc28"/>
    </style:style>
    <style:style style:name="T147" style:family="text">
      <style:text-properties officeooo:rsid="01595c21"/>
    </style:style>
    <style:style style:name="T148" style:family="text">
      <style:text-properties style:font-name="Liberation Mono" fo:font-size="11pt" fo:font-style="normal" fo:font-weight="normal" style:font-size-asian="11pt" style:font-style-asian="normal" style:font-weight-asian="normal"/>
    </style:style>
    <style:style style:name="T149" style:family="text">
      <style:text-properties officeooo:rsid="0171015a"/>
    </style:style>
    <style:style style:name="T150" style:family="text">
      <style:text-properties officeooo:rsid="01784a65"/>
    </style:style>
    <style:style style:name="T151" style:family="text">
      <style:text-properties officeooo:rsid="017e7ed0"/>
    </style:style>
    <style:style style:name="T152" style:family="text">
      <style:text-properties officeooo:rsid="017e9689"/>
    </style:style>
    <style:style style:name="T153" style:family="text">
      <style:text-properties officeooo:rsid="0180164f"/>
    </style:style>
    <style:style style:name="T154" style:family="text">
      <style:text-properties fo:font-style="italic" officeooo:rsid="0180164f" style:font-style-asian="italic" style:font-style-complex="italic"/>
    </style:style>
    <style:style style:name="T155" style:family="text">
      <style:text-properties officeooo:rsid="0180a599"/>
    </style:style>
    <style:style style:name="T156" style:family="text">
      <style:text-properties officeooo:rsid="014fc07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fo:padding="0.049cm" fo:border="0.99pt solid #ff3333"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color="#729fcf" fo:padding="0.049cm" fo:border="0.06pt groove #000000" draw:ole-draw-aspect="1"/>
    </style:style>
    <style:style style:name="fr10" style:family="graphic" style:parent-style-name="Formula">
      <style:graphic-properties style:vertical-pos="from-top" style:horizontal-pos="from-left" style:horizontal-rel="paragraph-content" fo:padding="0.049cm" fo:border="0.99pt solid #0099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étermination des intersections</text:p>
      <text:p text:style-name="P1"/>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4"><text:a xlink:type="simple" xlink:href="#__RefHeading___Toc112_3347998797" text:style-name="Index_20_Link" text:visited-style-name="Index_20_Link">Objectif<text:tab/>2</text:a></text:p>
          <text:p text:style-name="P64"><text:a xlink:type="simple" xlink:href="#__RefHeading___Toc99_920643201" text:style-name="Index_20_Link" text:visited-style-name="Index_20_Link">présentation du problème<text:tab/>2</text:a></text:p>
          <text:p text:style-name="P64"><text:a xlink:type="simple" xlink:href="#__RefHeading___Toc101_920643201" text:style-name="Index_20_Link" text:visited-style-name="Index_20_Link">Propriétés spécifiques<text:tab/>4</text:a></text:p>
          <text:p text:style-name="P65"><text:a xlink:type="simple" xlink:href="#__RefHeading___Toc909_120585349" text:style-name="Index_20_Link" text:visited-style-name="Index_20_Link">Cas des cônes réguliers (axe de révolution) ayant le même angle au sommet<text:tab/>4</text:a></text:p>
          <text:p text:style-name="P65"><text:a xlink:type="simple" xlink:href="#__RefHeading___Toc911_120585349" text:style-name="Index_20_Link" text:visited-style-name="Index_20_Link"><text:span text:style-name="T55">c</text:span><text:span text:style-name="T55">as générique : cônes irréguliers (angle au sommet dépendant de l’arête considérée)</text:span><text:tab/>6</text:a></text:p>
          <text:p text:style-name="P65"><text:a xlink:type="simple" xlink:href="#__RefHeading___Toc1114_2196019965" text:style-name="Index_20_Link" text:visited-style-name="Index_20_Link">Condition nécessaire d’intersection entre deux cônes<text:tab/>9</text:a></text:p>
          <text:p text:style-name="P73"><text:a xlink:type="simple" xlink:href="#__RefHeading___Toc1467_3358104299" text:style-name="Index_20_Link" text:visited-style-name="Index_20_Link">TL DR<text:tab/>11</text:a></text:p>
          <text:p text:style-name="P65"><text:a xlink:type="simple" xlink:href="#__RefHeading___Toc1116_2196019965" text:style-name="Index_20_Link" text:visited-style-name="Index_20_Link">Bonus game<text:tab/>12</text:a></text:p>
          <text:p text:style-name="P64"><text:a xlink:type="simple" xlink:href="#__RefHeading___Toc1166_2196019965" text:style-name="Index_20_Link" text:visited-style-name="Index_20_Link">Algorithme<text:tab/>12</text:a></text:p>
        </text:index-body>
      </text:table-of-content>
      <text:p text:style-name="P1"/>
      <text:h text:style-name="P74" text:outline-level="1"><text:bookmark-start text:name="__RefHeading___Toc112_3347998797"/><text:span text:style-name="T1">O</text:span>bje<text:span text:style-name="T1">ctif</text:span><text:bookmark-end text:name="__RefHeading___Toc112_3347998797"/></text:h>
      <text:p text:style-name="P6">Chaque ville considérée est l’origine d’un cône irrégulier (il n’y a pas nécessairement d’axe de révolution). Selon les positions géométriques des villes, des moyens de transports et de l’année considérés, la forme de chaque cône est évolutive. Dans le but d’améliorer le rendu de cette représentation, les cônes ne doivent pas se chevaucher et s’arrêter à leurs intersections respectives quand cela est nécessaire.</text:p>
      <text:p text:style-name="P7">L’objet de ce document est d’identifier un algorithme relativement rapide pour calculer ces dites intersections afin de bénéficier d’un rendu satisfaisant tout en ayant une impression de fluidité lors de changement de paramètres telle que l’année.</text:p>
      <text:p text:style-name="P7">La première partie du document rappelle la position du problème et les hypothèses qui sont considérées. La deuxième partie propose quand à elle des propriétés utiles à la compréhension de l’algorithme à mettre en place pour finir sur l’algorithme proprement dit.</text:p>
      <text:h text:style-name="Heading_20_1" text:outline-level="1"><text:bookmark-start text:name="__RefHeading___Toc99_920643201"/>présentation du problème<text:bookmark-end text:name="__RefHeading___Toc99_920643201"/></text:h>
      <text:p text:style-name="P5">Dans les modélisations qu’on souhaite représenter, près de 1700 villes réparties sur toute la Terre sont considérées. <text:span text:style-name="T2">Chacune de ces villes est à l’origine d’un cône irrégulier orienté vers le centre de la Terre et dont l’angle au sommet de chaque arête représente un taux de vitesse relatif à une vitesse maximale pour l’année considérée.Dans notre modèle chaque ville peut au maximum posséder 360 arêtes (une arête tous les degrés).</text:span></text:p>
      <text:p text:style-name="P4">À chaque mise à jour du modèl<text:span text:style-name="T3">e ( changement d’année par exemple), nous aurons potentiellement 1700*1699*360=10 397 880 000 ensembles de calculs à produire pour rafraîchir l’affichage des cônes.</text:span></text:p>
      <text:p text:style-name="P3"><draw:frame draw:style-name="fr2" draw:name="Cadre1" text:anchor-type="paragraph" svg:width="16.141cm" draw:z-index="1"><draw:text-box fo:min-height="11.882cm"><text:p text:style-name="P50"><draw:frame draw:style-name="fr6" draw:name="Image1" text:anchor-type="as-char" svg:y="-11.753cm" svg:width="15.494cm" style:rel-width="96%" svg:height="10.957cm" style:rel-height="scale" draw:z-index="19"><draw:image xlink:href="Pictures/1000B89F0000741E00005222364137B9190129E4.svg" xlink:type="simple" xlink:show="embed" xlink:actuate="onLoad" draw:mime-type="image/svg+xml"/><draw:image xlink:href="Pictures/1000000100000349000002530F127E05F2AC403D.png" xlink:type="simple" xlink:show="embed" xlink:actuate="onLoad" draw:mime-type="image/png"/></draw:frame><text:span text:style-name="T4"><text:line-break/></text:span>Figure <text:sequence text:ref-name="refFigure0" text:name="Figure" text:formula="ooow:Figure+1" style:num-format="1">1</text:sequence>: exemple d'une ville avec un cône irrégulier et son référentiel local</text:p></draw:text-box></draw:frame><text:soft-page-break/></text:p>
      <text:p text:style-name="P3"><draw:frame draw:style-name="fr2" draw:name="Cadre2" text:anchor-type="paragraph" svg:width="14.818cm" draw:z-index="2"><draw:text-box fo:min-height="10.691cm"><text:p text:style-name="P50"><draw:frame draw:style-name="fr4" draw:name="Image2" text:anchor-type="as-char" svg:width="14.818cm" style:rel-width="100%" svg:height="10.479cm" style:rel-height="scale" draw:z-index="23"><draw:image xlink:href="Pictures/1001334F0000741E000052229360D4B0D24A1E22.svg" xlink:type="simple" xlink:show="embed" xlink:actuate="onLoad" draw:mime-type="image/svg+xml"/><draw:image xlink:href="Pictures/10000001000003490000025338F053C57C3F621E.png" xlink:type="simple" xlink:show="embed" xlink:actuate="onLoad" draw:mime-type="image/png"/></draw:frame><text:span text:style-name="T4"><text:line-break/></text:span>Figure <text:sequence text:ref-name="refFigure1" text:name="Figure" text:formula="ooow:Figure+1" style:num-format="1">2</text:sequence>: problème d'intersection des cônes <text:span text:style-name="T6">irréguliers</text:span> pour des villes proches : <text:span text:style-name="T6">les arêtes roses doivent se limiter aux intersections éventuelles avec les côtes des autres cônes.</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Au vu du grand nombre de calculs à produire, le rendu ne peut pas être fluide si seul le CPU est en action. Aussi l’algorithme à produire doit au maximum être parallélisable afin que le GPU puisse supporter le maximum de charge !</text:p>
      <text:p text:style-name="P8"/>
      <text:h text:style-name="Heading_20_1" text:outline-level="1"><text:bookmark-start text:name="__RefHeading___Toc101_920643201"/>Propriétés spécifiques<text:bookmark-end text:name="__RefHeading___Toc101_920643201"/></text:h>
      <text:p text:style-name="P41">Dans le cadre de ce chapitre d’identification de propriétés spécifiques, le raisonnement sera porté sur des cônes de révolution ayant un angle au sommet compris entre un angle minimum et un angle maximum <text:span text:style-name="T5">(</text:span><text:span text:style-name="T5"><draw:frame draw:style-name="fr7" draw:name="Objet1" text:anchor-type="as-char" svg:y="-0.377cm" svg:width="2.013cm" svg:height="0.531cm" draw:z-index="0"><draw:object xlink:href="./Object 1" xlink:type="simple" xlink:show="embed" xlink:actuate="onLoad"/><draw:image xlink:href="./ObjectReplacements/Object 1" xlink:type="simple" xlink:show="embed" xlink:actuate="onLoad"/></draw:frame></text:span><text:span text:style-name="T5">)</text:span>. <text:span text:style-name="T5">De cette manière les cônes irréguliers sont compris entre ces deux extrémités (voir figure 1). </text:span></text:p>
      <text:p text:style-name="P52">L’objectif de ce chapitre est d’identifier le domaine dans lequel une arête d’un cône réel et irrégulier peut être en intersection avec un autre cône irrégulier.</text:p>
      <text:h text:style-name="P75" text:outline-level="2"><text:bookmark-start text:name="__RefHeading___Toc909_120585349"/>Cas des cônes réguliers (axe de révolution) ayant le même angle au sommet<text:bookmark-end text:name="__RefHeading___Toc909_120585349"/></text:h>
      <text:p text:style-name="Text_20_body"><draw:frame draw:style-name="fr5" draw:name="Image3" text:anchor-type="paragraph" svg:width="17cm" svg:height="8.759cm" draw:z-index="3"><draw:image xlink:href="Pictures/10000019000006A60000036D27B80B99C5691F20.gif" xlink:type="simple" xlink:show="embed" xlink:actuate="onLoad" draw:mime-type="image/gif"/></draw:frame></text:p>
      <text:p text:style-name="P10">Soient deux villes (nommées respectivement V<text:span text:style-name="T7">1</text:span> et V<text:span text:style-name="T7">2</text:span>) situées à la surface de la Terre de rayon R et de centre C, chacune des villes possède un référentiel orthonormé direct (ROND) local constitué du nord, est et bas locaux (North, East, Down ou NED<text:span text:style-name="T8">1</text:span><text:span text:style-name="T39"> et NED</text:span><text:span text:style-name="T8">2</text:span>) .</text:p>
      <text:p text:style-name="P12"><text:span text:style-name="T41">Pour un angle </text:span><text:span text:style-name="T43">α</text:span><text:span text:style-name="T41"> compris entre l’horizontal local et la surface du cône, le cône de sommet V</text:span><text:span text:style-name="T9">1</text:span><text:span text:style-name="T40"> (respectivement V</text:span><text:span text:style-name="T9">2</text:span><text:span text:style-name="T40">) et d’axe de révolution (V</text:span><text:span text:style-name="T9">1</text:span><text:span text:style-name="T40"> C) (respectivement (V</text:span><text:span text:style-name="T9">2</text:span><text:span text:style-name="T40"> C)) possède pour équation caractéristique :</text:span></text:p>
      <text:p text:style-name="P11"><draw:frame draw:style-name="fr7" draw:name="Objet2" text:anchor-type="as-char" svg:y="-0.437cm" svg:width="4.286cm" svg:height="0.591cm" draw:z-index="24"><draw:object xlink:href="./Object 2" xlink:type="simple" xlink:show="embed" xlink:actuate="onLoad"/><draw:image xlink:href="./ObjectReplacements/Object 2" xlink:type="simple" xlink:show="embed" xlink:actuate="onLoad"/></draw:frame><text:span text:style-name="T50">voir </text:span><text:a xlink:type="simple" xlink:href="https://fr.wikipedia.org/wiki/Cône_de_révolution" text:style-name="Internet_20_link" text:visited-style-name="Visited_20_Internet_20_Link"><text:span text:style-name="T50">wikipedia</text:span></text:a></text:p>
      <text:p text:style-name="P11"><text:soft-page-break/><draw:frame draw:style-name="fr7" draw:name="Objet3" text:anchor-type="as-char" svg:y="-0.743cm" svg:width="2.683cm" svg:height="1.182cm" draw:z-index="25"><draw:object xlink:href="./Object 3" xlink:type="simple" xlink:show="embed" xlink:actuate="onLoad"/><draw:image xlink:href="./ObjectReplacements/Object 3" xlink:type="simple" xlink:show="embed" xlink:actuate="onLoad"/></draw:frame><text:s/><text:span text:style-name="T51">(respectivement </text:span><text:span text:style-name="T51"><draw:frame draw:style-name="fr7" draw:name="Objet4" text:anchor-type="as-char" svg:y="-0.743cm" svg:width="2.683cm" svg:height="1.182cm" draw:z-index="26"><draw:object xlink:href="./Object 4" xlink:type="simple" xlink:show="embed" xlink:actuate="onLoad"/><draw:image xlink:href="./ObjectReplacements/Object 4" xlink:type="simple" xlink:show="embed" xlink:actuate="onLoad"/><svg:desc>formule</svg:desc></draw:frame></text:span><text:span text:style-name="T51">)</text:span></text:p>
      <text:p text:style-name="P13"><text:span text:style-name="T52">Soit (P) le plan médian du segment [</text:span><text:span text:style-name="T53">V</text:span><text:span text:style-name="T11">1</text:span><text:span text:style-name="T53">V</text:span><text:span text:style-name="T11">2</text:span><text:span text:style-name="T52">], C le centre de la Terre appartient nécessairement à (P) par construction. L’axe de révolution (C</text:span><text:span text:style-name="T53">V</text:span><text:span text:style-name="T11">2</text:span><text:span text:style-name="T56">) est donc bien l’image de l’axe de révolution (C</text:span><text:span text:style-name="T57">V</text:span><text:span text:style-name="T11">1</text:span><text:span text:style-name="T56">) par rapport au plan médian (P). </text:span><text:span text:style-name="T58">T</text:span><text:span text:style-name="T59">rivialement, on peut aussi démontrer que</text:span><text:span text:style-name="T58"> le référentiel loca</text:span><text:span text:style-name="T59">l</text:span><text:span text:style-name="T58"> NED</text:span><text:span text:style-name="T12">2</text:span><text:span text:style-name="T58"> e</text:span><text:span text:style-name="T59">s</text:span><text:span text:style-name="T58">t </text:span><text:span text:style-name="T59">l’image du référentiel local</text:span><text:span text:style-name="T58"> NED</text:span><text:span text:style-name="T12">1</text:span><text:span text:style-name="T58"> </text:span><text:span text:style-name="T59">par rapport au plan médian (P) composé avec une rotation autour de l’axe de révolution.</text:span></text:p>
      <text:p text:style-name="P14"><text:span text:style-name="T59">A</text:span><text:span text:style-name="T55">insi on démontre que le plan médian est aussi plan de symétrie.</text:span></text:p>
      <text:p text:style-name="P21">On en déduit que le plan médian est le plan d’intersection des deux cônes quand leurs angles au sommet sont égaux !</text:p>
      <text:p text:style-name="P15"><text:span text:style-name="T60">S</text:span><text:span text:style-name="T55">oit M</text:span><text:span text:style-name="T10">1</text:span><text:span text:style-name="T55"> un point du cône ayant pour sommet V</text:span><text:span text:style-name="T10">1</text:span><text:span text:style-name="T55">, alors </text:span><text:span text:style-name="T61">les coordonnées de M</text:span><text:span text:style-name="T13">1</text:span><text:span text:style-name="T61"> s’expriment de la manière suivante</text:span></text:p>
      <text:p text:style-name="P16"><draw:frame draw:style-name="fr7" draw:name="Objet5" text:anchor-type="as-char" svg:y="-0.871cm" svg:width="9.052cm" svg:height="1.603cm" draw:z-index="4"><draw:object xlink:href="./Object 5" xlink:type="simple" xlink:show="embed" xlink:actuate="onLoad"/><draw:image xlink:href="./ObjectReplacements/Object 5" xlink:type="simple" xlink:show="embed" xlink:actuate="onLoad"/></draw:frame></text:p>
      <text:p text:style-name="P17">Le triangle V<text:span text:style-name="T7">1</text:span>V<text:span text:style-name="T7">2</text:span>C est isocèle en C en conséquence, si <text:span text:style-name="T42">θ est l’angle formé par les vecteurs </text:span><text:span text:style-name="T42"><draw:frame draw:style-name="fr7" draw:name="Objet6" text:anchor-type="as-char" svg:y="-0.429cm" svg:width="0.956cm" svg:height="0.584cm" draw:z-index="27"><draw:object xlink:href="./Object 6" xlink:type="simple" xlink:show="embed" xlink:actuate="onLoad"/><draw:image xlink:href="./ObjectReplacements/Object 6" xlink:type="simple" xlink:show="embed" xlink:actuate="onLoad"/></draw:frame></text:span><text:span text:style-name="T42">et </text:span><text:span text:style-name="T42"><draw:frame draw:style-name="fr7" draw:name="Objet7" text:anchor-type="as-char" svg:y="-0.429cm" svg:width="0.958cm" svg:height="0.584cm" draw:z-index="28"><draw:object xlink:href="./Object 7" xlink:type="simple" xlink:show="embed" xlink:actuate="onLoad"/><draw:image xlink:href="./ObjectReplacements/Object 7" xlink:type="simple" xlink:show="embed" xlink:actuate="onLoad"/><svg:desc>formule</svg:desc></draw:frame></text:span><text:span text:style-name="T42">(angle au sommet C) alors les angles </text:span><text:span text:style-name="T44">aux sommets V</text:span><text:span text:style-name="T15">1</text:span><text:span text:style-name="T44"> et V</text:span><text:span text:style-name="T15">2</text:span><text:span text:style-name="T44"> sont égaux à </text:span><text:span text:style-name="T44"><draw:frame draw:style-name="fr7" draw:name="Objet8" text:anchor-type="as-char" svg:y="-0.483cm" svg:width="1.117cm" svg:height="0.861cm" draw:z-index="29"><draw:object xlink:href="./Object 8" xlink:type="simple" xlink:show="embed" xlink:actuate="onLoad"/><draw:image xlink:href="./ObjectReplacements/Object 8" xlink:type="simple" xlink:show="embed" xlink:actuate="onLoad"/></draw:frame></text:span><text:span text:style-name="T44">.</text:span></text:p>
      <text:p text:style-name="P18"><text:span text:style-name="T42">Si γ est l’azimut de V</text:span><text:span text:style-name="T14">2</text:span><text:span text:style-name="T42"> dans NED</text:span><text:span text:style-name="T14">1 </text:span><text:span text:style-name="T42">depuis V</text:span><text:span text:style-name="T14">1</text:span><text:span text:style-name="T42"> (dans le plan horizontal local de V</text:span><text:span text:style-name="T14">1</text:span><text:span text:style-name="T42">, c’est l’angle formé entre le nord local est la direction de V</text:span><text:span text:style-name="T14">2</text:span><text:span text:style-name="T42">) alors un vecteur normal à (P) est </text:span><text:span text:style-name="T42"><draw:frame draw:style-name="fr7" draw:name="Objet9" text:anchor-type="as-char" svg:y="-1.515cm" svg:width="3.695cm" svg:height="2.893cm" draw:z-index="30"><draw:object xlink:href="./Object 9" xlink:type="simple" xlink:show="embed" xlink:actuate="onLoad"/><draw:image xlink:href="./ObjectReplacements/Object 9" xlink:type="simple" xlink:show="embed" xlink:actuate="onLoad"/></draw:frame></text:span><text:span text:style-name="T42">.</text:span></text:p>
      <text:p text:style-name="P19"><text:span text:style-name="T42">Soit </text:span><text:span text:style-name="T42"><draw:frame draw:style-name="fr7" draw:name="Objet10" text:anchor-type="as-char" svg:y="-0.871cm" svg:width="7.138cm" svg:height="1.603cm" draw:z-index="31"><draw:object xlink:href="./Object 10" xlink:type="simple" xlink:show="embed" xlink:actuate="onLoad"/><draw:image xlink:href="./ObjectReplacements/Object 10" xlink:type="simple" xlink:show="embed" xlink:actuate="onLoad"/></draw:frame></text:span><text:span text:style-name="T42"><text:s/>alors </text:span><text:span text:style-name="T42"><draw:frame draw:style-name="fr7" draw:name="Objet11" text:anchor-type="as-char" svg:y="-0.871cm" svg:width="3.974cm" svg:height="1.603cm" draw:z-index="32"><draw:object xlink:href="./Object 11" xlink:type="simple" xlink:show="embed" xlink:actuate="onLoad"/><draw:image xlink:href="./ObjectReplacements/Object 11" xlink:type="simple" xlink:show="embed" xlink:actuate="onLoad"/></draw:frame></text:span><text:span text:style-name="T42"> :</text:span></text:p>
      <text:p text:style-name="P19"><text:span text:style-name="T42"><draw:frame draw:style-name="fr7" draw:name="Objet12" text:anchor-type="as-char" svg:y="-0.483cm" svg:width="8.384cm" svg:height="0.861cm" draw:z-index="33"><draw:object xlink:href="./Object 12" xlink:type="simple" xlink:show="embed" xlink:actuate="onLoad"/><draw:image xlink:href="./ObjectReplacements/Object 12" xlink:type="simple" xlink:show="embed" xlink:actuate="onLoad"/></draw:frame></text:span><text:span text:style-name="T46">(EQ 1)</text:span></text:p>
      <text:p text:style-name="P20"><text:span text:style-name="T45">(</text:span><text:span text:style-name="T42">EQ 1) est l’équation du plan (P) dans le référentiel NED</text:span><text:span text:style-name="T14">1</text:span><text:span text:style-name="T42">.</text:span></text:p>
      <text:p text:style-name="P35"><text:span text:style-name="T63">Pour rappel, </text:span><text:span text:style-name="T64">pour tout point </text:span><text:span text:style-name="T64"><draw:frame draw:style-name="fr7" draw:name="Objet13" text:anchor-type="as-char" svg:y="-0.944cm" svg:width="1.944cm" svg:height="1.801cm" draw:z-index="34"><draw:object xlink:href="./Object 13" xlink:type="simple" xlink:show="embed" xlink:actuate="onLoad"/><draw:image xlink:href="./ObjectReplacements/Object 13" xlink:type="simple" xlink:show="embed" xlink:actuate="onLoad"/></draw:frame></text:span><text:span text:style-name="T64"><text:s/>de l’espace, la distance entre A et l</text:span><text:span text:style-name="T65">e</text:span><text:span text:style-name="T64"> plan </text:span><text:span text:style-name="T65">(P)</text:span><text:span text:style-name="T64"> est donné par la formule suivante :</text:span></text:p>
      <text:p text:style-name="P24"><draw:frame draw:style-name="fr7" draw:name="Objet14" text:anchor-type="as-char" svg:y="-0.483cm" svg:width="9.656cm" svg:height="0.863cm" draw:z-index="35"><draw:object xlink:href="./Object 14" xlink:type="simple" xlink:show="embed" xlink:actuate="onLoad"/><draw:image xlink:href="./ObjectReplacements/Object 14" xlink:type="simple" xlink:show="embed" xlink:actuate="onLoad"/></draw:frame></text:p>
      <text:p text:style-name="P22">En particulier pour A=M<text:span text:style-name="T7">1 </text:span>:</text:p>
      <text:p text:style-name="P22"><text:soft-page-break/><draw:frame draw:style-name="fr7" draw:name="Objet15" text:anchor-type="as-char" svg:y="-0.4cm" svg:width="12.06cm" svg:height="0.716cm" draw:z-index="36"><draw:object xlink:href="./Object 15" xlink:type="simple" xlink:show="embed" xlink:actuate="onLoad"/><draw:image xlink:href="./ObjectReplacements/Object 15" xlink:type="simple" xlink:show="embed" xlink:actuate="onLoad"/><svg:desc>formule</svg:desc></draw:frame></text:p>
      <text:p text:style-name="P49"><text:span text:style-name="T74">Pour identifier le domaine de Φ </text:span><text:span text:style-name="T75">pour lequel il y a intersection entre le plan et le cône, il suffit de faire un changement de variable dans l</text:span><text:span text:style-name="T73">a fonction précédente</text:span><text:span text:style-name="T75"> avec une distance nulle :</text:span></text:p>
      <text:p text:style-name="P23"><text:span text:style-name="T141"><draw:frame draw:style-name="fr7" draw:name="Objet16" text:anchor-type="as-char" svg:y="-0.681cm" svg:width="7.899cm" svg:height="1.118cm" draw:z-index="6"><draw:object xlink:href="./Object 16" xlink:type="simple" xlink:show="embed" xlink:actuate="onLoad"/><draw:image xlink:href="./ObjectReplacements/Object 16" xlink:type="simple" xlink:show="embed" xlink:actuate="onLoad"/></draw:frame></text:span><text:span text:style-name="T141">.</text:span></text:p>
      <text:p text:style-name="P23"><draw:frame draw:style-name="fr10" draw:name="Objet17" text:anchor-type="as-char" svg:y="-1.397cm" svg:width="9.511cm" svg:height="2.824cm" draw:z-index="7"><draw:object xlink:href="./Object 17" xlink:type="simple" xlink:show="embed" xlink:actuate="onLoad"/><draw:image xlink:href="./ObjectReplacements/Object 17" xlink:type="simple" xlink:show="embed" xlink:actuate="onLoad"/></draw:frame><text:span text:style-name="T123">(EQ 2)</text:span></text:p>
      <text:list text:style-name="L1">
        <text:list-item>
          <text:p text:style-name="P78"><text:span text:style-name="T66">cas où le coefficient de t</text:span><text:span text:style-name="T121">2</text:span><text:span text:style-name="T66"> est nul : </text:span><text:span text:style-name="T67">Le plan </text:span><text:span text:style-name="T68">(Q) </text:span><text:span text:style-name="T67">contenant (V</text:span><text:span text:style-name="T16">1</text:span><text:span text:style-name="T67">C) et le vecteur </text:span><text:span text:style-name="T67"><draw:frame draw:style-name="fr7" draw:name="Objet18" text:anchor-type="as-char" svg:y="-0.377cm" svg:width="0.422cm" svg:height="0.467cm" draw:z-index="37"><draw:object xlink:href="./Object 18" xlink:type="simple" xlink:show="embed" xlink:actuate="onLoad"/><draw:image xlink:href="./ObjectReplacements/Object 18" xlink:type="simple" xlink:show="embed" xlink:actuate="onLoad"/></draw:frame></text:span><text:span text:style-name="T67">est perpendiculaire à (P) et est un plan de symétrie pour le cône de sommet V</text:span><text:span text:style-name="T16">1</text:span><text:span text:style-name="T67">. </text:span><text:span text:style-name="T68">La résolution de l’équation (EQ 2) ne propose au plus qu’une solution. Le problème étant symétrique par rapport à (Q), cette solution unique se trouve dans ce plan. Dans ce cadre, </text:span><text:span text:style-name="T68"><draw:frame draw:style-name="fr9" draw:name="Objet19" text:anchor-type="as-char" svg:y="-0.355cm" svg:width="1.274cm" svg:height="0.515cm" draw:z-index="38"><draw:object xlink:href="./Object 19" xlink:type="simple" xlink:show="embed" xlink:actuate="onLoad"/><draw:image xlink:href="./ObjectReplacements/Object 19" xlink:type="simple" xlink:show="embed" xlink:actuate="onLoad"/></draw:frame></text:span></text:p>
        </text:list-item>
        <text:list-item>
          <text:p text:style-name="P78"><text:span text:style-name="T66">cas où le coefficient de t</text:span><text:span text:style-name="T121">2</text:span><text:span text:style-name="T66"> est différent de zéro : </text:span><text:span text:style-name="T69">L’équation EQ2 trouve </text:span><text:span text:style-name="T76">au plus deux solutions distinctes correspondant à </text:span><text:span text:style-name="T76"><draw:frame draw:style-name="fr7" draw:name="Objet20" text:anchor-type="as-char" svg:y="-0.377cm" svg:width="2.312cm" svg:height="0.531cm" draw:z-index="39"><draw:object xlink:href="./Object 20" xlink:type="simple" xlink:show="embed" xlink:actuate="onLoad"/><draw:image xlink:href="./ObjectReplacements/Object 20" xlink:type="simple" xlink:show="embed" xlink:actuate="onLoad"/></draw:frame></text:span><text:span text:style-name="T69">, domaine dans lequel le cône est en intersection avec le plan (P). </text:span><text:span text:style-name="T70">Dans ce cadre l’injection des coordonnées de M</text:span><text:span text:style-name="T17">1</text:span><text:span text:style-name="T70"> dans EQ1, nous donne la relation suivante : <text:line-break/></text:span><text:span text:style-name="T70"><draw:frame draw:style-name="fr7" draw:name="Objet21" text:anchor-type="as-char" svg:y="-0.441cm" svg:width="12.377cm" svg:height="0.788cm" draw:z-index="40"><draw:object xlink:href="./Object 21" xlink:type="simple" xlink:show="embed" xlink:actuate="onLoad"/><draw:image xlink:href="./ObjectReplacements/Object 21" xlink:type="simple" xlink:show="embed" xlink:actuate="onLoad"/></draw:frame></text:span><text:span text:style-name="T70"><text:line-break/>d’où </text:span><text:span text:style-name="T70"><draw:frame draw:style-name="fr8" draw:name="Objet22" text:anchor-type="as-char" svg:y="-1.561cm" svg:width="11.663cm" svg:height="2.972cm" draw:z-index="41"><draw:object xlink:href="./Object 22" xlink:type="simple" xlink:show="embed" xlink:actuate="onLoad"/><draw:image xlink:href="./ObjectReplacements/Object 22" xlink:type="simple" xlink:show="embed" xlink:actuate="onLoad"/></draw:frame></text:span><text:span text:style-name="T73">(relation 1)</text:span></text:p>
        </text:list-item>
      </text:list>
      <text:h text:style-name="P76" text:outline-level="2"><text:bookmark-start text:name="__RefHeading___Toc911_120585349"/><text:span text:style-name="T71">c</text:span><text:span text:style-name="T72">as générique : cônes irréguliers (angle au sommet dépendant de l’arête considérée)</text:span><text:bookmark-end text:name="__RefHeading___Toc911_120585349"/></text:h>
      <text:p text:style-name="P36">Les cônes réels sont compris entre deux cônes de révolution. En reprenant les notations précédentes,</text:p>
      <text:p text:style-name="P36">on définit comme <draw:frame draw:style-name="fr7" draw:name="Objet23" text:anchor-type="as-char" svg:y="-0.377cm" svg:width="2.316cm" svg:height="0.531cm" draw:z-index="42"><draw:object xlink:href="./Object 23" xlink:type="simple" xlink:show="embed" xlink:actuate="onLoad"/><draw:image xlink:href="./ObjectReplacements/Object 23" xlink:type="simple" xlink:show="embed" xlink:actuate="onLoad"/><svg:desc>formule</svg:desc></draw:frame>(respectivement <draw:frame draw:style-name="fr7" draw:name="Objet24" text:anchor-type="as-char" svg:y="-0.377cm" svg:width="2.318cm" svg:height="0.531cm" draw:z-index="43"><draw:object xlink:href="./Object 24" xlink:type="simple" xlink:show="embed" xlink:actuate="onLoad"/><draw:image xlink:href="./ObjectReplacements/Object 24" xlink:type="simple" xlink:show="embed" xlink:actuate="onLoad"/><svg:desc>formule</svg:desc></draw:frame>) les angles entre lesquels est compris le cône réel ayant pour sommet la ville V<text:span text:style-name="T7">1</text:span> (respectivement V<text:span text:style-name="T7">2</text:span>).</text:p>
      <text:p text:style-name="P37"><text:span text:style-name="T124">Soit i un entier naturel positif, on désigne par ar</text:span><text:span text:style-name="T19">1i</text:span><text:span text:style-name="T83"> (respectivement ar</text:span><text:span text:style-name="T19">2i</text:span><text:span text:style-name="T83">)la i</text:span><text:span text:style-name="T122">ème</text:span><text:span text:style-name="T83"> arête du cône ayant pour sommet V</text:span><text:span text:style-name="T19">1</text:span><text:span text:style-name="T83">(respectivement V</text:span><text:span text:style-name="T19">2</text:span><text:span text:style-name="T83">).</text:span></text:p>
      <text:p text:style-name="P40"><text:span text:style-name="T83">S</text:span><text:span text:style-name="T84">oit M</text:span><text:span text:style-name="T20">1i</text:span><text:span text:style-name="T84"> u</text:span><text:span text:style-name="T114">n</text:span><text:span text:style-name="T84"> point de l’arête </text:span><text:span text:style-name="T83">ar</text:span><text:span text:style-name="T19">1i</text:span><text:span text:style-name="T84">, </text:span><text:span text:style-name="T85">les coordonnées de </text:span><text:span text:style-name="T84">M</text:span><text:span text:style-name="T20">1i</text:span><text:span text:style-name="T84"> </text:span><text:span text:style-name="T86">sont </text:span><text:span text:style-name="T86"><draw:frame draw:style-name="fr7" draw:name="Objet25" text:anchor-type="as-char" svg:y="-0.944cm" svg:width="10.527cm" svg:height="1.801cm" draw:z-index="44"><draw:object xlink:href="./Object 25" xlink:type="simple" xlink:show="embed" xlink:actuate="onLoad"/><draw:image xlink:href="./ObjectReplacements/Object 25" xlink:type="simple" xlink:show="embed" xlink:actuate="onLoad"/></draw:frame></text:span><text:span text:style-name="T87">dans NED</text:span><text:span text:style-name="T21">1</text:span><text:span text:style-name="T87"> </text:span><text:span text:style-name="T101">avec </text:span><text:span text:style-name="T77">Φ</text:span><text:span text:style-name="T30">1i</text:span><text:span text:style-name="T102"> l’azimut de </text:span><text:soft-page-break/><text:span text:style-name="T102">l’arête considérée par rapport au nord local, </text:span><text:span text:style-name="T77">α</text:span><text:span text:style-name="T30">1i</text:span><text:span text:style-name="T102"> l’angle entre l’horizontal local et l’arête </text:span><text:span text:style-name="T103">et r la distance entre V</text:span><text:span text:style-name="T31">1</text:span><text:span text:style-name="T103"> et M</text:span><text:span text:style-name="T31">1i</text:span><text:span text:style-name="T87">. </text:span></text:p>
      <text:p text:style-name="P40"><text:span text:style-name="T90">Les transformations pour passer de NED</text:span><text:span text:style-name="T23">1</text:span><text:span text:style-name="T90"> à NED</text:span><text:span text:style-name="T23">2</text:span><text:span text:style-name="T90"> consistent en une rotation d’angle </text:span><text:span text:style-name="T90"><draw:frame draw:style-name="fr7" draw:name="Objet30" text:anchor-type="as-char" svg:y="-0.22cm" svg:width="0.603cm" svg:height="0.374cm" draw:z-index="45"><draw:object xlink:href="./Object 30" xlink:type="simple" xlink:show="embed" xlink:actuate="onLoad"/><draw:image xlink:href="./ObjectReplacements/Object 30" xlink:type="simple" xlink:show="embed" xlink:actuate="onLoad"/></draw:frame></text:span><text:span text:style-name="T90"><text:s/>autour du troisième axe </text:span><text:span text:style-name="T93">[R</text:span><text:span text:style-name="T25">z</text:span><text:span text:style-name="T93">(</text:span><text:span text:style-name="T93"><draw:frame draw:style-name="fr7" draw:name="Objet26" text:anchor-type="as-char" svg:y="-0.22cm" svg:width="0.603cm" svg:height="0.374cm" draw:z-index="46"><draw:object xlink:href="./Object 26" xlink:type="simple" xlink:show="embed" xlink:actuate="onLoad"/><draw:image xlink:href="./ObjectReplacements/Object 26" xlink:type="simple" xlink:show="embed" xlink:actuate="onLoad"/><svg:desc>formule</svg:desc></draw:frame></text:span><text:span text:style-name="T93">)]</text:span><text:span text:style-name="T90"> suivi</text:span><text:span text:style-name="T92">e</text:span><text:span text:style-name="T90"> d’une rotation d’angle </text:span><text:span text:style-name="T90"><draw:frame draw:style-name="fr7" draw:name="Objet31" text:anchor-type="as-char" svg:y="-0.305cm" svg:width="0.767cm" svg:height="0.332cm" draw:z-index="47"><draw:object xlink:href="./Object 31" xlink:type="simple" xlink:show="embed" xlink:actuate="onLoad"/><draw:image xlink:href="./ObjectReplacements/Object 31" xlink:type="simple" xlink:show="embed" xlink:actuate="onLoad"/></draw:frame></text:span><text:span text:style-name="T90">autour du second axe</text:span><text:span text:style-name="T92"> </text:span><text:span text:style-name="T93">[R</text:span><text:span text:style-name="T25">y</text:span><text:span text:style-name="T93">(</text:span><text:span text:style-name="T93"><draw:frame draw:style-name="fr7" draw:name="Objet38" text:anchor-type="as-char" svg:y="-0.305cm" svg:width="0.767cm" svg:height="0.332cm" draw:z-index="48"><draw:object xlink:href="./Object 38" xlink:type="simple" xlink:show="embed" xlink:actuate="onLoad"/><draw:image xlink:href="./ObjectReplacements/Object 38" xlink:type="simple" xlink:show="embed" xlink:actuate="onLoad"/><svg:desc>formule</svg:desc></draw:frame></text:span><text:span text:style-name="T93">)] </text:span><text:span text:style-name="T90">p</text:span><text:span text:style-name="T92">uis d’</text:span><text:span text:style-name="T90">une rotation d’angle </text:span><text:span text:style-name="T90"><draw:frame draw:style-name="fr7" draw:name="Objet32" text:anchor-type="as-char" svg:y="-0.222cm" svg:width="1.214cm" svg:height="0.376cm" draw:z-index="8"><draw:object xlink:href="./Object 32" xlink:type="simple" xlink:show="embed" xlink:actuate="onLoad"/><draw:image xlink:href="./ObjectReplacements/Object 32" xlink:type="simple" xlink:show="embed" xlink:actuate="onLoad"/><svg:desc>formule</svg:desc></draw:frame></text:span><text:span text:style-name="T93">autour du troisième axe [R</text:span><text:span text:style-name="T25">z</text:span><text:span text:style-name="T93">(</text:span><text:span text:style-name="T93"><draw:frame draw:style-name="fr7" draw:name="Objet39" text:anchor-type="as-char" svg:y="-0.222cm" svg:width="1.214cm" svg:height="0.376cm" draw:z-index="9"><draw:object xlink:href="./Object 39" xlink:type="simple" xlink:show="embed" xlink:actuate="onLoad"/><draw:image xlink:href="./ObjectReplacements/Object 39" xlink:type="simple" xlink:show="embed" xlink:actuate="onLoad"/><svg:desc>formule</svg:desc></draw:frame></text:span><text:span text:style-name="T93">)]</text:span><text:span text:style-name="T90"> </text:span><text:span text:style-name="T92">et enfin une translation de vecteur </text:span><text:span text:style-name="T92"><draw:frame draw:style-name="fr7" draw:name="Objet36" text:anchor-type="as-char" svg:y="-0.427cm" svg:width="1.185cm" svg:height="0.58cm" draw:z-index="10"><draw:object xlink:href="./Object 36" xlink:type="simple" xlink:show="embed" xlink:actuate="onLoad"/><draw:image xlink:href="./ObjectReplacements/Object 36" xlink:type="simple" xlink:show="embed" xlink:actuate="onLoad"/></draw:frame></text:span><text:span text:style-name="T92">(en espace affine)</text:span><text:span text:style-name="T90">.</text:span></text:p>
      <text:p text:style-name="P42"><text:span text:style-name="T90">L</text:span><text:span text:style-name="T54">a matrice de passage de NED</text:span><text:span text:style-name="T7">2</text:span><text:span text:style-name="T54"> à NED</text:span><text:span text:style-name="T7">1</text:span><text:span text:style-name="T54"> </text:span><text:span text:style-name="T97"><draw:frame draw:style-name="fr7" draw:name="Objet42" text:anchor-type="as-char" svg:y="-0.377cm" svg:width="2.131cm" svg:height="0.568cm" draw:z-index="11"><draw:object xlink:href="./Object 42" xlink:type="simple" xlink:show="embed" xlink:actuate="onLoad"/><draw:image xlink:href="./ObjectReplacements/Object 42" xlink:type="simple" xlink:show="embed" xlink:actuate="onLoad"/></draw:frame></text:span><text:span text:style-name="T98">en espace vectoriel </text:span><text:span text:style-name="T54">est :</text:span></text:p>
      <text:p text:style-name="P26"><draw:frame draw:style-name="fr7" draw:name="Objet43" text:anchor-type="as-char" svg:y="-1.228cm" svg:width="14.603cm" svg:height="2.387cm" draw:z-index="12"><draw:object xlink:href="./Object 43" xlink:type="simple" xlink:show="embed" xlink:actuate="onLoad"/><draw:image xlink:href="./ObjectReplacements/Object 43" xlink:type="simple" xlink:show="embed" xlink:actuate="onLoad"/></draw:frame></text:p>
      <text:p text:style-name="P51"><text:span text:style-name="T90">L’</text:span><text:span text:style-name="T93">objectif est de déterminer pour une arête </text:span><text:span text:style-name="T83">ar</text:span><text:span text:style-name="T19">1i</text:span><text:span text:style-name="T83"> </text:span><text:span text:style-name="T94">le domaine d’angles </text:span><text:span text:style-name="T94"><draw:frame draw:style-name="fr7" draw:name="Objet40" text:anchor-type="as-char" svg:y="-0.3cm" svg:width="0.764cm" svg:height="0.453cm" draw:z-index="13"><draw:object xlink:href="./Object 40" xlink:type="simple" xlink:show="embed" xlink:actuate="onLoad"/><draw:image xlink:href="./ObjectReplacements/Object 40" xlink:type="simple" xlink:show="embed" xlink:actuate="onLoad"/></draw:frame></text:span><text:span text:style-name="T94">dans lequel il est susceptible d’avoir intersection </text:span><text:span text:style-name="T96">entre l’arête considérée projetée par V</text:span><text:span text:style-name="T27">1</text:span><text:span text:style-name="T96"> et le cône réel issu de V</text:span><text:span text:style-name="T27">2</text:span><text:span text:style-name="T94">.</text:span></text:p>
      <text:p text:style-name="P43"><text:span text:style-name="T94">S</text:span><text:span text:style-name="T95">oit NED</text:span><text:span text:style-name="T26">2</text:span><text:span text:style-name="T95">’ le référentiel local en V</text:span><text:span text:style-name="T26">2</text:span><text:span text:style-name="T95"> image de NED</text:span><text:span text:style-name="T26">2</text:span><text:span text:style-name="T95"> après une rotation autour du troisième axe d’un angle </text:span><text:span text:style-name="T95"><draw:frame draw:style-name="fr7" draw:name="Objet41" text:anchor-type="as-char" svg:y="-0.22cm" svg:width="0.603cm" svg:height="0.374cm" draw:z-index="14"><draw:object xlink:href="./Object 41" xlink:type="simple" xlink:show="embed" xlink:actuate="onLoad"/><draw:image xlink:href="./ObjectReplacements/Object 41" xlink:type="simple" xlink:show="embed" xlink:actuate="onLoad"/></draw:frame></text:span><text:span text:style-name="T95">. </text:span><text:span text:style-name="T90">L</text:span><text:span text:style-name="T99">a matrice de passage de NED</text:span><text:span text:style-name="T28">2’</text:span><text:span text:style-name="T99"> à NED</text:span><text:span text:style-name="T28">1</text:span><text:span text:style-name="T99"> </text:span><text:span text:style-name="T97"><draw:frame draw:style-name="fr7" draw:name="Objet44" text:anchor-type="as-char" svg:y="-0.377cm" svg:width="2.226cm" svg:height="0.568cm" draw:z-index="15"><draw:object xlink:href="./Object 44" xlink:type="simple" xlink:show="embed" xlink:actuate="onLoad"/><draw:image xlink:href="./ObjectReplacements/Object 44" xlink:type="simple" xlink:show="embed" xlink:actuate="onLoad"/><svg:desc>formule</svg:desc></draw:frame></text:span><text:span text:style-name="T98">en espace vectoriel </text:span><text:span text:style-name="T99">est :</text:span></text:p>
      <text:p text:style-name="P27"><draw:frame draw:style-name="fr7" draw:name="Objet45" text:anchor-type="as-char" svg:y="-3.002cm" svg:width="10.084cm" svg:height="6.003cm" draw:z-index="16"><draw:object xlink:href="./Object 45" xlink:type="simple" xlink:show="embed" xlink:actuate="onLoad"/><draw:image xlink:href="./ObjectReplacements/Object 45" xlink:type="simple" xlink:show="embed" xlink:actuate="onLoad"/><svg:desc>formule</svg:desc></draw:frame></text:p>
      <text:p text:style-name="P40"><text:span text:style-name="T91">Les coordonnées V</text:span><text:span text:style-name="T24">1</text:span><text:span text:style-name="T91"> dans NED</text:span><text:span text:style-name="T24">2</text:span><text:span text:style-name="T91">’ é</text:span><text:span text:style-name="T100">tant</text:span><text:span text:style-name="T91"> </text:span><text:span text:style-name="T91"><draw:frame draw:style-name="fr7" draw:name="Objet33" text:anchor-type="as-char" svg:y="-0.965cm" svg:width="4.941cm" svg:height="1.84cm" draw:z-index="17"><draw:object xlink:href="./Object 33" xlink:type="simple" xlink:show="embed" xlink:actuate="onLoad"/><draw:image xlink:href="./ObjectReplacements/Object 33" xlink:type="simple" xlink:show="embed" xlink:actuate="onLoad"/><svg:desc>formule</svg:desc></draw:frame></text:span></text:p>
      <text:p text:style-name="P28"><text:soft-page-break/><draw:frame draw:style-name="fr7" draw:name="Objet46" text:anchor-type="as-char" svg:y="-3.166cm" svg:width="15.923cm" svg:height="6.331cm" draw:z-index="18"><draw:object xlink:href="./Object 46" xlink:type="simple" xlink:show="embed" xlink:actuate="onLoad"/><draw:image xlink:href="./ObjectReplacements/Object 46" xlink:type="simple" xlink:show="embed" xlink:actuate="onLoad"/></draw:frame></text:p>
      <text:p text:style-name="P38"><text:span text:style-name="T125">Le cône de sommet V</text:span><text:span text:style-name="T22">2</text:span><text:span text:style-name="T125"> d’angle au sommet </text:span><text:span text:style-name="T125"><draw:frame draw:style-name="fr7" draw:name="Objet28" text:anchor-type="as-char" svg:y="-0.215cm" svg:width="1.071cm" svg:height="0.37cm" draw:z-index="49"><draw:object xlink:href="./Object 28" xlink:type="simple" xlink:show="embed" xlink:actuate="onLoad"/><draw:image xlink:href="./ObjectReplacements/Object 28" xlink:type="simple" xlink:show="embed" xlink:actuate="onLoad"/></draw:frame></text:span><text:span text:style-name="T125">(respectivement </text:span><text:span text:style-name="T125"><draw:frame draw:style-name="fr7" draw:name="Objet29" text:anchor-type="as-char" svg:y="-0.215cm" svg:width="1.02cm" svg:height="0.37cm" draw:z-index="50"><draw:object xlink:href="./Object 29" xlink:type="simple" xlink:show="embed" xlink:actuate="onLoad"/><draw:image xlink:href="./ObjectReplacements/Object 29" xlink:type="simple" xlink:show="embed" xlink:actuate="onLoad"/><svg:desc>formule</svg:desc></draw:frame></text:span><text:span text:style-name="T125">) est inscrit dans le cylindre (L</text:span><text:span text:style-name="T22">2max</text:span><text:span text:style-name="T125">) (respectivement le cylindre (L</text:span><text:span text:style-name="T22">2min</text:span><text:span text:style-name="T125">)) d’axe de révolution (V</text:span><text:span text:style-name="T22">2</text:span><text:span text:style-name="T125">C) avec un rayon ayant pour valeur </text:span><text:span text:style-name="T125"><draw:frame draw:style-name="fr7" draw:name="Objet27" text:anchor-type="as-char" svg:y="-0.377cm" svg:width="7.299cm" svg:height="0.531cm" draw:z-index="51"><draw:object xlink:href="./Object 27" xlink:type="simple" xlink:show="embed" xlink:actuate="onLoad"/><draw:image xlink:href="./ObjectReplacements/Object 27" xlink:type="simple" xlink:show="embed" xlink:actuate="onLoad"/></draw:frame></text:span><text:span text:style-name="T125">et une hauteur ayant pour valeur </text:span><text:span text:style-name="T125"><draw:frame draw:style-name="fr7" draw:name="Objet47" text:anchor-type="as-char" svg:y="-0.377cm" svg:width="7.176cm" svg:height="0.531cm" draw:z-index="52"><draw:object xlink:href="./Object 47" xlink:type="simple" xlink:show="embed" xlink:actuate="onLoad"/><draw:image xlink:href="./ObjectReplacements/Object 47" xlink:type="simple" xlink:show="embed" xlink:actuate="onLoad"/><svg:desc>formule</svg:desc></draw:frame></text:span><text:span text:style-name="T125">.</text:span></text:p>
      <text:p text:style-name="P39"><draw:frame draw:style-name="fr2" draw:name="Cadre3" text:anchor-type="paragraph" svg:width="17cm" draw:z-index="5"><draw:text-box fo:min-height="12.023cm"><text:p text:style-name="P50"><draw:frame draw:style-name="fr4" draw:name="Image4" text:anchor-type="as-char" svg:width="17cm" style:rel-width="100%" svg:height="12.023cm" style:rel-height="scale" draw:z-index="53"><draw:image xlink:href="Pictures/100112600000741E00005222E4633E133D5ED420.svg" xlink:type="simple" xlink:show="embed" xlink:actuate="onLoad" draw:mime-type="image/svg+xml"/><draw:image xlink:href="Pictures/100000010000034900000253475BBA0631412D2D.png" xlink:type="simple" xlink:show="embed" xlink:actuate="onLoad" draw:mime-type="image/png"/></draw:frame><text:span text:style-name="T4"><text:line-break/></text:span>Figure <text:sequence text:ref-name="refFigure2" text:name="Figure" text:formula="ooow:Figure+1" style:num-format="1">3</text:sequence>: cylindres circonscrit<text:span text:style-name="T126">s</text:span> au cônes limites</text:p></draw:text-box></draw:frame>L’intersection d’un segment (en l’occurrence <text:span text:style-name="T124">ar</text:span><text:span text:style-name="T19">1i</text:span><text:span text:style-name="T83"> </text:span><text:span text:style-name="T54">) avec </text:span><text:span text:style-name="T88">un cône de révolution implique l’intersection de ce segment avec le cylindre circonscrit </text:span><text:span text:style-name="T89">au cône</text:span><text:span text:style-name="T88">.</text:span></text:p>
      <text:p text:style-name="P29">La recherche des points M1i appartenant à un cylindre implique :</text:p>
      <text:p text:style-name="P25"><text:soft-page-break/><draw:frame draw:style-name="fr7" draw:name="Objet34" text:anchor-type="as-char" svg:y="-0.921cm" svg:width="11.672cm" svg:height="1.81cm" draw:z-index="54"><draw:object xlink:href="./Object 34" xlink:type="simple" xlink:show="embed" xlink:actuate="onLoad"/><draw:image xlink:href="./ObjectReplacements/Object 34" xlink:type="simple" xlink:show="embed" xlink:actuate="onLoad"/></draw:frame></text:p>
      <text:p text:style-name="P30">Soit <draw:frame draw:style-name="fr7" draw:name="Objet35" text:anchor-type="as-char" svg:y="-0.377cm" svg:width="2.75cm" svg:height="0.492cm" draw:z-index="55"><draw:object xlink:href="./Object 35" xlink:type="simple" xlink:show="embed" xlink:actuate="onLoad"/><draw:image xlink:href="./ObjectReplacements/Object 35" xlink:type="simple" xlink:show="embed" xlink:actuate="onLoad"/></draw:frame>alors la recherche des points d’intersection entre l’arête et un cylindre signifie :</text:p>
      <text:p text:style-name="P30"><draw:frame draw:style-name="fr7" draw:name="Objet48" text:anchor-type="as-char" svg:y="-2.568cm" svg:width="14.766cm" svg:height="5.226cm" draw:z-index="56"><draw:object xlink:href="./Object 48" xlink:type="simple" xlink:show="embed" xlink:actuate="onLoad"/><draw:image xlink:href="./ObjectReplacements/Object 48" xlink:type="simple" xlink:show="embed" xlink:actuate="onLoad"/></draw:frame><text:span text:style-name="T140">(rel. 2)</text:span></text:p>
      <text:p text:style-name="P44"><text:span text:style-name="T115">L’équation polynomiale en r permet d’identifier au plus deux racines correspondant aux intersections entre un cylindre et l’arête. L’inégalité sur r définit aussi un domaine de validité, dans tous les cas r est un réel positif plus petit ou égal à R. De ces racines nous pouvons déduire les angles </text:span><text:span text:style-name="T79">Φ</text:span><text:span text:style-name="T33">2i,min</text:span><text:span text:style-name="T105"> et </text:span><text:span text:style-name="T79">Φ</text:span><text:span text:style-name="T33">2i,max</text:span><text:span text:style-name="T104"> (après rotation d’angle – </text:span><text:span text:style-name="T78">γ</text:span><text:span text:style-name="T32">2</text:span><text:span text:style-name="T104">) entre lesquels il est susceptible d’avoir une intersection entre l’arête i considérée et le cône réel.</text:span></text:p>
      <text:p text:style-name="P53"><text:span text:style-name="T104">L</text:span><text:span text:style-name="T107">es travaux de Tomas Moller et de Ben Trumbore (</text:span><text:span text:style-name="T106">Fast, Minimum Storage Ray/Triangle Intersection</text:span><text:span text:style-name="T107">) proposent un algorithme efficient pour déterminer le point d’intersection entre un rayon (ici l’arête [V</text:span><text:span text:style-name="T34">1</text:span><text:span text:style-name="T107">M</text:span><text:span text:style-name="T34">1i</text:span><text:span text:style-name="T107">]) et un triangle (ici formé par le sommet V</text:span><text:span text:style-name="T34">2</text:span><text:span text:style-name="T107"> et deux arêtes consécutives du cône ar</text:span><text:span text:style-name="T34">2j</text:span><text:span text:style-name="T107"> et ar</text:span><text:span text:style-name="T34">2j+1</text:span><text:span text:style-name="T107">). </text:span><text:span text:style-name="T108">Pour une arête ar1i, il suffit d’appliquer cet algorithme à toutes les facettes du cône irrégulier de sommet V2 pour en définir l’intersection (r minimum).</text:span></text:p>
      <text:h text:style-name="Heading_20_2" text:outline-level="2"><text:bookmark-start text:name="__RefHeading___Toc1114_2196019965"/>Condition <text:span text:style-name="T127">nécessaire </text:span>d’intersection entre deux cônes<text:bookmark-end text:name="__RefHeading___Toc1114_2196019965"/></text:h>
      <text:p text:style-name="P70"><text:span text:style-name="T156">Pour rappel </text:span><text:span text:style-name="T142">pour tout point de M du cône </text:span><text:span text:style-name="T144">de la ville A</text:span><text:span text:style-name="T142">, ses coordonnées dans le référentiel NED</text:span><text:span text:style-name="T36">1</text:span><text:span text:style-name="T142"> :</text:span></text:p>
      <text:p text:style-name="P55"><draw:frame draw:style-name="fr7" draw:name="Objet71" text:anchor-type="as-char" svg:y="-0.871cm" svg:width="8.925cm" svg:height="1.603cm" draw:z-index="57"><draw:object xlink:href="./Object 71" xlink:type="simple" xlink:show="embed" xlink:actuate="onLoad"/><draw:image xlink:href="./ObjectReplacements/Object 71" xlink:type="simple" xlink:show="embed" xlink:actuate="onLoad"/><svg:desc>formule</svg:desc></draw:frame></text:p>
      <text:p text:style-name="P56">Soit <draw:frame draw:style-name="fr7" draw:name="Objet72" text:anchor-type="as-char" svg:y="-0.22cm" svg:width="0.275cm" svg:height="0.326cm" draw:z-index="58"><draw:object xlink:href="./Object 72" xlink:type="simple" xlink:show="embed" xlink:actuate="onLoad"/><draw:image xlink:href="./ObjectReplacements/Object 72" xlink:type="simple" xlink:show="embed" xlink:actuate="onLoad"/></draw:frame><text:span text:style-name="T143">l’azimut de la ville B </text:span><text:span text:style-name="T144">depuis la ville A</text:span><text:span text:style-name="T143"> </text:span><text:span text:style-name="T145">et NED</text:span><text:span text:style-name="T37">1</text:span><text:span text:style-name="T145">’ le référentiel issu de la rotation de NED</text:span><text:span text:style-name="T37">1</text:span><text:span text:style-name="T145"> par un angle de </text:span><text:span text:style-name="T145"><draw:frame draw:style-name="fr7" draw:name="Objet73" text:anchor-type="as-char" svg:y="-0.22cm" svg:width="0.275cm" svg:height="0.326cm" draw:z-index="59"><draw:object xlink:href="./Object 73" xlink:type="simple" xlink:show="embed" xlink:actuate="onLoad"/><draw:image xlink:href="./ObjectReplacements/Object 73" xlink:type="simple" xlink:show="embed" xlink:actuate="onLoad"/></draw:frame></text:span><text:span text:style-name="T145">autour </text:span><text:span text:style-name="T146">du trois</text:span><text:span text:style-name="T151">i</text:span><text:span text:style-name="T146">ème axe (Down), </text:span><text:span text:style-name="T147">par le changement de variable </text:span><text:span text:style-name="T147"><draw:frame draw:style-name="fr7" draw:name="Objet74" text:anchor-type="as-char" svg:y="-0.3cm" svg:width="1.782cm" svg:height="0.453cm" draw:z-index="60"><draw:object xlink:href="./Object 74" xlink:type="simple" xlink:show="embed" xlink:actuate="onLoad"/><draw:image xlink:href="./ObjectReplacements/Object 74" xlink:type="simple" xlink:show="embed" xlink:actuate="onLoad"/></draw:frame></text:span><text:span text:style-name="T147"><text:s/>on obtient les coordonnées de M suivantes :</text:span></text:p>
      <text:p text:style-name="P56"><draw:frame draw:style-name="fr7" draw:name="Objet75" text:anchor-type="as-char" svg:y="-0.94cm" svg:width="4.334cm" svg:height="1.736cm" draw:z-index="61"><draw:object xlink:href="./Object 75" xlink:type="simple" xlink:show="embed" xlink:actuate="onLoad"/><draw:image xlink:href="./ObjectReplacements/Object 75" xlink:type="simple" xlink:show="embed" xlink:actuate="onLoad"/></draw:frame></text:p>
      <text:p text:style-name="P56"><text:soft-page-break/><draw:frame draw:style-name="fr1" draw:name="Cadre4" text:anchor-type="as-char" svg:width="17cm" draw:z-index="62"><draw:text-box fo:min-height="12.718cm"><text:p text:style-name="Figure"><draw:frame draw:style-name="fr3" draw:name="Image6" text:anchor-type="paragraph" svg:width="17cm" style:rel-width="100%" svg:height="12.718cm" style:rel-height="scale" draw:z-index="63"><draw:image xlink:href="Pictures/10000001000007E3000005F12F21F5C7F9B87144.png" xlink:type="simple" xlink:show="embed" xlink:actuate="onLoad" draw:mime-type="image/png"/></draw:frame>Figure <text:sequence text:ref-name="refFigure3" text:name="Figure" text:formula="ooow:Figure+1" style:num-format="1">4</text:sequence>: schéma dans le plan ABO avec A et B deux villes et O le centre de la Terre</text:p></draw:text-box></draw:frame></text:p>
      <text:p text:style-name="Text_20_body">Soit <draw:frame draw:style-name="fr7" draw:name="Objet76" text:anchor-type="as-char" svg:y="-0.309cm" svg:width="0.318cm" svg:height="0.333cm" draw:z-index="64"><draw:object xlink:href="./Object 76" xlink:type="simple" xlink:show="embed" xlink:actuate="onLoad"/><draw:image xlink:href="./ObjectReplacements/Object 76" xlink:type="simple" xlink:show="embed" xlink:actuate="onLoad"/></draw:frame>la distance angulaire entre les deux villes A et B alors le référentiel NED<text:span text:style-name="T7">1</text:span>’’ est l’image du référentiel NED<text:span text:style-name="T7">1</text:span>’ par rotation autour du deuxième axe (Est’) d’un angle <draw:frame draw:style-name="fr7" draw:name="Objet77" text:anchor-type="as-char" svg:y="-0.485cm" svg:width="0.746cm" svg:height="0.863cm" draw:z-index="65"><draw:object xlink:href="./Object 77" xlink:type="simple" xlink:show="embed" xlink:actuate="onLoad"/><draw:image xlink:href="./ObjectReplacements/Object 77" xlink:type="simple" xlink:show="embed" xlink:actuate="onLoad"/></draw:frame>.</text:p>
      <text:p text:style-name="Text_20_body">Les coordonnées du point M sont :</text:p>
      <text:p text:style-name="P57"><draw:frame draw:style-name="fr7" draw:name="Objet78" text:anchor-type="as-char" svg:y="-1.337cm" svg:width="8.354cm" svg:height="2.529cm" draw:z-index="66"><draw:object xlink:href="./Object 78" xlink:type="simple" xlink:show="embed" xlink:actuate="onLoad"/><draw:image xlink:href="./ObjectReplacements/Object 78" xlink:type="simple" xlink:show="embed" xlink:actuate="onLoad"/><svg:desc>formule</svg:desc></draw:frame></text:p>
      <text:p text:style-name="P58">Une condition nécessaire pour qu’il y ait intersection est que le point M se trouve dans le demi espace limité par le plan médiateur entre les deux villes et dans lequel se situe la ville B. L’inéquation de ce demi plan dans le référentiel NED<text:span text:style-name="T7">1</text:span><text:span text:style-name="T54">’’ est </text:span><text:span text:style-name="T54"><draw:frame draw:style-name="fr7" draw:name="Object1" text:anchor-type="as-char" svg:y="-0.377cm" svg:width="1.067cm" svg:height="0.467cm" draw:z-index="67"><draw:object xlink:href="./Object 79" xlink:type="simple" xlink:show="embed" xlink:actuate="onLoad"/><draw:image xlink:href="./ObjectReplacements/Object 79" xlink:type="simple" xlink:show="embed" xlink:actuate="onLoad"/></draw:frame></text:span><text:span text:style-name="T54">où AI est la distance entre la ville A et le milieu du segment [AB]. Par ailleurs </text:span><text:span text:style-name="T54"><draw:frame draw:style-name="fr7" draw:name="Object2" text:anchor-type="as-char" svg:y="-0.485cm" svg:width="2.872cm" svg:height="0.863cm" draw:z-index="68"><draw:object xlink:href="./Object 80" xlink:type="simple" xlink:show="embed" xlink:actuate="onLoad"/><draw:image xlink:href="./ObjectReplacements/Object 80" xlink:type="simple" xlink:show="embed" xlink:actuate="onLoad"/></draw:frame></text:span><text:span text:style-name="T54"><text:s/></text:span><text:span text:style-name="T116">où R</text:span><text:span text:style-name="T38">Earth</text:span><text:span text:style-name="T116"> est le rayon de la Terre. En conséquence,</text:span></text:p>
      <text:p text:style-name="P31"><draw:frame draw:style-name="fr7" draw:name="Object3" text:anchor-type="as-char" svg:y="-0.485cm" svg:width="8.864cm" svg:height="0.863cm" draw:z-index="69"><draw:object xlink:href="./Object 81" xlink:type="simple" xlink:show="embed" xlink:actuate="onLoad"/><draw:image xlink:href="./ObjectReplacements/Object 81" xlink:type="simple" xlink:show="embed" xlink:actuate="onLoad"/><svg:desc>formula</svg:desc></draw:frame></text:p>
      <text:p text:style-name="P31"><draw:frame draw:style-name="fr7" draw:name="Object4" text:anchor-type="as-char" svg:y="-0.693cm" svg:width="5.242cm" svg:height="1.071cm" draw:z-index="70"><draw:object xlink:href="./Object 82" xlink:type="simple" xlink:show="embed" xlink:actuate="onLoad"/><draw:image xlink:href="./ObjectReplacements/Object 82" xlink:type="simple" xlink:show="embed" xlink:actuate="onLoad"/><svg:desc>formula</svg:desc></draw:frame></text:p>
      <text:p text:style-name="P60"><text:soft-page-break/><text:span text:style-name="T116">P</text:span><text:span text:style-name="T54">our qu’il y ait intersection, </text:span><text:span text:style-name="T117">il faut que </text:span><text:span text:style-name="T117"><draw:frame draw:style-name="fr7" draw:name="Object5" text:anchor-type="as-char" svg:y="-0.693cm" svg:width="3.81cm" svg:height="1.071cm" draw:z-index="71"><draw:object xlink:href="./Object 83" xlink:type="simple" xlink:show="embed" xlink:actuate="onLoad"/><draw:image xlink:href="./ObjectReplacements/Object 83" xlink:type="simple" xlink:show="embed" xlink:actuate="onLoad"/><svg:desc>formula</svg:desc></draw:frame></text:span><text:span text:style-name="T117">soit compris entre -1 et 1.</text:span></text:p>
      <text:p text:style-name="P32"><draw:frame draw:style-name="fr7" draw:name="Object6" text:anchor-type="as-char" svg:y="-0.693cm" svg:width="5.285cm" svg:height="1.071cm" draw:z-index="72"><draw:object xlink:href="./Object 84" xlink:type="simple" xlink:show="embed" xlink:actuate="onLoad"/><draw:image xlink:href="./ObjectReplacements/Object 84" xlink:type="simple" xlink:show="embed" xlink:actuate="onLoad"/><svg:desc>formula</svg:desc></draw:frame></text:p>
      <text:p text:style-name="P59"><text:span text:style-name="T117"><draw:frame draw:style-name="fr7" draw:name="Object7" text:anchor-type="as-char" svg:y="-0.619cm" svg:width="8.056cm" svg:height="1.393cm" draw:z-index="73"><draw:object xlink:href="./Object 85" xlink:type="simple" xlink:show="embed" xlink:actuate="onLoad"/><draw:image xlink:href="./ObjectReplacements/Object 85" xlink:type="simple" xlink:show="embed" xlink:actuate="onLoad"/><svg:desc>formula</svg:desc></draw:frame></text:span><text:span text:style-name="T117"> : </text:span><text:span text:style-name="T118">seule l’inégalité de droite nous intéresse !</text:span></text:p>
      <text:p text:style-name="P33"><draw:frame draw:style-name="fr7" draw:name="Object8" text:anchor-type="as-char" svg:y="-0.683cm" svg:width="11.755cm" svg:height="1.062cm" draw:z-index="74"><draw:object xlink:href="./Object 86" xlink:type="simple" xlink:show="embed" xlink:actuate="onLoad"/><draw:image xlink:href="./ObjectReplacements/Object 86" xlink:type="simple" xlink:show="embed" xlink:actuate="onLoad"/><svg:desc>formula</svg:desc></draw:frame></text:p>
      <text:p text:style-name="P34">Pour rappel cosinus est une fonction paire.</text:p>
      <text:p text:style-name="P61"><text:span text:style-name="T118">D</text:span><text:span text:style-name="T54">e cette relation, on déduit </text:span><text:span text:style-name="T119">les éléments nécessaire</text:span><text:span text:style-name="T120">s</text:span><text:span text:style-name="T119"> suivants pour qu’il y ait intersection</text:span><text:span text:style-name="T54"> :</text:span></text:p>
      <text:list text:style-name="L2">
        <text:list-item>
          <text:p text:style-name="P79"><draw:frame draw:style-name="fr7" draw:name="Object9" text:anchor-type="as-char" svg:y="-0.46cm" svg:width="2.2cm" svg:height="0.644cm" draw:z-index="75"><draw:object xlink:href="./Object 87" xlink:type="simple" xlink:show="embed" xlink:actuate="onLoad"/><draw:image xlink:href="./ObjectReplacements/Object 87" xlink:type="simple" xlink:show="embed" xlink:actuate="onLoad"/></draw:frame><text:span text:style-name="T150">CONTRAINTE 1</text:span></text:p>
        </text:list-item>
        <text:list-item>
          <text:p text:style-name="P79"><draw:frame draw:style-name="fr7" draw:name="Object10" text:anchor-type="as-char" svg:y="-0.46cm" svg:width="8.079cm" svg:height="0.644cm" draw:z-index="76"><draw:object xlink:href="./Object 88" xlink:type="simple" xlink:show="embed" xlink:actuate="onLoad"/><draw:image xlink:href="./ObjectReplacements/Object 88" xlink:type="simple" xlink:show="embed" xlink:actuate="onLoad"/></draw:frame><text:span text:style-name="T150">CONTRAINTE 2</text:span></text:p>
        </text:list-item>
      </text:list>
      <text:p text:style-name="P62">Si ces conditions sont remplies, nous avons l’inéquation suivante :</text:p>
      <text:p text:style-name="P63"><draw:frame draw:style-name="fr7" draw:name="Object11" text:anchor-type="as-char" svg:y="-0.693cm" svg:width="6.04cm" svg:height="1.071cm" draw:z-index="77"><draw:object xlink:href="./Object 89" xlink:type="simple" xlink:show="embed" xlink:actuate="onLoad"/><draw:image xlink:href="./ObjectReplacements/Object 89" xlink:type="simple" xlink:show="embed" xlink:actuate="onLoad"/><svg:desc>formula</svg:desc></draw:frame></text:p>
      <text:p text:style-name="Text_20_body"><text:span text:style-name="T149">Avec</text:span><draw:frame draw:style-name="fr7" draw:name="Object18" text:anchor-type="as-char" svg:y="-0.215cm" svg:width="0.667cm" svg:height="0.37cm" draw:z-index="78"><draw:object xlink:href="./Object 96" xlink:type="simple" xlink:show="embed" xlink:actuate="onLoad"/><draw:image xlink:href="./ObjectReplacements/Object 96" xlink:type="simple" xlink:show="embed" xlink:actuate="onLoad"/><svg:desc>formula</svg:desc></draw:frame><text:bookmark-start text:name="__DdeLink__1618_3678186523"/><text:span text:style-name="T149">l’angle des transports terrestres minimum pour l’année considérée</text:span><text:bookmark-end text:name="__DdeLink__1618_3678186523"/><text:span text:style-name="T149"> </text:span><text:span text:style-name="T150">répondant aux contraintes 1 et 2</text:span><text:span text:style-name="T149">, d</text:span>ans le domaine <draw:frame draw:style-name="fr7" draw:name="Object16" text:anchor-type="as-char" svg:y="-0.386cm" svg:width="6.01cm" svg:height="0.57cm" draw:z-index="79"><draw:object xlink:href="./Object 94" xlink:type="simple" xlink:show="embed" xlink:actuate="onLoad"/><draw:image xlink:href="./ObjectReplacements/Object 94" xlink:type="simple" xlink:show="embed" xlink:actuate="onLoad"/></draw:frame>la fonction <text:span text:style-name="T148"><draw:frame draw:style-name="fr7" draw:name="Object15" text:anchor-type="as-char" svg:y="-0.467cm" svg:width="8.253cm" svg:height="0.649cm" draw:z-index="80"><draw:object xlink:href="./Object 93" xlink:type="simple" xlink:show="embed" xlink:actuate="onLoad"/><draw:image xlink:href="./ObjectReplacements/Object 93" xlink:type="simple" xlink:show="embed" xlink:actuate="onLoad"/></draw:frame></text:span><text:span text:style-name="T138">est décroissante en r et est croissante en </text:span><text:span text:style-name="T138"><draw:frame draw:style-name="fr7" draw:name="Object17" text:anchor-type="as-char" svg:y="-0.215cm" svg:width="0.282cm" svg:height="0.242cm" draw:z-index="81"><draw:object xlink:href="./Object 95" xlink:type="simple" xlink:show="embed" xlink:actuate="onLoad"/><draw:image xlink:href="./ObjectReplacements/Object 95" xlink:type="simple" xlink:show="embed" xlink:actuate="onLoad"/></draw:frame></text:span><text:span text:style-name="T138">.</text:span></text:p>
      <text:p text:style-name="P66"><text:span text:style-name="T138">E</text:span><text:span text:style-name="T137">n conséquence le maximum de la fonction </text:span><text:span text:style-name="T139">est</text:span><text:span text:style-name="T137"> </text:span><text:span text:style-name="T137"><draw:frame draw:style-name="fr7" draw:name="Object19" text:anchor-type="as-char" svg:y="-0.46cm" svg:width="7.872cm" svg:height="0.681cm" draw:z-index="82"><draw:object xlink:href="./Object 97" xlink:type="simple" xlink:show="embed" xlink:actuate="onLoad"/><draw:image xlink:href="./ObjectReplacements/Object 97" xlink:type="simple" xlink:show="embed" xlink:actuate="onLoad"/><svg:desc>formula</svg:desc></draw:frame></text:span><text:span text:style-name="T137">.</text:span></text:p>
      <text:p text:style-name="P67"><draw:frame draw:style-name="fr7" draw:name="Object12" text:anchor-type="as-char" svg:y="-0.653cm" svg:width="12.116cm" svg:height="1.215cm" draw:z-index="83"><draw:object xlink:href="./Object 90" xlink:type="simple" xlink:show="embed" xlink:actuate="onLoad"/><draw:image xlink:href="./ObjectReplacements/Object 90" xlink:type="simple" xlink:show="embed" xlink:actuate="onLoad"/></draw:frame></text:p>
      <text:h text:style-name="P77" text:outline-level="3"><text:bookmark-start text:name="__RefHeading___Toc1467_3358104299"/>TL DR<text:bookmark-end text:name="__RefHeading___Toc1467_3358104299"/></text:h>
      <text:p text:style-name="P68">Soi<text:span text:style-name="T151">en</text:span>t </text:p>
      <text:list text:style-name="L3">
        <text:list-item>
          <text:p text:style-name="P82">deux villes A et B génératrices de cônes irréguliers ;</text:p>
        </text:list-item>
        <text:list-item>
          <text:p text:style-name="P80"><draw:frame draw:style-name="fr7" draw:name="Object13" text:anchor-type="as-char" svg:y="-0.309cm" svg:width="0.318cm" svg:height="0.333cm" draw:z-index="84"><draw:object xlink:href="./Object 91" xlink:type="simple" xlink:show="embed" xlink:actuate="onLoad"/><draw:image xlink:href="./ObjectReplacements/Object 91" xlink:type="simple" xlink:show="embed" xlink:actuate="onLoad"/><svg:desc>formula</svg:desc></draw:frame><text:span text:style-name="T151">la distance angulaire entre A et B et </text:span><text:span text:style-name="T151"><draw:frame draw:style-name="fr7" draw:name="Object21" text:anchor-type="as-char" svg:y="-0.22cm" svg:width="0.275cm" svg:height="0.326cm" draw:z-index="85"><draw:object xlink:href="./Object 99" xlink:type="simple" xlink:show="embed" xlink:actuate="onLoad"/><draw:image xlink:href="./ObjectReplacements/Object 99" xlink:type="simple" xlink:show="embed" xlink:actuate="onLoad"/></draw:frame></text:span><text:span text:style-name="T152">l’azimut de la ville B depuis la ville A ;</text:span></text:p>
        </text:list-item>
        <text:list-item>
          <text:p text:style-name="P80"><draw:frame draw:style-name="fr7" draw:name="Object14" text:anchor-type="as-char" svg:y="-0.215cm" svg:width="0.282cm" svg:height="0.242cm" draw:z-index="86"><draw:object xlink:href="./Object 92" xlink:type="simple" xlink:show="embed" xlink:actuate="onLoad"/><draw:image xlink:href="./ObjectReplacements/Object 92" xlink:type="simple" xlink:show="embed" xlink:actuate="onLoad"/></draw:frame><text:span text:style-name="T151">l’élévation </text:span><text:span text:style-name="T153">de</text:span><text:span text:style-name="T151"> </text:span><text:span text:style-name="T153">l’</text:span><text:span text:style-name="T151">arête du cône </text:span><text:span text:style-name="T153">considérée </text:span><text:span text:style-name="T154">C</text:span><text:span text:style-name="T151">, </text:span><text:span text:style-name="T151"><draw:frame draw:style-name="fr7" draw:name="Object20" text:anchor-type="as-char" svg:y="-0.3cm" svg:width="0.335cm" svg:height="0.319cm" draw:z-index="87"><draw:object xlink:href="./Object 98" xlink:type="simple" xlink:show="embed" xlink:actuate="onLoad"/><draw:image xlink:href="./ObjectReplacements/Object 98" xlink:type="simple" xlink:show="embed" xlink:actuate="onLoad"/><svg:desc>formula</svg:desc></draw:frame></text:span><text:span text:style-name="T151">l’azimut de </text:span><text:span text:style-name="T153">C</text:span><text:span text:style-name="T151"> </text:span><text:span text:style-name="T152">et R la longueur des arêtes des cônes ;</text:span></text:p>
        </text:list-item>
        <text:list-item>
          <text:p text:style-name="P81"><draw:frame draw:style-name="fr7" draw:name="Object22" text:anchor-type="as-char" svg:y="-0.215cm" svg:width="1.572cm" svg:height="0.37cm" draw:z-index="88"><draw:object xlink:href="./Object 100" xlink:type="simple" xlink:show="embed" xlink:actuate="onLoad"/><draw:image xlink:href="./ObjectReplacements/Object 100" xlink:type="simple" xlink:show="embed" xlink:actuate="onLoad"/><svg:desc>formula</svg:desc></draw:frame><text:span text:style-name="T149">l’angle des transports terrestres minimum pour l’année considérée ;</text:span></text:p>
        </text:list-item>
        <text:list-item>
          <text:p text:style-name="P81"><draw:frame draw:style-name="fr7" draw:name="Object23" text:anchor-type="as-char" svg:y="-0.377cm" svg:width="0.891cm" svg:height="0.531cm" draw:z-index="89"><draw:object xlink:href="./Object 101" xlink:type="simple" xlink:show="embed" xlink:actuate="onLoad"/><draw:image xlink:href="./ObjectReplacements/Object 101" xlink:type="simple" xlink:show="embed" xlink:actuate="onLoad"/></draw:frame><text:span text:style-name="T152">le rayon de la Terre</text:span></text:p>
        </text:list-item>
      </text:list>
      <text:p text:style-name="P69">Les conditions suivantes doivent être respectées pour que C soit en intersection avec le cône généré par B :</text:p>
      <text:list text:style-name="L4">
        <text:list-item>
          <text:p text:style-name="P83"><text:soft-page-break/><draw:frame draw:style-name="fr7" draw:name="Object24" text:anchor-type="as-char" svg:y="-0.46cm" svg:width="2.2cm" svg:height="0.644cm" draw:z-index="90"><draw:object xlink:href="./Object 102" xlink:type="simple" xlink:show="embed" xlink:actuate="onLoad"/><draw:image xlink:href="./ObjectReplacements/Object 102" xlink:type="simple" xlink:show="embed" xlink:actuate="onLoad"/><svg:desc>formula</svg:desc></draw:frame><text:s/><text:span text:style-name="T155">CONTRAINTE 1</text:span></text:p>
        </text:list-item>
        <text:list-item>
          <text:p text:style-name="P83"><draw:frame draw:style-name="fr7" draw:name="Object25" text:anchor-type="as-char" svg:y="-0.46cm" svg:width="8.079cm" svg:height="0.644cm" draw:z-index="91"><draw:object xlink:href="./Object 103" xlink:type="simple" xlink:show="embed" xlink:actuate="onLoad"/><draw:image xlink:href="./ObjectReplacements/Object 103" xlink:type="simple" xlink:show="embed" xlink:actuate="onLoad"/><svg:desc>formula</svg:desc></draw:frame>. On déduit de cette contrainte <draw:frame draw:style-name="fr7" draw:name="Object27" text:anchor-type="as-char" svg:y="-0.215cm" svg:width="0.667cm" svg:height="0.37cm" draw:z-index="92"><draw:object xlink:href="./Object 105" xlink:type="simple" xlink:show="embed" xlink:actuate="onLoad"/><draw:image xlink:href="./ObjectReplacements/Object 105" xlink:type="simple" xlink:show="embed" xlink:actuate="onLoad"/></draw:frame><text:s/><text:span text:style-name="T155">qui doit être supérieur ou égal à </text:span><text:span text:style-name="T155"><draw:frame draw:style-name="fr7" draw:name="Object26" text:anchor-type="as-char" svg:y="-0.215cm" svg:width="1.572cm" svg:height="0.37cm" draw:z-index="93"><draw:object xlink:href="./Object 104" xlink:type="simple" xlink:show="embed" xlink:actuate="onLoad"/><draw:image xlink:href="./ObjectReplacements/Object 104" xlink:type="simple" xlink:show="embed" xlink:actuate="onLoad"/><svg:desc>formula</svg:desc></draw:frame></text:span><text:span text:style-name="T155"><text:s/>CONTRAINTE 2</text:span></text:p>
        </text:list-item>
        <text:list-item>
          <text:p text:style-name="P83"><draw:frame draw:style-name="fr7" draw:name="Object28" text:anchor-type="as-char" svg:y="-0.46cm" svg:width="12.568cm" svg:height="0.681cm" draw:z-index="94"><draw:object xlink:href="./Object 106" xlink:type="simple" xlink:show="embed" xlink:actuate="onLoad"/><draw:image xlink:href="./ObjectReplacements/Object 106" xlink:type="simple" xlink:show="embed" xlink:actuate="onLoad"/></draw:frame></text:p>
        </text:list-item>
      </text:list>
      <text:h text:style-name="Heading_20_2" text:outline-level="2"><text:bookmark-start text:name="__RefHeading___Toc1116_2196019965"/>Bonus game<text:bookmark-end text:name="__RefHeading___Toc1116_2196019965"/></text:h>
      <text:p text:style-name="P45"><text:span text:style-name="T128">Soit </text:span><text:span text:style-name="T128"><draw:frame draw:style-name="fr7" draw:name="Objet68" text:anchor-type="as-char" svg:y="-0.437cm" svg:width="3.011cm" svg:height="0.557cm" draw:z-index="20"><draw:object xlink:href="./Object 68" xlink:type="simple" xlink:show="embed" xlink:actuate="onLoad"/><draw:image xlink:href="./ObjectReplacements/Object 68" xlink:type="simple" xlink:show="embed" xlink:actuate="onLoad"/></draw:frame></text:span><text:span text:style-name="T128">les longitude et latitude d’une ville. Dans le repère absolu, les coordonnées d’une ville sont alors </text:span><text:span text:style-name="T128"><draw:frame draw:style-name="fr7" draw:name="Objet69" text:anchor-type="as-char" svg:y="-0.887cm" svg:width="3.143cm" svg:height="1.64cm" draw:z-index="21"><draw:object xlink:href="./Object 69" xlink:type="simple" xlink:show="embed" xlink:actuate="onLoad"/><draw:image xlink:href="./ObjectReplacements/Object 69" xlink:type="simple" xlink:show="embed" xlink:actuate="onLoad"/></draw:frame></text:span><text:span text:style-name="T128">.</text:span></text:p>
      <text:p text:style-name="P46">L’équation du plan médiateur (P) entre deux villes s’exprime de la manière suivante dans le repère absolu :</text:p>
      <text:p text:style-name="P46"><draw:frame draw:style-name="fr7" draw:name="Objet70" text:anchor-type="as-char" svg:y="-0.386cm" svg:width="15.025cm" svg:height="0.542cm" draw:z-index="22"><draw:object xlink:href="./Object 70" xlink:type="simple" xlink:show="embed" xlink:actuate="onLoad"/><draw:image xlink:href="./ObjectReplacements/Object 70" xlink:type="simple" xlink:show="embed" xlink:actuate="onLoad"/><svg:desc>formule</svg:desc></draw:frame>(EQ 1 bis)</text:p>
      <text:p text:style-name="P47">L’usage de cette équation générique permet de définir une partition de l’espace de Voronoi et nous permet de s’assurer que les cônes décrits dans <text:bookmark-ref text:reference-format="page" text:ref-name="__RefHeading___Toc909_120585349">4</text:bookmark-ref><text:s/>sont conformes.</text:p>
      <text:p text:style-name="P47"/>
      <text:h text:style-name="Heading_20_1" text:outline-level="1"><text:bookmark-start text:name="__RefHeading___Toc1166_2196019965"/>Algorithme <text:bookmark-end text:name="__RefHeading___Toc1166_2196019965"/></text:h>
      <text:p text:style-name="P48">Au niveau macro, la logique de l’algorithme pour traiter le problème est la suivante :</text:p>
      <text:list text:style-name="L5">
        <text:list-item>
          <text:p text:style-name="P87">préparation géométrique initiale</text:p>
          <text:list>
            <text:list-item>
              <text:p text:style-name="P84"><text:span text:style-name="T155">I</text:span><text:span text:style-name="T129">dentification des angles correspondant aux moyens de transport terrestre, en déduire les angles extrêmes (</text:span><text:span text:style-name="T47">α</text:span><text:span text:style-name="T35">max</text:span><text:span text:style-name="T131"> et </text:span><text:span text:style-name="T47">α</text:span><text:span text:style-name="T35">min</text:span><text:span text:style-name="T131">) sur la période considérée.</text:span></text:p>
            </text:list-item>
            <text:list-item>
              <text:p text:style-name="P88"><text:span text:style-name="T130">Déduire de </text:span><text:span text:style-name="T42">α</text:span><text:span text:style-name="T29">max</text:span><text:span text:style-name="T130"> et </text:span><text:span text:style-name="T42">α</text:span><text:span text:style-name="T29">min</text:span><text:span text:style-name="T130"> l’angle </text:span><text:span text:style-name="T42">θ</text:span><text:span text:style-name="T14">séparation</text:span><text:span text:style-name="T130"> de séparation des villes. Chaque couple de villes dont l’angle d’ouverture est plus grand que </text:span><text:span text:style-name="T42">θ</text:span><text:span text:style-name="T14">séparation</text:span><text:span text:style-name="T130"> ne sera point considéré pour la suite du traitement. </text:span></text:p>
            </text:list-item>
            <text:list-item>
              <text:p text:style-name="P89"><text:span text:style-name="T130">Pour chaque couple de villes (V</text:span><text:span text:style-name="T29">1</text:span><text:span text:style-name="T130">-V</text:span><text:span text:style-name="T29">2</text:span><text:span text:style-name="T130"> et V</text:span><text:span text:style-name="T29">2</text:span><text:span text:style-name="T130">-V</text:span><text:span text:style-name="T29">1</text:span><text:span text:style-name="T130"> sont deux couples distincts), calculer les éléments géométriques suivants :</text:span></text:p>
              <text:list>
                <text:list-item>
                  <text:p text:style-name="P90">angle d’ouverture</text:p>
                </text:list-item>
                <text:list-item>
                  <text:p text:style-name="P90">vecteur directeur unitaire dont l’origine est la première ville et pointant vers la seconde ville. Ce vecteur est exprimé dans le repère local de la première ville et dans le repère absolu.</text:p>
                </text:list-item>
                <text:list-item>
                  <text:p text:style-name="P90">Azimut de la seconde ville.</text:p>
                </text:list-item>
              </text:list>
            </text:list-item>
            <text:list-item>
              <text:p text:style-name="P91">Suppression des couples de villes qui n’auront jamais aucune intersection de cônes.</text:p>
            </text:list-item>
            <text:list-item>
              <text:p text:style-name="P85"><text:soft-page-break/><text:span text:style-name="T133">Pour chaque ville, identification des communes voisines les plus proches pour chaque secteur angulair</text:span><text:span text:style-name="T134">e</text:span><text:span text:style-name="T133"> </text:span><text:span text:style-name="T132">(voir algorithme 1 page 5 de Meshless Voronoi on the GPU.pdf). </text:span><text:span text:style-name="T135">Par exemple la ville la plus proche pour chaque secteur angulaire de 10° ou les deux villes les plus proches pour chaque secteur angulaire de 1°. (à éprouver)</text:span></text:p>
            </text:list-item>
            <text:list-item>
              <text:p text:style-name="P92">Pour chaque ville identification des distances maximales par rapport aux frontières du « pays ».</text:p>
            </text:list-item>
          </text:list>
        </text:list-item>
        <text:list-item>
          <text:p text:style-name="P93"><text:span text:style-name="T132">M</text:span><text:span text:style-name="T130">ise à jour pour une année définie</text:span></text:p>
          <text:list>
            <text:list-item>
              <text:p text:style-name="P86"><text:span text:style-name="T135">Pour chaque ville, calcul de l’angle </text:span><text:span text:style-name="T136">d’ouverture </text:span><text:span text:style-name="T47">α</text:span><text:span text:style-name="T18">i</text:span><text:span text:style-name="T47"> </text:span><text:span text:style-name="T49">c</text:span><text:span text:style-name="T48">orrespondant à</text:span><text:span text:style-name="T49"> chaque arête </text:span><text:span text:style-name="T48">et détermination du caractère régulier du cône ( cône de révolution lorsqu’il n’y a qu’un seul type de moyen de transport terrestre pour la ville) avec son angle d’ouverture unique.</text:span></text:p>
            </text:list-item>
            <text:list-item>
              <text:p text:style-name="P94"><text:span text:style-name="T48">P</text:span><text:span text:style-name="T42">our chaque ville A, déterminer deux à deux les villes proches susceptibles d’être en intersection. Puis pour chaque arête ar</text:span><text:span text:style-name="T14">i</text:span><text:span text:style-name="T62"> de la ville A </text:span><text:span text:style-name="T81">et une ville voisine concernée</text:span><text:span text:style-name="T62"> :</text:span></text:p>
              <text:list>
                <text:list-item>
                  <text:p text:style-name="P94"><text:span text:style-name="T62">si la ville A et la ville voisine génèrent des cônes réguliers avec le même angle au sommet, alors</text:span><text:span text:style-name="T80"> nous employons la relation 1 pour déterminer la longueur maximale des arêtes concernées.</text:span></text:p>
                </text:list-item>
                <text:list-item>
                  <text:p text:style-name="P95"><text:span text:style-name="T80">S</text:span><text:span text:style-name="T62">i la ville A ou la ville voisine génèrent un cône irrégulier alors </text:span><text:span text:style-name="T82">à l’aide de la relation 2, nous déterminons les arêtes de la ville voisine susceptibles d’être en intersection avec l’arête de la ville A considérée puis nous utilisons les</text:span><text:span text:style-name="T107"> travaux de Tomas Moller et de Ben Trumbore </text:span><text:span text:style-name="T109">pour calculer la longueur de l’arête par rapport à chaque facette de la ville voisine.</text:span></text:p>
                </text:list-item>
              </text:list>
            </text:list-item>
          </text:list>
        </text:list-item>
      </text:list>
      <text:p text:style-name="P54"><text:span text:style-name="T110"><text:s text:c="9"/></text:span><text:span text:style-name="T111"><text:s text:c="4"/></text:span><text:span text:style-name="T113">Traitement CPU</text:span></text:p>
      <text:p text:style-name="P54"><text:span text:style-name="T112"><text:s text:c="9"/></text:span><text:span text:style-name="T111"><text:s text:c="5"/></text:span><text:span text:style-name="T113">Traitement GP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padding="0.049cm" fo:border="none" style:shadow="none"/>
      <style:text-properties officeooo:rsid="016fe24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tandard" style:family="graphic">
      <style:graphic-properties fo:background-color="#729fcf" style:background-transparency="0%" draw:fill="solid" draw:fill-color="#729fcf"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cus" style:page-layout-name="Mpm2" draw:style-name="Mdp1"/>
    <style:master-page style:name="Focus1" style:page-layout-name="Mpm2" draw:style-name="Mdp1"/>
    <style:master-page style:name="Focus2" style:page-layout-name="Mpm2" draw:style-name="Mdp1"/>
    <style:master-page style:name="Focus3"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26T20:05:46.251540075</meta:creation-date>
    <meta:generator>LibreOffice/7.4.5.1$Linux_X86_64 LibreOffice_project/40$Build-1</meta:generator>
    <dc:date>2023-02-25T13:19:48.730412865</dc:date>
    <meta:editing-duration>P4DT22H33M50S</meta:editing-duration>
    <meta:editing-cycles>289</meta:editing-cycles>
    <meta:document-statistic meta:table-count="0" meta:image-count="5" meta:object-count="86" meta:page-count="13" meta:paragraph-count="131" meta:word-count="2305" meta:character-count="13514" meta:non-whitespace-character-count="11301"/>
  </office:meta>
</office:document-meta>
</file>

<file path=Object 1/content.xml><?xml version="1.0" encoding="utf-8"?>
<math xmlns="http://www.w3.org/1998/Math/MathML" display="block">
  <semantics>
    <mrow>
      <msub>
        <mi>α</mi>
        <mi mathvariant="italic">min</mi>
      </msub>
      <mi mathvariant="italic">et</mi>
      <msub>
        <mi>α</mi>
        <mi mathvariant="italic">max</mi>
      </msub>
    </mrow>
    <annotation encoding="StarMath 5.0">%alpha_min et %alpha_max</annotation>
  </semantics>
</math>
</file>

<file path=Object 10/content.xml><?xml version="1.0" encoding="utf-8"?>
<math xmlns="http://www.w3.org/1998/Math/MathML" display="block">
  <semantics>
    <mrow>
      <mi>M</mi>
      <mmultiscripts>
        <mrow>
          <mo fence="true" stretchy="true">(</mo>
          <mrow>
            <mtable>
              <mtr>
                <mtd>
                  <mi>x</mi>
                </mtd>
              </mtr>
              <mtr>
                <mtd>
                  <mi>y</mi>
                </mtd>
              </mtr>
              <mtr>
                <mtd>
                  <mi>z</mi>
                </mtd>
              </mtr>
            </mtable>
          </mrow>
          <mo fence="true" stretchy="true">)</mo>
        </mrow>
        <mprescripts/>
        <msub>
          <mi mathvariant="italic">NED</mi>
          <mn>1</mn>
        </msub>
        <none/>
      </mmultiscripts>
      <mrow>
        <mtext> </mtext>
        <mo stretchy="false">∈</mo>
        <mtext> </mtext>
      </mrow>
      <mrow>
        <mo fence="true" stretchy="false">(</mo>
        <mrow>
          <mi>P</mi>
        </mrow>
        <mo fence="true" stretchy="false">)</mo>
      </mrow>
      <mi mathvariant="italic">et</mi>
      <mi>R</mi>
      <mtext>le rayon de la Terre</mtext>
    </mrow>
    <annotation encoding="StarMath 5.0">M left ( stack{x# y # z}  right )  lsub{NED_1} " " in " " ( P ) et R "le rayon de la Terre"</annotation>
  </semantics>
</math>
</file>

<file path=Object 100/content.xml><?xml version="1.0" encoding="utf-8"?>
<math xmlns="http://www.w3.org/1998/Math/MathML">
  <semantics>
    <msub>
      <mi>α</mi>
      <mi mathvariant="italic">minTerrestre</mi>
    </msub>
    <annotation encoding="StarMath 5.0">%alpha_{minTerrestre}</annotation>
  </semantics>
</math>
</file>

<file path=Object 101/content.xml><?xml version="1.0" encoding="utf-8"?>
<math xmlns="http://www.w3.org/1998/Math/MathML" display="block">
  <semantics>
    <msub>
      <mi>R</mi>
      <mi mathvariant="italic">Earth</mi>
    </msub>
    <annotation encoding="StarMath 5.0">R_{Earth}</annotation>
  </semantics>
</math>
</file>

<file path=Object 102/content.xml><?xml version="1.0" encoding="utf-8"?>
<math xmlns="http://www.w3.org/1998/Math/MathML">
  <semantics>
    <mrow>
      <mfrac>
        <msub>
          <mi>R</mi>
          <mi mathvariant="italic">Earth</mi>
        </msub>
        <mi>R</mi>
      </mfrac>
      <mn>.</mn>
      <mi>sin</mi>
      <mrow>
        <mfrac>
          <mi mathvariant="normal">Θ</mi>
          <mn>2</mn>
        </mfrac>
        <mo stretchy="false">≤</mo>
        <mn>1</mn>
      </mrow>
    </mrow>
    <annotation encoding="StarMath 5.0">R_{Earth} over R. sin %THETA  over 2&lt;=1</annotation>
  </semantics>
</math>
</file>

<file path=Object 103/content.xml><?xml version="1.0" encoding="utf-8"?>
<math xmlns="http://www.w3.org/1998/Math/MathML">
  <semantics>
    <mrow>
      <mi mathvariant="italic">arcos</mi>
      <mrow>
        <mrow>
          <mrow>
            <mo fence="true" form="prefix" stretchy="false">(</mo>
            <mrow>
              <mrow>
                <mfrac>
                  <msub>
                    <mi>R</mi>
                    <mi mathvariant="italic">Earth</mi>
                  </msub>
                  <mi>r</mi>
                </mfrac>
                <mn>.</mn>
                <mi>sin</mi>
                <mfrac>
                  <mi mathvariant="normal">Θ</mi>
                  <mn>2</mn>
                </mfrac>
              </mrow>
            </mrow>
            <mo fence="true" form="postfix" stretchy="false">)</mo>
          </mrow>
          <mo stretchy="false">−</mo>
          <mfrac>
            <mi mathvariant="normal">Θ</mi>
            <mn>2</mn>
          </mfrac>
        </mrow>
        <mo stretchy="false">≥</mo>
        <mi>α</mi>
        <mo stretchy="false">≥</mo>
        <mrow>
          <mfrac>
            <mi mathvariant="normal">Θ</mi>
            <mn>2</mn>
          </mfrac>
          <mo stretchy="false">−</mo>
          <mi mathvariant="italic">arcos</mi>
        </mrow>
      </mrow>
      <mrow>
        <mo fence="true" form="prefix" stretchy="false">(</mo>
        <mrow>
          <mrow>
            <mfrac>
              <msub>
                <mi>R</mi>
                <mi mathvariant="italic">Earth</mi>
              </msub>
              <mi>r</mi>
            </mfrac>
            <mn>.</mn>
            <mi>sin</mi>
            <mfrac>
              <mi mathvariant="normal">Θ</mi>
              <mn>2</mn>
            </mfrac>
          </mrow>
        </mrow>
        <mo fence="true" form="postfix" stretchy="false">)</mo>
      </mrow>
    </mrow>
    <annotation encoding="StarMath 5.0">arcos(R_{Earth} over r. sin %THETA  over 2)-%THETA over 2 &gt;=%alpha&gt;=%THETA over 2-arcos(R_{Earth} over r. sin %THETA  over 2)</annotation>
  </semantics>
</math>
</file>

<file path=Object 104/content.xml><?xml version="1.0" encoding="utf-8"?>
<math xmlns="http://www.w3.org/1998/Math/MathML">
  <semantics>
    <msub>
      <mi>α</mi>
      <mi mathvariant="italic">minTerrestre</mi>
    </msub>
    <annotation encoding="StarMath 5.0">%alpha_{minTerrestre}</annotation>
  </semantics>
</math>
</file>

<file path=Object 105/content.xml><?xml version="1.0" encoding="utf-8"?>
<math xmlns="http://www.w3.org/1998/Math/MathML">
  <semantics>
    <msub>
      <mi>α</mi>
      <mi mathvariant="italic">min</mi>
    </msub>
    <annotation encoding="StarMath 5.0">%alpha_{min}</annotation>
  </semantics>
</math>
</file>

<file path=Object 106/content.xml><?xml version="1.0" encoding="utf-8"?>
<math xmlns="http://www.w3.org/1998/Math/MathML">
  <semantics>
    <mrow>
      <mrow>
        <mi>γ</mi>
        <mo stretchy="false">−</mo>
        <mi mathvariant="italic">arcos</mi>
      </mrow>
      <mrow>
        <mrow>
          <mo fence="true" form="prefix" stretchy="false">(</mo>
          <mrow>
            <mrow>
              <mi>tan</mi>
              <mfrac>
                <mi mathvariant="normal">Θ</mi>
                <mn>2</mn>
              </mfrac>
              <mrow>
                <mo fence="true" form="prefix" stretchy="false">(</mo>
                <mrow>
                  <mrow>
                    <mrow>
                      <mfrac>
                        <msub>
                          <mi>R</mi>
                          <mi mathvariant="italic">Earth</mi>
                        </msub>
                        <mrow>
                          <mi>R</mi>
                          <mn>.</mn>
                          <mi>cos</mi>
                          <msub>
                            <mi>α</mi>
                            <mi mathvariant="italic">min</mi>
                          </msub>
                        </mrow>
                      </mfrac>
                      <mo stretchy="false">+</mo>
                      <mi>tan</mi>
                    </mrow>
                    <msub>
                      <mi>α</mi>
                      <mi mathvariant="italic">min</mi>
                    </msub>
                  </mrow>
                </mrow>
                <mo fence="true" form="postfix" stretchy="false">)</mo>
              </mrow>
            </mrow>
          </mrow>
          <mo fence="true" form="postfix" stretchy="false">)</mo>
        </mrow>
        <mo stretchy="false">≤</mo>
        <mi mathvariant="normal">Φ</mi>
        <mo stretchy="false">≤</mo>
        <mi mathvariant="italic">arcos</mi>
      </mrow>
      <mrow>
        <mrow>
          <mo fence="true" form="prefix" stretchy="false">(</mo>
          <mrow>
            <mrow>
              <mi>tan</mi>
              <mfrac>
                <mi mathvariant="normal">Θ</mi>
                <mn>2</mn>
              </mfrac>
              <mrow>
                <mo fence="true" form="prefix" stretchy="false">(</mo>
                <mrow>
                  <mrow>
                    <mrow>
                      <mfrac>
                        <msub>
                          <mi>R</mi>
                          <mi mathvariant="italic">Earth</mi>
                        </msub>
                        <mrow>
                          <mi>R</mi>
                          <mn>.</mn>
                          <mi>cos</mi>
                          <msub>
                            <mi>α</mi>
                            <mi mathvariant="italic">min</mi>
                          </msub>
                        </mrow>
                      </mfrac>
                      <mo stretchy="false">+</mo>
                      <mi>tan</mi>
                    </mrow>
                    <msub>
                      <mi>α</mi>
                      <mi mathvariant="italic">min</mi>
                    </msub>
                  </mrow>
                </mrow>
                <mo fence="true" form="postfix" stretchy="false">)</mo>
              </mrow>
            </mrow>
          </mrow>
          <mo fence="true" form="postfix" stretchy="false">)</mo>
        </mrow>
        <mo stretchy="false">+</mo>
        <mi>γ</mi>
      </mrow>
    </mrow>
    <annotation encoding="StarMath 5.0">%gamma-arcos(tan %THETA  over 2 (R_{Earth} over {R.cos%alpha_{min}}+tan%alpha_{min})) &lt;=%PHI&lt;= arcos(tan %THETA  over 2 (R_{Earth} over {R.cos%alpha_{min}}+tan%alpha_{min}))+%gamma</annotation>
  </semantics>
</math>
</file>

<file path=Object 11/content.xml><?xml version="1.0" encoding="utf-8"?>
<math xmlns="http://www.w3.org/1998/Math/MathML" display="block">
  <semantics>
    <mrow>
      <mrow>
        <mover accent="true">
          <mi mathvariant="italic">CM</mi>
          <mo stretchy="true">⃗</mo>
        </mover>
        <mo stretchy="false">⊥</mo>
        <mover accent="true">
          <mi>n</mi>
          <mo stretchy="true">⃗</mo>
        </mover>
      </mrow>
      <mtext> et </mtext>
      <mrow>
        <mi>C</mi>
        <mo stretchy="false">=</mo>
        <mmultiscripts>
          <mrow>
            <mo fence="true" stretchy="true">(</mo>
            <mrow>
              <mtable>
                <mtr>
                  <mtd>
                    <mn>0</mn>
                  </mtd>
                </mtr>
                <mtr>
                  <mtd>
                    <mn>0</mn>
                  </mtd>
                </mtr>
                <mtr>
                  <mtd>
                    <mi>R</mi>
                  </mtd>
                </mtr>
              </mtable>
            </mrow>
            <mo fence="true" stretchy="true">)</mo>
          </mrow>
          <mprescripts/>
          <msub>
            <mi mathvariant="italic">NED</mi>
            <mn>1</mn>
          </msub>
          <none/>
        </mmultiscripts>
      </mrow>
    </mrow>
    <annotation encoding="StarMath 5.0">widevec {CM}  ortho   widevec {n} " et " C = left ( stack{0 # 0 # R}  right )  lsub{NED_1} </annotation>
  </semantics>
</math>
</file>

<file path=Object 12/content.xml><?xml version="1.0" encoding="utf-8"?>
<math xmlns="http://www.w3.org/1998/Math/MathML" display="block">
  <semantics>
    <mrow>
      <mi>cos</mi>
      <mi>γ</mi>
      <mn>.</mn>
      <mi>cos</mi>
      <mfrac>
        <mi>θ</mi>
        <mn>2</mn>
      </mfrac>
      <mn>.</mn>
      <mrow>
        <mi>x</mi>
        <mo stretchy="false">+</mo>
        <mi>sin</mi>
      </mrow>
      <mi>γ</mi>
      <mn>.</mn>
      <mi>cos</mi>
      <mfrac>
        <mi>θ</mi>
        <mn>2</mn>
      </mfrac>
      <mn>.</mn>
      <mrow>
        <mi>y</mi>
        <mo stretchy="false">+</mo>
        <mi>sin</mi>
      </mrow>
      <mfrac>
        <mi>θ</mi>
        <mn>2</mn>
      </mfrac>
      <mn>.</mn>
      <mrow>
        <mrow>
          <mo fence="true" stretchy="false">(</mo>
          <mrow>
            <mrow>
              <mi>z</mi>
              <mo stretchy="false">−</mo>
              <mi>R</mi>
            </mrow>
          </mrow>
          <mo fence="true" stretchy="false">)</mo>
        </mrow>
        <mo stretchy="false">=</mo>
        <mn>0</mn>
      </mrow>
    </mrow>
    <annotation encoding="StarMath 5.0">cos%gamma .cos{%theta}over{2} .x + sin%gamma .cos{%theta}over{2} .y+ sin{%theta}over{2} .( z-R )=0</annotation>
  </semantics>
</math>
</file>

<file path=Object 13/content.xml><?xml version="1.0" encoding="utf-8"?>
<math xmlns="http://www.w3.org/1998/Math/MathML" display="block">
  <semantics>
    <mrow>
      <mi>A</mi>
      <mmultiscripts>
        <mrow>
          <mo fence="true" stretchy="true">(</mo>
          <mrow>
            <mtable>
              <mtr>
                <mtd>
                  <msub>
                    <mi>x</mi>
                    <mi>A</mi>
                  </msub>
                </mtd>
              </mtr>
              <mtr>
                <mtd>
                  <msub>
                    <mi>y</mi>
                    <mi>A</mi>
                  </msub>
                </mtd>
              </mtr>
              <mtr>
                <mtd>
                  <msub>
                    <mi>z</mi>
                    <mi>A</mi>
                  </msub>
                </mtd>
              </mtr>
            </mtable>
          </mrow>
          <mo fence="true" stretchy="true">)</mo>
        </mrow>
        <mprescripts/>
        <msub>
          <mi mathvariant="italic">NED</mi>
          <mn>1</mn>
        </msub>
        <none/>
      </mmultiscripts>
    </mrow>
    <annotation encoding="StarMath 5.0">A left ( stack{x_A# y_A # z_A}  right )  lsub{NED_1} </annotation>
  </semantics>
</math>
</file>

<file path=Object 14/content.xml><?xml version="1.0" encoding="utf-8"?>
<math xmlns="http://www.w3.org/1998/Math/MathML" display="block">
  <semantics>
    <mrow>
      <msub>
        <mi>d</mi>
        <mrow>
          <mi>A</mi>
          <mi>,</mi>
          <mi>P</mi>
        </mrow>
      </msub>
      <mo stretchy="false">=</mo>
      <mrow>
        <mo fence="true" stretchy="true">|</mo>
        <mrow>
          <mrow>
            <mi>cos</mi>
            <mi>γ</mi>
            <mn>.</mn>
            <mi>cos</mi>
            <mfrac>
              <mi>θ</mi>
              <mn>2</mn>
            </mfrac>
            <mn>.</mn>
            <mrow>
              <msub>
                <mi>x</mi>
                <mi>A</mi>
              </msub>
              <mo stretchy="false">+</mo>
              <mi>sin</mi>
            </mrow>
            <mi>γ</mi>
            <mn>.</mn>
            <mi>cos</mi>
            <mfrac>
              <mi>θ</mi>
              <mn>2</mn>
            </mfrac>
            <mn>.</mn>
            <mrow>
              <msub>
                <mi>y</mi>
                <mi>A</mi>
              </msub>
              <mo stretchy="false">+</mo>
              <mi>sin</mi>
            </mrow>
            <mfrac>
              <mi>θ</mi>
              <mn>2</mn>
            </mfrac>
            <mn>.</mn>
            <mrow>
              <mo fence="true" stretchy="false">(</mo>
              <mrow>
                <mrow>
                  <msub>
                    <mi>z</mi>
                    <mi>A</mi>
                  </msub>
                  <mo stretchy="false">−</mo>
                  <mi>R</mi>
                </mrow>
              </mrow>
              <mo fence="true" stretchy="false">)</mo>
            </mrow>
          </mrow>
        </mrow>
        <mo fence="true" stretchy="true">|</mo>
      </mrow>
    </mrow>
    <annotation encoding="StarMath 5.0">d_{A,P }= abs{cos%gamma .cos{%theta}over{2} .x_A + sin%gamma .cos{%theta}over{2} .y_A+ sin{%theta}over{2} .( z_A-R )}  </annotation>
  </semantics>
</math>
</file>

<file path=Object 15/content.xml><?xml version="1.0" encoding="utf-8"?>
<math xmlns="http://www.w3.org/1998/Math/MathML" display="block">
  <semantics>
    <mstyle mathsize="10pt">
      <mrow>
        <msub>
          <mi>d</mi>
          <mrow>
            <msub>
              <mi>M</mi>
              <mn>1</mn>
            </msub>
            <mi>,</mi>
            <mi>P</mi>
          </mrow>
        </msub>
        <mo stretchy="false">=</mo>
        <mrow>
          <mo fence="true" stretchy="true">|</mo>
          <mrow>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n>.</mn>
              <mrow>
                <mo fence="true" stretchy="false">(</mo>
                <mrow>
                  <mrow>
                    <mi>r</mi>
                    <mn>.</mn>
                    <mi>sin</mi>
                    <mrow>
                      <mi>α</mi>
                      <mo stretchy="false">−</mo>
                      <mi>R</mi>
                    </mrow>
                  </mrow>
                </mrow>
                <mo fence="true" stretchy="false">)</mo>
              </mrow>
            </mrow>
          </mrow>
          <mo fence="true" stretchy="true">|</mo>
        </mrow>
      </mrow>
    </mstyle>
    <annotation encoding="StarMath 5.0">size 10 { d_{M_1,P }= abs{cos%gamma .cos{%theta}over{2} .r.cos%PHI .cos%alpha
+sin%gamma .cos{%theta}over{2}.r.sin%PHI .cos%alpha+  
sin{%theta}over{2} .( r.sin%alpha-R )}}  </annotation>
  </semantics>
</math>
</file>

<file path=Object 16/content.xml><?xml version="1.0" encoding="utf-8"?>
<math xmlns="http://www.w3.org/1998/Math/MathML" display="block">
  <semantics>
    <mrow>
      <mtext>avec </mtext>
      <mrow>
        <mi>t</mi>
        <mo stretchy="false">=</mo>
        <mi>tan</mi>
      </mrow>
      <mfrac>
        <mi mathvariant="normal">Φ</mi>
        <mn>2</mn>
      </mfrac>
      <mtext>, </mtext>
      <mi>sin</mi>
      <mrow>
        <mi mathvariant="normal">Φ</mi>
        <mo stretchy="false">=</mo>
        <mfrac>
          <mrow>
            <mn>2.</mn>
            <mi>t</mi>
          </mrow>
          <mrow>
            <mn>1</mn>
            <mo stretchy="false">+</mo>
            <msup>
              <mi>t</mi>
              <mn>2</mn>
            </msup>
          </mrow>
        </mfrac>
      </mrow>
      <mtext> et </mtext>
      <mi>cos</mi>
      <mrow>
        <mi mathvariant="normal">Φ</mi>
        <mo stretchy="false">=</mo>
        <mfrac>
          <mrow>
            <mn>1</mn>
            <mo stretchy="false">−</mo>
            <msup>
              <mi>t</mi>
              <mn>2</mn>
            </msup>
          </mrow>
          <mrow>
            <mn>1</mn>
            <mo stretchy="false">+</mo>
            <msup>
              <mi>t</mi>
              <mn>2</mn>
            </msup>
          </mrow>
        </mfrac>
      </mrow>
    </mrow>
    <annotation encoding="StarMath 5.0">"avec " t= tan%PHI over {2}", "sin%PHI={ 2.t }over{ 1+t^2 }  " et " cos%PHI={ 1-t^2 }over{ 1+t^2 }</annotation>
  </semantics>
</math>
</file>

<file path=Object 17/content.xml><?xml version="1.0" encoding="utf-8"?>
<math xmlns="http://www.w3.org/1998/Math/MathML" display="block">
  <semantics>
    <mtable>
      <mtr>
        <mtd>
          <mn>0</mn>
        </mtd>
        <mtd>
          <mtext>=</mtext>
        </mtd>
        <mtd>
          <mrow>
            <mo fence="true" stretchy="false">[</mo>
            <mrow>
              <mrow>
                <mi>sin</mi>
                <mfrac>
                  <mi>θ</mi>
                  <mn>2</mn>
                </mfrac>
                <mn>.</mn>
                <mrow>
                  <mrow>
                    <mo fence="true" stretchy="false">(</mo>
                    <mrow>
                      <mrow>
                        <mi>r</mi>
                        <mn>.</mn>
                        <mi>sin</mi>
                        <mrow>
                          <mi>α</mi>
                          <mo stretchy="false">−</mo>
                          <mi>R</mi>
                        </mrow>
                      </mrow>
                    </mrow>
                    <mo fence="true" stretchy="false">)</mo>
                  </mrow>
                  <mo stretchy="false">−</mo>
                  <mi>cos</mi>
                </mrow>
                <mfrac>
                  <mi>θ</mi>
                  <mn>2.</mn>
                </mfrac>
                <mi>cos</mi>
                <mi>γ</mi>
                <mn>.</mn>
                <mi>r</mi>
                <mn>.</mn>
                <mi>cos</mi>
                <mi>α</mi>
              </mrow>
            </mrow>
            <mo fence="true" stretchy="false">]</mo>
          </mrow>
        </mtd>
        <mtd>
          <msup>
            <mi>t</mi>
            <mn>2</mn>
          </msup>
        </mtd>
      </mtr>
      <mtr>
        <mtd>
          <mspace width="2em"/>
        </mtd>
        <mtd>
          <mtext>+</mtext>
        </mtd>
        <mtd>
          <mrow>
            <mn>2.</mn>
            <mi>sin</mi>
            <mi>γ</mi>
            <mi>cos</mi>
            <mfrac>
              <mi>θ</mi>
              <mn>2</mn>
            </mfrac>
            <mn>.</mn>
            <mi>r</mi>
            <mn>.</mn>
            <mi>cos</mi>
            <mi>α</mi>
          </mrow>
        </mtd>
        <mtd>
          <mi>t</mi>
        </mtd>
      </mtr>
      <mtr>
        <mtd>
          <mspace width="2em"/>
        </mtd>
        <mtd>
          <mtext>+</mtext>
        </mtd>
        <mtd>
          <mrow>
            <mi>cos</mi>
            <mi>γ</mi>
            <mn>.</mn>
            <mi>cos</mi>
            <mfrac>
              <mi>θ</mi>
              <mn>2</mn>
            </mfrac>
            <mn>.</mn>
            <mi>r</mi>
            <mn>.</mn>
            <mi>cos</mi>
            <mrow>
              <mi>α</mi>
              <mo stretchy="false">+</mo>
              <mi>sin</mi>
            </mrow>
            <mfrac>
              <mi>θ</mi>
              <mn>2</mn>
            </mfrac>
            <mn>.</mn>
            <mrow>
              <mo fence="true" stretchy="false">(</mo>
              <mrow>
                <mrow>
                  <mi>r</mi>
                  <mn>.</mn>
                  <mi>sin</mi>
                  <mrow>
                    <mi>α</mi>
                    <mo stretchy="false">−</mo>
                    <mi>R</mi>
                  </mrow>
                </mrow>
              </mrow>
              <mo fence="true" stretchy="false">)</mo>
            </mrow>
          </mrow>
        </mtd>
        <mtd>
          <mspace width="2em"/>
        </mtd>
      </mtr>
    </mtable>
    <annotation encoding="StarMath 5.0">matrix{0 # "=" # [ sin %theta over 2 .(r.sin%alpha -R)-cos%theta over 2.cos%gamma .r.cos%alpha] # t^2 ##
~ # "+" #  2. sin%gamma cos%theta over 2 .r. cos%alpha  # t  ##
~# "+" # cos%gamma . cos%theta over 2  .r.cos%alpha+sin %theta over 2 .(r.sin%alpha -R)# ~}</annotation>
  </semantics>
</math>
</file>

<file path=Object 18/content.xml><?xml version="1.0" encoding="utf-8"?>
<math xmlns="http://www.w3.org/1998/Math/MathML" display="block">
  <semantics>
    <mover accent="true">
      <mi>n</mi>
      <mo stretchy="true">⃗</mo>
    </mover>
    <annotation encoding="StarMath 5.0">widevec {n} </annotation>
  </semantics>
</math>
</file>

<file path=Object 19/content.xml><?xml version="1.0" encoding="utf-8"?>
<math xmlns="http://www.w3.org/1998/Math/MathML" display="block">
  <semantics>
    <mrow>
      <mi mathvariant="normal">Φ</mi>
      <mo stretchy="false">=</mo>
      <mi>γ</mi>
    </mrow>
    <annotation encoding="StarMath 5.0">%PHI=%gamma</annotation>
  </semantics>
</math>
</file>

<file path=Object 2/content.xml><?xml version="1.0" encoding="utf-8"?>
<math xmlns="http://www.w3.org/1998/Math/MathML" display="block">
  <semantics>
    <mrow>
      <mrow>
        <mrow>
          <msubsup>
            <mi>x</mi>
            <mn>1</mn>
            <mn>2</mn>
          </msubsup>
          <mo stretchy="false">+</mo>
          <msubsup>
            <mi>y</mi>
            <mn>1</mn>
            <mn>2</mn>
          </msubsup>
        </mrow>
        <mo stretchy="false">=</mo>
        <msubsup>
          <mi>z</mi>
          <mn>1</mn>
          <mn>2</mn>
        </msubsup>
      </mrow>
      <msup>
        <mi>tan</mi>
        <mn>2</mn>
      </msup>
      <mrow>
        <mo fence="true" stretchy="false">(</mo>
        <mrow>
          <mrow>
            <mrow>
              <mi>π</mi>
              <mo stretchy="false">/</mo>
              <mn>2</mn>
            </mrow>
            <mo stretchy="false">−</mo>
            <mi>α</mi>
          </mrow>
        </mrow>
        <mo fence="true" stretchy="false">)</mo>
      </mrow>
    </mrow>
    <annotation encoding="StarMath 5.0">x_1^2+y_1^2=z_1^2 tan^2(%pi/2-%alpha  )</annotation>
  </semantics>
</math>
</file>

<file path=Object 20/content.xml><?xml version="1.0" encoding="utf-8"?>
<math xmlns="http://www.w3.org/1998/Math/MathML" display="block">
  <semantics>
    <mrow>
      <msub>
        <mi mathvariant="normal">Φ</mi>
        <mi mathvariant="italic">min</mi>
      </msub>
      <mtext> et </mtext>
      <msub>
        <mi mathvariant="normal">Φ</mi>
        <mi mathvariant="italic">max</mi>
      </msub>
    </mrow>
    <annotation encoding="StarMath 5.0">%PHI_min " et " %PHI_max</annotation>
  </semantics>
</math>
</file>

<file path=Object 21/content.xml><?xml version="1.0" encoding="utf-8"?>
<math xmlns="http://www.w3.org/1998/Math/MathML" display="block">
  <semantics>
    <mstyle mathsize="11pt">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row>
          <mrow>
            <mo fence="true" stretchy="false">(</mo>
            <mrow>
              <mrow>
                <mi>r</mi>
                <mn>.</mn>
                <mi>sin</mi>
                <mrow>
                  <mi>α</mi>
                  <mo stretchy="false">−</mo>
                  <mi>R</mi>
                </mrow>
              </mrow>
            </mrow>
            <mo fence="true" stretchy="false">)</mo>
          </mrow>
          <mo stretchy="false">=</mo>
          <mn>0</mn>
        </mrow>
      </mrow>
    </mstyle>
    <annotation encoding="StarMath 5.0">size 11 {cos%gamma .cos{%theta}over{2}.r.cos%PHI .cos%alpha
+sin%gamma .cos{%theta}over{2}.r.sin%PHI .cos%alpha+  
sin{%theta}over{2}( r.sin%alpha-R )= 0}</annotation>
  </semantics>
</math>
</file>

<file path=Object 22/content.xml><?xml version="1.0" encoding="utf-8"?>
<math xmlns="http://www.w3.org/1998/Math/MathML" display="block">
  <semantics>
    <mtable>
      <mtr>
        <mtd>
          <mrow>
            <mi>r</mi>
            <mo stretchy="false">=</mo>
            <mfrac>
              <mi>R</mi>
              <mrow>
                <mi>cos</mi>
                <mi>γ</mi>
                <mn>.</mn>
                <mi>cos</mi>
                <mfrac>
                  <mi>θ</mi>
                  <mn>2</mn>
                </mfrac>
                <mn>.</mn>
                <mi>cos</mi>
                <mi mathvariant="normal">Φ</mi>
                <mn>.</mn>
                <mi>cos</mi>
                <mrow>
                  <mi>α</mi>
                  <mo stretchy="false">+</mo>
                  <mi>sin</mi>
                </mrow>
                <mi>γ</mi>
                <mn>.</mn>
                <mi>cos</mi>
                <mfrac>
                  <mi>θ</mi>
                  <mn>2</mn>
                </mfrac>
                <mn>.</mn>
                <mi>sin</mi>
                <mi mathvariant="normal">Φ</mi>
                <mn>.</mn>
                <mi>cos</mi>
                <mrow>
                  <mi>α</mi>
                  <mo stretchy="false">+</mo>
                  <mi>sin</mi>
                </mrow>
                <mfrac>
                  <mi>θ</mi>
                  <mn>2</mn>
                </mfrac>
                <mi>sin</mi>
                <mi>α</mi>
              </mrow>
            </mfrac>
          </mrow>
        </mtd>
      </mtr>
      <mtr>
        <mtd>
          <mrow>
            <mspace width="2em"/>
            <mo stretchy="false">=</mo>
            <mfrac>
              <mi>R</mi>
              <mrow>
                <mi>cos</mi>
                <mrow>
                  <mo fence="true" stretchy="false">(</mo>
                  <mrow>
                    <mrow>
                      <mi>γ</mi>
                      <mo stretchy="false">−</mo>
                      <mi mathvariant="normal">Φ</mi>
                    </mrow>
                  </mrow>
                  <mo fence="true" stretchy="false">)</mo>
                </mrow>
                <mn>.</mn>
                <mi>cos</mi>
                <mfrac>
                  <mi>θ</mi>
                  <mn>2</mn>
                </mfrac>
                <mn>.</mn>
                <mi>cos</mi>
                <mrow>
                  <mi>α</mi>
                  <mo stretchy="false">+</mo>
                  <mi>sin</mi>
                </mrow>
                <mfrac>
                  <mi>θ</mi>
                  <mn>2</mn>
                </mfrac>
                <mi>sin</mi>
                <mi>α</mi>
              </mrow>
            </mfrac>
          </mrow>
        </mtd>
      </mtr>
    </mtable>
    <annotation encoding="StarMath 5.0">r=R over{ cos%gamma .cos{%theta}over{2}.cos%PHI .cos%alpha
+sin%gamma .cos{%theta}over{2}.sin%PHI .cos%alpha+  
sin{%theta}over{2} sin%alpha } newline
~=R over{ cos(%gamma-%PHI ).cos{%theta}over{2} .cos%alpha+  sin{%theta}over{2} sin%alpha }</annotation>
  </semantics>
</math>
</file>

<file path=Object 23/content.xml><?xml version="1.0" encoding="utf-8"?>
<math xmlns="http://www.w3.org/1998/Math/MathML" display="block">
  <semantics>
    <mrow>
      <msub>
        <mi>α</mi>
        <mrow>
          <mi mathvariant="italic">min</mi>
          <mn>1</mn>
        </mrow>
      </msub>
      <mi mathvariant="italic">et</mi>
      <msub>
        <mi>α</mi>
        <mrow>
          <mi mathvariant="italic">max</mi>
          <mn>1</mn>
        </mrow>
      </msub>
    </mrow>
    <annotation encoding="StarMath 5.0">%alpha_min1 et %alpha_max1</annotation>
  </semantics>
</math>
</file>

<file path=Object 24/content.xml><?xml version="1.0" encoding="utf-8"?>
<math xmlns="http://www.w3.org/1998/Math/MathML" display="block">
  <semantics>
    <mrow>
      <msub>
        <mi>α</mi>
        <mrow>
          <mi mathvariant="italic">min</mi>
          <mn>2</mn>
        </mrow>
      </msub>
      <mi mathvariant="italic">et</mi>
      <msub>
        <mi>α</mi>
        <mrow>
          <mi mathvariant="italic">max</mi>
          <mn>2</mn>
        </mrow>
      </msub>
    </mrow>
    <annotation encoding="StarMath 5.0">%alpha_min2 et %alpha_max2</annotation>
  </semantics>
</math>
</file>

<file path=Object 25/content.xml><?xml version="1.0" encoding="utf-8"?>
<math xmlns="http://www.w3.org/1998/Math/MathML" display="block">
  <semantics>
    <mrow>
      <mo stretchy="false">∃</mo>
      <mrow>
        <mrow>
          <mo fence="true" stretchy="false">(</mo>
          <mrow>
            <mrow>
              <msub>
                <mi mathvariant="normal">Φ</mi>
                <mrow>
                  <mn>1</mn>
                  <mi>i</mi>
                </mrow>
              </msub>
              <mi>,</mi>
              <mi>r</mi>
            </mrow>
          </mrow>
          <mo fence="true" stretchy="false">)</mo>
        </mrow>
        <mo stretchy="false">∈</mo>
        <mo stretchy="false">(</mo>
      </mrow>
      <mo stretchy="false">[</mo>
      <mn>0,2</mn>
      <mi>π</mi>
      <mo stretchy="false">[</mo>
      <mi>,</mi>
      <mo stretchy="false">[</mo>
      <mn>0</mn>
      <mi>,</mi>
      <mi>R</mi>
      <mo stretchy="false">]</mo>
      <mo stretchy="false">)</mo>
      <mtext>/</mtext>
      <mrow>
        <mmultiscripts>
          <mrow>
            <mo fence="true" stretchy="true">(</mo>
            <mrow>
              <mtable>
                <mtr>
                  <mtd>
                    <msub>
                      <mi>x</mi>
                      <mrow>
                        <mn>1</mn>
                        <mi>i</mi>
                      </mrow>
                    </msub>
                  </mtd>
                </mtr>
                <mtr>
                  <mtd>
                    <msub>
                      <mi>y</mi>
                      <mrow>
                        <mn>1</mn>
                        <mi>i</mi>
                      </mrow>
                    </msub>
                  </mtd>
                </mtr>
                <mtr>
                  <mtd>
                    <msub>
                      <mi>z</mi>
                      <mrow>
                        <mn>1</mn>
                        <mi>i</mi>
                      </mrow>
                    </msub>
                  </mtd>
                </mtr>
              </mtable>
            </mrow>
            <mo fence="true" stretchy="true">)</mo>
          </mrow>
          <mprescripts/>
          <msub>
            <mi mathvariant="italic">NED</mi>
            <mn>1</mn>
          </msub>
          <none/>
        </mmultiscripts>
        <mo stretchy="false">=</mo>
        <mmultiscripts>
          <mrow>
            <mo fence="true" stretchy="true">(</mo>
            <mrow>
              <mtable>
                <mtr>
                  <mtd>
                    <mrow>
                      <mi>r</mi>
                      <mn>.</mn>
                      <mi>cos</mi>
                      <msub>
                        <mi mathvariant="normal">Φ</mi>
                        <mrow>
                          <mn>1</mn>
                          <mi>i</mi>
                          <mn>.</mn>
                        </mrow>
                      </msub>
                      <mi>cos</mi>
                      <msub>
                        <mi>α</mi>
                        <mrow>
                          <mn>1</mn>
                          <mi>i</mi>
                        </mrow>
                      </msub>
                    </mrow>
                  </mtd>
                </mtr>
                <mtr>
                  <mtd>
                    <mrow>
                      <mi>r</mi>
                      <mn>.</mn>
                      <mi>sin</mi>
                      <msub>
                        <mi mathvariant="normal">Φ</mi>
                        <mrow>
                          <mn>1</mn>
                          <mi>i</mi>
                          <mn>.</mn>
                        </mrow>
                      </msub>
                      <mi>cos</mi>
                      <msub>
                        <mi>α</mi>
                        <mrow>
                          <mn>1</mn>
                          <mi>i</mi>
                        </mrow>
                      </msub>
                    </mrow>
                  </mtd>
                </mtr>
                <mtr>
                  <mtd>
                    <mrow>
                      <mi>r</mi>
                      <mn>.</mn>
                      <mi>sin</mi>
                      <msub>
                        <mi>α</mi>
                        <mrow>
                          <mn>1</mn>
                          <mi>i</mi>
                        </mrow>
                      </msub>
                    </mrow>
                  </mtd>
                </mtr>
              </mtable>
            </mrow>
            <mo fence="true" stretchy="true">)</mo>
          </mrow>
          <mprescripts/>
          <msub>
            <mi mathvariant="italic">NED</mi>
            <mn>1</mn>
          </msub>
          <none/>
        </mmultiscripts>
      </mrow>
    </mrow>
    <annotation encoding="StarMath 5.0">exists  (%PHI_1i,r) in \( \[0,2%pi\[, \[0,R\]  \) "/" left ( stack{x_{1i}# y_{1i} # z_{1i}}  right )  lsub{NED_1}=left ( stack{r.cos%PHI_1i.cos%alpha_1i # r.sin%PHI_1i.cos%alpha_1i # r.sin%alpha_1i}  right )  lsub{NED_1} </annotation>
  </semantics>
</math>
</file>

<file path=Object 26/content.xml><?xml version="1.0" encoding="utf-8"?>
<math xmlns="http://www.w3.org/1998/Math/MathML" display="block">
  <semantics>
    <msub>
      <mi>γ</mi>
      <mn>1</mn>
    </msub>
    <annotation encoding="StarMath 5.0">%gamma_1</annotation>
  </semantics>
</math>
</file>

<file path=Object 27/content.xml><?xml version="1.0" encoding="utf-8"?>
<math xmlns="http://www.w3.org/1998/Math/MathML" display="block">
  <semantics>
    <mrow>
      <mi>R</mi>
      <mn>.</mn>
      <mi>cos</mi>
      <msub>
        <mi>α</mi>
        <mrow>
          <mn>2</mn>
          <mi mathvariant="italic">max</mi>
        </mrow>
      </msub>
      <mtext> (respectivement </mtext>
      <mi>R</mi>
      <mn>.</mn>
      <mi>cos</mi>
      <msub>
        <mi>α</mi>
        <mrow>
          <mn>2</mn>
          <mi mathvariant="italic">min</mi>
        </mrow>
      </msub>
      <mtext>)</mtext>
    </mrow>
    <annotation encoding="StarMath 5.0">R.cos%alpha_{ 2max } " (respectivement "R.cos%alpha_{ 2min }")"</annotation>
  </semantics>
</math>
</file>

<file path=Object 28/content.xml><?xml version="1.0" encoding="utf-8"?>
<math xmlns="http://www.w3.org/1998/Math/MathML" display="block">
  <semantics>
    <msub>
      <mi>α</mi>
      <mrow>
        <mn>2</mn>
        <mi mathvariant="italic">max</mi>
      </mrow>
    </msub>
    <annotation encoding="StarMath 5.0">%alpha_2max</annotation>
  </semantics>
</math>
</file>

<file path=Object 29/content.xml><?xml version="1.0" encoding="utf-8"?>
<math xmlns="http://www.w3.org/1998/Math/MathML" display="block">
  <semantics>
    <msub>
      <mi>α</mi>
      <mrow>
        <mn>2</mn>
        <mi mathvariant="italic">min</mi>
      </mrow>
    </msub>
    <annotation encoding="StarMath 5.0">%alpha_2min</annotation>
  </semantics>
</math>
</file>

<file path=Object 3/content.xml><?xml version="1.0" encoding="utf-8"?>
<math xmlns="http://www.w3.org/1998/Math/MathML" display="block">
  <semantics>
    <mrow>
      <mrow>
        <msubsup>
          <mi>x</mi>
          <mn>1</mn>
          <mn>2</mn>
        </msubsup>
        <mo stretchy="false">+</mo>
        <msubsup>
          <mi>y</mi>
          <mn>1</mn>
          <mn>2</mn>
        </msubsup>
      </mrow>
      <mo stretchy="false">=</mo>
      <mfrac>
        <msubsup>
          <mi>z</mi>
          <mn>1</mn>
          <mn>2</mn>
        </msubsup>
        <mrow>
          <msup>
            <mi>tan</mi>
            <mn>2</mn>
          </msup>
          <mi>α</mi>
        </mrow>
      </mfrac>
    </mrow>
    <annotation encoding="StarMath 5.0">x_1^2+y_1^2= {z_1^2} over {tan^2%alpha  } </annotation>
  </semantics>
</math>
</file>

<file path=Object 30/content.xml><?xml version="1.0" encoding="utf-8"?>
<math xmlns="http://www.w3.org/1998/Math/MathML" display="block">
  <semantics>
    <msub>
      <mi>γ</mi>
      <mn>1</mn>
    </msub>
    <annotation encoding="StarMath 5.0">%gamma_1</annotation>
  </semantics>
</math>
</file>

<file path=Object 31/content.xml><?xml version="1.0" encoding="utf-8"?>
<math xmlns="http://www.w3.org/1998/Math/MathML" display="block">
  <semantics>
    <mrow>
      <mo stretchy="false">−</mo>
      <mi>θ</mi>
    </mrow>
    <annotation encoding="StarMath 5.0">-%theta</annotation>
  </semantics>
</math>
</file>

<file path=Object 32/content.xml><?xml version="1.0" encoding="utf-8"?>
<math xmlns="http://www.w3.org/1998/Math/MathML" display="block">
  <semantics>
    <mrow>
      <mi>π</mi>
      <mo stretchy="false">−</mo>
      <msub>
        <mi>γ</mi>
        <mn>2</mn>
      </msub>
    </mrow>
    <annotation encoding="StarMath 5.0">%pi-%gamma_2</annotation>
  </semantics>
</math>
</file>

<file path=Object 33/content.xml><?xml version="1.0" encoding="utf-8"?>
<math xmlns="http://www.w3.org/1998/Math/MathML" display="block">
  <semantics>
    <mrow>
      <mover accent="true">
        <mrow>
          <msub>
            <mi>V</mi>
            <mn>2</mn>
          </msub>
          <msub>
            <mi>V</mi>
            <mn>1</mn>
          </msub>
        </mrow>
        <mo stretchy="true">⃗</mo>
      </mover>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row>
    <annotation encoding="StarMath 5.0">widevec {V_2 V_1}  left ( stack{ldline widevec {V_1 V_2}  rdline.cos%theta/2 # 0 # ldline widevec {V_1 V_2}  rdline.sin%theta/2}  right )  lsub{NED_2'} </annotation>
  </semantics>
</math>
</file>

<file path=Object 34/content.xml><?xml version="1.0" encoding="utf-8"?>
<math xmlns="http://www.w3.org/1998/Math/MathML" display="block">
  <semantics>
    <mtable>
      <mtr>
        <mtd>
          <mrow>
            <mrow>
              <msub>
                <mi>M</mi>
                <mrow>
                  <mn>1</mn>
                  <mi>i</mi>
                </mrow>
              </msub>
              <mo stretchy="false">∈</mo>
              <msub>
                <mi>L</mi>
                <mrow>
                  <mn>2</mn>
                  <mi mathvariant="italic">max</mi>
                </mrow>
              </msub>
            </mrow>
            <mtext> (respectivement </mtext>
            <mrow>
              <msub>
                <mi>M</mi>
                <mrow>
                  <mn>1</mn>
                  <mi>i</mi>
                </mrow>
              </msub>
              <mo stretchy="false">∈</mo>
              <msub>
                <mi>L</mi>
                <mrow>
                  <mn>2</mn>
                  <mi mathvariant="italic">min</mi>
                </mrow>
              </msub>
            </mrow>
            <mtext>)</mtext>
            <mo stretchy="false">⇒</mo>
            <mspace/>
          </mrow>
        </mtd>
      </mtr>
      <mtr>
        <mtd>
          <mrow>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ax</mi>
                        </msub>
                      </mrow>
                    </mtd>
                  </mtr>
                  <mtr>
                    <mtd>
                      <mrow>
                        <mrow>
                          <mn>0</mn>
                          <mo stretchy="false">≤</mo>
                          <msub>
                            <mi>z</mi>
                            <mrow>
                              <mi>V</mi>
                              <mn>1</mn>
                              <mi>i</mi>
                            </mrow>
                          </msub>
                          <mo stretchy="false">≤</mo>
                          <mi>R</mi>
                        </mrow>
                        <mn>.</mn>
                        <mi>sin</mi>
                        <msub>
                          <mi>α</mi>
                          <mi mathvariant="italic">max</mi>
                        </msub>
                      </mrow>
                    </mtd>
                  </mtr>
                </mtable>
              </mrow>
            </mrow>
            <mtext> ( respectivement )</mtext>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in</mi>
                        </msub>
                      </mrow>
                    </mtd>
                  </mtr>
                  <mtr>
                    <mtd>
                      <mrow>
                        <mrow>
                          <mn>0</mn>
                          <mo stretchy="false">≤</mo>
                          <msub>
                            <mi>z</mi>
                            <mrow>
                              <mi>V</mi>
                              <mn>1</mn>
                              <mi>i</mi>
                            </mrow>
                          </msub>
                          <mo stretchy="false">≤</mo>
                          <mi>R</mi>
                        </mrow>
                        <mn>.</mn>
                        <mi>sin</mi>
                        <msub>
                          <mi>α</mi>
                          <mi mathvariant="italic">min</mi>
                        </msub>
                      </mrow>
                    </mtd>
                  </mtr>
                </mtable>
              </mrow>
            </mrow>
          </mrow>
        </mtd>
      </mtr>
    </mtable>
    <annotation encoding="StarMath 5.0">M_{1i} in L_2max " (respectivement "M_{1i} in L_2min")"  drarrow ~ newline 
left lbrace stack{x_{V1i}^2+y^2_{V1i}  &lt;=  R^2cos^2%alpha_max # 0&lt;=z_{V1i}&lt;=R.sin%alpha_max}  right none  
" ( respectivement )" 
 left lbrace stack{x_{V1i}^2+y^2_{V1i}  &lt;=  R^2cos^2%alpha_min # 0&lt;=z_{V1i}&lt;=R.sin%alpha_min}  right none  </annotation>
  </semantics>
</math>
</file>

<file path=Object 35/content.xml><?xml version="1.0" encoding="utf-8"?>
<math xmlns="http://www.w3.org/1998/Math/MathML" display="block">
  <semantics>
    <mrow>
      <mrow>
        <mi>Z</mi>
        <mo stretchy="false">∈</mo>
        <mo stretchy="false">{</mo>
      </mrow>
      <mi mathvariant="italic">max</mi>
      <mi>,</mi>
      <mi mathvariant="italic">min</mi>
      <mo stretchy="false">}</mo>
    </mrow>
    <annotation encoding="StarMath 5.0">Z in \{ max,min \}</annotation>
  </semantics>
</math>
</file>

<file path=Object 36/content.xml><?xml version="1.0" encoding="utf-8"?>
<math xmlns="http://www.w3.org/1998/Math/MathML" display="block">
  <semantics>
    <mover accent="true">
      <mrow>
        <msub>
          <mi>V</mi>
          <mn>2</mn>
        </msub>
        <msub>
          <mi>V</mi>
          <mn>1</mn>
        </msub>
      </mrow>
      <mo stretchy="true">⃗</mo>
    </mover>
    <annotation encoding="StarMath 5.0">widevec {V_2 V_1}</annotation>
  </semantics>
</math>
</file>

<file path=Object 38/content.xml><?xml version="1.0" encoding="utf-8"?>
<math xmlns="http://www.w3.org/1998/Math/MathML" display="block">
  <semantics>
    <mrow>
      <mo stretchy="false">−</mo>
      <mi>θ</mi>
    </mrow>
    <annotation encoding="StarMath 5.0">-%theta</annotation>
  </semantics>
</math>
</file>

<file path=Object 39/content.xml><?xml version="1.0" encoding="utf-8"?>
<math xmlns="http://www.w3.org/1998/Math/MathML" display="block">
  <semantics>
    <mrow>
      <mi>π</mi>
      <mo stretchy="false">−</mo>
      <msub>
        <mi>γ</mi>
        <mn>2</mn>
      </msub>
    </mrow>
    <annotation encoding="StarMath 5.0">%pi-%gamma_2</annotation>
  </semantics>
</math>
</file>

<file path=Object 4/content.xml><?xml version="1.0" encoding="utf-8"?>
<math xmlns="http://www.w3.org/1998/Math/MathML" display="block">
  <semantics>
    <mrow>
      <mrow>
        <msubsup>
          <mi>x</mi>
          <mn>2</mn>
          <mn>2</mn>
        </msubsup>
        <mo stretchy="false">+</mo>
        <msubsup>
          <mi>y</mi>
          <mn>2</mn>
          <mn>2</mn>
        </msubsup>
      </mrow>
      <mo stretchy="false">=</mo>
      <mfrac>
        <msubsup>
          <mi>z</mi>
          <mn>2</mn>
          <mn>2</mn>
        </msubsup>
        <mrow>
          <msup>
            <mi>tan</mi>
            <mn>2</mn>
          </msup>
          <mi>α</mi>
        </mrow>
      </mfrac>
    </mrow>
    <annotation encoding="StarMath 5.0">x_2^2+y_2^2= {z_2^2} over {tan^2%alpha  } </annotation>
  </semantics>
</math>
</file>

<file path=Object 40/content.xml><?xml version="1.0" encoding="utf-8"?>
<math xmlns="http://www.w3.org/1998/Math/MathML" display="block">
  <semantics>
    <msub>
      <mi mathvariant="normal">Φ</mi>
      <mrow>
        <mn>2</mn>
        <mi>i</mi>
      </mrow>
    </msub>
    <annotation encoding="StarMath 5.0">%PHI_2i</annotation>
  </semantics>
</math>
</file>

<file path=Object 41/content.xml><?xml version="1.0" encoding="utf-8"?>
<math xmlns="http://www.w3.org/1998/Math/MathML" display="block">
  <semantics>
    <msub>
      <mi>γ</mi>
      <mn>2</mn>
    </msub>
    <annotation encoding="StarMath 5.0">%gamma_2</annotation>
  </semantics>
</math>
</file>

<file path=Object 42/content.xml><?xml version="1.0" encoding="utf-8"?>
<math xmlns="http://www.w3.org/1998/Math/MathML" display="block">
  <semantics>
    <msub>
      <mi>M</mi>
      <mrow>
        <mrow>
          <msub>
            <mi mathvariant="italic">NED</mi>
            <mn>2</mn>
          </msub>
          <mo stretchy="false">→</mo>
          <mi mathvariant="italic">NED</mi>
        </mrow>
        <mn>1</mn>
      </mrow>
    </msub>
    <annotation encoding="StarMath 5.0">M_{ NED_2  toward NED1  }</annotation>
  </semantics>
</math>
</file>

<file path=Object 43/content.xml><?xml version="1.0" encoding="utf-8"?>
<math xmlns="http://www.w3.org/1998/Math/MathML" display="block">
  <semantics>
    <mtable>
      <mtr>
        <mtd>
          <mrow>
            <mrow>
              <msub>
                <mi>M</mi>
                <mrow>
                  <mrow>
                    <msub>
                      <mi mathvariant="italic">NED</mi>
                      <mn>2</mn>
                    </msub>
                    <mo stretchy="false">→</mo>
                    <mi mathvariant="italic">NED</mi>
                  </mrow>
                  <mn>1</mn>
                </mrow>
              </msub>
              <mo stretchy="false">=</mo>
              <msub>
                <mi>R</mi>
                <mi>z</mi>
              </msub>
            </mrow>
            <mrow>
              <mo fence="true" stretchy="false">(</mo>
              <mrow>
                <mrow>
                  <mi>π</mi>
                  <mo stretchy="false">−</mo>
                  <msub>
                    <mi>γ</mi>
                    <mn>2</mn>
                  </msub>
                </mrow>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i>cos</mi>
                        <mrow>
                          <mo fence="true" stretchy="false">(</mo>
                          <mrow>
                            <mrow>
                              <mi>π</mi>
                              <mo stretchy="false">−</mo>
                              <msub>
                                <mi>γ</mi>
                                <mn>2</mn>
                              </msub>
                            </mrow>
                          </mrow>
                          <mo fence="true" stretchy="false">)</mo>
                        </mrow>
                      </mrow>
                    </mtd>
                    <mtd>
                      <mrow>
                        <mrow>
                          <mo stretchy="false">−</mo>
                          <mi>sin</mi>
                        </mrow>
                        <mrow>
                          <mo fence="true" stretchy="false">(</mo>
                          <mrow>
                            <mrow>
                              <mi>π</mi>
                              <mo stretchy="false">−</mo>
                              <msub>
                                <mi>γ</mi>
                                <mn>2</mn>
                              </msub>
                            </mrow>
                          </mrow>
                          <mo fence="true" stretchy="false">)</mo>
                        </mrow>
                      </mrow>
                    </mtd>
                    <mtd>
                      <mn>0</mn>
                    </mtd>
                  </mtr>
                  <mtr>
                    <mtd>
                      <mrow>
                        <mi>sin</mi>
                        <mrow>
                          <mo fence="true" stretchy="false">(</mo>
                          <mrow>
                            <mrow>
                              <mi>π</mi>
                              <mo stretchy="false">−</mo>
                              <msub>
                                <mi>γ</mi>
                                <mn>2</mn>
                              </msub>
                            </mrow>
                          </mrow>
                          <mo fence="true" stretchy="false">)</mo>
                        </mrow>
                      </mrow>
                    </mtd>
                    <mtd>
                      <mrow>
                        <mi>cos</mi>
                        <mrow>
                          <mo fence="true" stretchy="false">(</mo>
                          <mrow>
                            <mrow>
                              <mi>π</mi>
                              <mo stretchy="false">−</mo>
                              <msub>
                                <mi>γ</mi>
                                <mn>2</mn>
                              </msub>
                            </mrow>
                          </mrow>
                          <mo fence="true" stretchy="false">)</mo>
                        </mrow>
                      </mrow>
                    </mtd>
                    <mtd>
                      <mn>0</mn>
                    </mtd>
                  </mtr>
                  <mtr>
                    <mtd>
                      <mn>0</mn>
                    </mtd>
                    <mtd>
                      <mn>0</mn>
                    </mtd>
                    <mtd>
                      <mn>1</mn>
                    </mtd>
                  </mtr>
                </mtable>
              </mrow>
              <mo fence="true" stretchy="true">)</mo>
            </mrow>
            <mn>.</mn>
            <mrow>
              <mo fence="true" stretchy="true">(</mo>
              <mrow>
                <mtable>
                  <mtr>
                    <mtd>
                      <mrow>
                        <mi>cos</mi>
                        <mrow>
                          <mo fence="true" stretchy="false">(</mo>
                          <mrow>
                            <mrow>
                              <mo stretchy="false">−</mo>
                              <mi>θ</mi>
                            </mrow>
                          </mrow>
                          <mo fence="true" stretchy="false">)</mo>
                        </mrow>
                      </mrow>
                    </mtd>
                    <mtd>
                      <mn>0</mn>
                    </mtd>
                    <mtd>
                      <mrow>
                        <mi>sin</mi>
                        <mrow>
                          <mo fence="true" stretchy="false">(</mo>
                          <mrow>
                            <mrow>
                              <mo stretchy="false">−</mo>
                              <mi>θ</mi>
                            </mrow>
                          </mrow>
                          <mo fence="true" stretchy="false">)</mo>
                        </mrow>
                      </mrow>
                    </mtd>
                  </mtr>
                  <mtr>
                    <mtd>
                      <mn>0</mn>
                    </mtd>
                    <mtd>
                      <mn>1</mn>
                    </mtd>
                    <mtd>
                      <mn>0</mn>
                    </mtd>
                  </mtr>
                  <mtr>
                    <mtd>
                      <mrow>
                        <mrow>
                          <mo stretchy="false">−</mo>
                          <mi>sin</mi>
                        </mrow>
                        <mrow>
                          <mo fence="true" stretchy="false">(</mo>
                          <mrow>
                            <mrow>
                              <mo stretchy="false">−</mo>
                              <mi>θ</mi>
                            </mrow>
                          </mrow>
                          <mo fence="true" stretchy="false">)</mo>
                        </mrow>
                      </mrow>
                    </mtd>
                    <mtd>
                      <mn>0</mn>
                    </mtd>
                    <mtd>
                      <mrow>
                        <mi>cos</mi>
                        <mrow>
                          <mo fence="true" stretchy="false">(</mo>
                          <mrow>
                            <mrow>
                              <mo stretchy="false">−</mo>
                              <mi>θ</mi>
                            </mrow>
                          </mrow>
                          <mo fence="true" stretchy="false">)</mo>
                        </mrow>
                      </mrow>
                    </mtd>
                  </mtr>
                </mtable>
              </mrow>
              <mo fence="true" stretchy="true">)</mo>
            </mrow>
            <mn>.</mn>
            <mrow>
              <mo fence="true" stretchy="true">(</mo>
              <mrow>
                <mtable>
                  <mtr>
                    <mtd>
                      <mrow>
                        <mi>cos</mi>
                        <mrow>
                          <mo fence="true" stretchy="false">(</mo>
                          <mrow>
                            <msub>
                              <mi>γ</mi>
                              <mn>1</mn>
                            </msub>
                          </mrow>
                          <mo fence="true" stretchy="false">)</mo>
                        </mrow>
                      </mrow>
                    </mtd>
                    <mtd>
                      <mrow>
                        <mrow>
                          <mo stretchy="false">−</mo>
                          <mi>sin</mi>
                        </mrow>
                        <mrow>
                          <mo fence="true" stretchy="false">(</mo>
                          <mrow>
                            <msub>
                              <mi>γ</mi>
                              <mn>1</mn>
                            </msub>
                          </mrow>
                          <mo fence="true" stretchy="false">)</mo>
                        </mrow>
                      </mrow>
                    </mtd>
                    <mtd>
                      <mn>0</mn>
                    </mtd>
                  </mtr>
                  <mtr>
                    <mtd>
                      <mrow>
                        <mi>sin</mi>
                        <mrow>
                          <mo fence="true" stretchy="false">(</mo>
                          <mrow>
                            <msub>
                              <mi>γ</mi>
                              <mn>1</mn>
                            </msub>
                          </mrow>
                          <mo fence="true" stretchy="false">)</mo>
                        </mrow>
                      </mrow>
                    </mtd>
                    <mtd>
                      <mrow>
                        <mi>cos</mi>
                        <mrow>
                          <mo fence="true" stretchy="false">(</mo>
                          <mrow>
                            <msub>
                              <mi>γ</mi>
                              <mn>1</mn>
                            </msub>
                          </mrow>
                          <mo fence="true" stretchy="false">)</mo>
                        </mrow>
                      </mrow>
                    </mtd>
                    <mtd>
                      <mn>0</mn>
                    </mtd>
                  </mtr>
                  <mtr>
                    <mtd>
                      <mn>0</mn>
                    </mtd>
                    <mtd>
                      <mn>0</mn>
                    </mtd>
                    <mtd>
                      <mn>1</mn>
                    </mtd>
                  </mtr>
                </mtable>
              </mrow>
              <mo fence="true" stretchy="true">)</mo>
            </mrow>
          </mrow>
        </mtd>
      </mtr>
    </mtable>
    <annotation encoding="StarMath 5.0">M_{ NED_2  toward NED1  }=R_z( %pi-%gamma_2 ).R_y( -%theta ).R_z( %gamma_1 )=~
newline 
left ( matrix{ cos(%pi-%gamma_2)#-sin(%pi-%gamma_2)#0## sin(%pi-%gamma_2)# cos(%pi-%gamma_2)#0##0#0#1} right).left ( matrix{ cos(-%theta)#0#sin(-%theta)## 0# 1#0##-sin(-%theta)#0#cos(-%theta)} right).left ( matrix{ cos(%gamma_1)#-sin(%gamma_1)#0## sin(%gamma_1)# cos(%gamma_1)#0##0#0#1} right)
</annotation>
  </semantics>
</math>
</file>

<file path=Object 44/content.xml><?xml version="1.0" encoding="utf-8"?>
<math xmlns="http://www.w3.org/1998/Math/MathML" display="block">
  <semantics>
    <msub>
      <mi>M</mi>
      <mrow>
        <msub>
          <mi mathvariant="italic">NED</mi>
          <mn>2</mn>
        </msub>
        <mrow>
          <mi>'</mi>
          <mo stretchy="false">→</mo>
          <mi mathvariant="italic">NED</mi>
        </mrow>
        <mn>1</mn>
      </mrow>
    </msub>
    <annotation encoding="StarMath 5.0">M_{ NED_2'  toward NED1  }</annotation>
  </semantics>
</math>
</file>

<file path=Object 45/content.xml><?xml version="1.0" encoding="utf-8"?>
<math xmlns="http://www.w3.org/1998/Math/MathML" display="block">
  <semantics>
    <mtable>
      <mtr>
        <mtd>
          <mrow>
            <mrow>
              <msub>
                <mi>M</mi>
                <mrow>
                  <msub>
                    <mi mathvariant="italic">NED</mi>
                    <mn>2</mn>
                  </msub>
                  <mrow>
                    <mi>'</mi>
                    <mo stretchy="false">→</mo>
                    <mi mathvariant="italic">NED</mi>
                  </mrow>
                  <mn>1</mn>
                </mrow>
              </msub>
              <mo stretchy="false">=</mo>
              <msub>
                <mi>R</mi>
                <mi>z</mi>
              </msub>
            </mrow>
            <mrow>
              <mo fence="true" stretchy="false">(</mo>
              <mrow>
                <mi>π</mi>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o stretchy="false">−</mo>
                        <mn>1</mn>
                      </mrow>
                    </mtd>
                    <mtd>
                      <mn>0</mn>
                    </mtd>
                    <mtd>
                      <mn>0</mn>
                    </mtd>
                  </mtr>
                  <mtr>
                    <mtd>
                      <mn>0</mn>
                    </mtd>
                    <mtd>
                      <mrow>
                        <mo stretchy="false">−</mo>
                        <mn>1</mn>
                      </mrow>
                    </mtd>
                    <mtd>
                      <mn>0</mn>
                    </mtd>
                  </mtr>
                  <mtr>
                    <mtd>
                      <mn>0</mn>
                    </mtd>
                    <mtd>
                      <mn>0</mn>
                    </mtd>
                    <mtd>
                      <mn>1</mn>
                    </mtd>
                  </mtr>
                </mtable>
              </mrow>
              <mo fence="true" stretchy="true">)</mo>
            </mrow>
            <mn>.</mn>
            <mrow>
              <mo fence="true" stretchy="true">(</mo>
              <mrow>
                <mtable>
                  <mtr>
                    <mtd>
                      <mrow>
                        <mi>cos</mi>
                        <mi>θ</mi>
                      </mrow>
                    </mtd>
                    <mtd>
                      <mn>0</mn>
                    </mtd>
                    <mtd>
                      <mrow>
                        <mrow>
                          <mo stretchy="false">−</mo>
                          <mi>sin</mi>
                        </mrow>
                        <mi>θ</mi>
                      </mrow>
                    </mtd>
                  </mtr>
                  <mtr>
                    <mtd>
                      <mn>0</mn>
                    </mtd>
                    <mtd>
                      <mn>1</mn>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row>
              <mo fence="true" stretchy="true">(</mo>
              <mrow>
                <mtable>
                  <mtr>
                    <mtd>
                      <mrow>
                        <mrow>
                          <mo stretchy="false">−</mo>
                          <mi>cos</mi>
                        </mrow>
                        <mi>θ</mi>
                      </mrow>
                    </mtd>
                    <mtd>
                      <mn>0</mn>
                    </mtd>
                    <mtd>
                      <mrow>
                        <mi>sin</mi>
                        <mi>θ</mi>
                      </mrow>
                    </mtd>
                  </mtr>
                  <mtr>
                    <mtd>
                      <mn>0</mn>
                    </mtd>
                    <mtd>
                      <mrow>
                        <mo stretchy="false">−</mo>
                        <mn>1</mn>
                      </mrow>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td>
      </mtr>
    </mtable>
    <annotation encoding="StarMath 5.0">M_{ NED_2'  toward NED1  }=R_z( %pi ).R_y( -%theta ).R_z( %gamma_1 )=~
newline 
left ( matrix{ -1#0#0## 0# -1#0##0#0#1} right).left ( matrix{ cos%theta#0#-sin%theta## 0# 1#0##sin%theta#0#cos%theta} right).left ( matrix{ cos%gamma_1#-sin%gamma_1#0## sin%gamma_1# cos%gamma_1#0##0#0#1} right)=~
newline
left ( matrix{ -cos%theta#0#sin%theta## 0# -1#0##sin%theta#0#cos%theta} right).left ( matrix{ cos%gamma_1#-sin%gamma_1#0## sin%gamma_1# cos%gamma_1#0##0#0#1} right)=~
newline
left ( matrix{ -cos%gamma_1 .cos%theta#sin%gamma_1 .cos%theta#sin%theta## -sin%gamma_1# -cos%gamma_1#0##cos%gamma_1 .sin%theta#-sin%gamma_1 .sin%theta#1} right)
</annotation>
  </semantics>
</math>
</file>

<file path=Object 46/content.xml><?xml version="1.0" encoding="utf-8"?>
<math xmlns="http://www.w3.org/1998/Math/MathML" display="block">
  <semantics>
    <mtable>
      <mtr>
        <mtd>
          <mrow>
            <mover accent="true">
              <mrow>
                <msub>
                  <mi>V</mi>
                  <mn>2</mn>
                </msub>
                <msub>
                  <mi>M</mi>
                  <mrow>
                    <mn>1</mn>
                    <mi>i</mi>
                  </mrow>
                </msub>
              </mrow>
              <mo stretchy="true">⃗</mo>
            </mover>
            <mo stretchy="false">=</mo>
            <mrow>
              <mover accent="true">
                <mrow>
                  <msub>
                    <mi>V</mi>
                    <mn>2</mn>
                  </msub>
                  <msub>
                    <mi>V</mi>
                    <mn>1</mn>
                  </msub>
                </mrow>
                <mo stretchy="true">⃗</mo>
              </mover>
              <mo stretchy="false">+</mo>
              <mover accent="true">
                <mrow>
                  <msub>
                    <mi>V</mi>
                    <mn>1</mn>
                  </msub>
                  <msub>
                    <mi>M</mi>
                    <mrow>
                      <mn>1</mn>
                      <mi>i</mi>
                    </mrow>
                  </msub>
                </mrow>
                <mo stretchy="true">⃗</mo>
              </mover>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multiscripts>
                <mrow>
                  <mo fence="true" stretchy="true">[</mo>
                  <mrow>
                    <mrow>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n>.</mn>
                      <mrow>
                        <mo fence="true" stretchy="true">(</mo>
                        <mrow>
                          <mtable>
                            <mtr>
                              <mtd>
                                <mrow>
                                  <mi>r</mi>
                                  <mn>.</mn>
                                  <mi>cos</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α</mi>
                                        <mrow>
                                          <mn>1</mn>
                                          <mi>i</mi>
                                        </mrow>
                                      </msub>
                                    </mrow>
                                    <mo fence="true" stretchy="false">)</mo>
                                  </mrow>
                                </mrow>
                              </mtd>
                            </mtr>
                          </mtable>
                        </mrow>
                        <mo fence="true" stretchy="true">)</mo>
                      </mrow>
                    </mrow>
                  </mrow>
                  <mo fence="true" stretchy="true">]</mo>
                </mrow>
                <mprescripts/>
                <mrow>
                  <msub>
                    <mi mathvariant="italic">NED</mi>
                    <mn>2</mn>
                  </msub>
                  <mi>'</mi>
                </mrow>
                <none/>
              </mmultiscripts>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i>r</mi>
            </mrow>
            <mn>.</mn>
            <mrow>
              <mmultiscripts>
                <mrow>
                  <mo fence="true" stretchy="true">(</mo>
                  <mrow>
                    <mtable>
                      <mtr>
                        <mtd>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td>
                      </mtr>
                      <mtr>
                        <mtd>
                          <mrow>
                            <mrow>
                              <mo stretchy="false">−</mo>
                              <mi>cos</mi>
                            </mrow>
                            <msub>
                              <mi>α</mi>
                              <mrow>
                                <mn>1</mn>
                                <mi>i</mi>
                              </mrow>
                            </msub>
                            <mn>.</mn>
                            <mi>sin</mi>
                            <mrow>
                              <mo fence="true" stretchy="false">(</mo>
                              <mrow>
                                <mrow>
                                  <msub>
                                    <mi>γ</mi>
                                    <mn>1</mn>
                                  </msub>
                                  <mo stretchy="false">+</mo>
                                  <msub>
                                    <mi mathvariant="normal">Φ</mi>
                                    <mrow>
                                      <mn>1</mn>
                                      <mi>i</mi>
                                    </mrow>
                                  </msub>
                                </mrow>
                              </mrow>
                              <mo fence="true" stretchy="false">)</mo>
                            </mrow>
                          </mrow>
                        </mtd>
                      </mtr>
                      <mtr>
                        <mtd>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td>
                      </mtr>
                    </mtable>
                  </mrow>
                  <mo fence="true" stretchy="true">)</mo>
                </mrow>
                <mprescripts/>
                <mrow>
                  <msub>
                    <mi mathvariant="italic">NED</mi>
                    <mn>2</mn>
                  </msub>
                  <mi>'</mi>
                </mrow>
                <none/>
              </mmultiscripts>
              <mo stretchy="false">=</mo>
              <mspace/>
            </mrow>
          </mrow>
        </mtd>
      </mtr>
      <mtr>
        <mtd>
          <mmultiscripts>
            <mrow>
              <mo fence="true" stretchy="true">(</mo>
              <mrow>
                <mtable>
                  <mtr>
                    <mtd>
                      <msub>
                        <mi>x</mi>
                        <mrow>
                          <mi>V</mi>
                          <mn>1</mn>
                          <mi>i</mi>
                        </mrow>
                      </msub>
                    </mtd>
                  </mtr>
                  <mtr>
                    <mtd>
                      <msub>
                        <mi>y</mi>
                        <mrow>
                          <mi>V</mi>
                          <mn>1</mn>
                          <mi>i</mi>
                        </mrow>
                      </msub>
                    </mtd>
                  </mtr>
                  <mtr>
                    <mtd>
                      <msub>
                        <mi>z</mi>
                        <mrow>
                          <mi>V</mi>
                          <mn>1</mn>
                          <mi>i</mi>
                        </mrow>
                      </msub>
                    </mtd>
                  </mtr>
                </mtable>
              </mrow>
              <mo fence="true" stretchy="true">)</mo>
            </mrow>
            <mprescripts/>
            <mrow>
              <msub>
                <mi mathvariant="italic">NED</mi>
                <mn>2</mn>
              </msub>
              <mi>'</mi>
            </mrow>
            <none/>
          </mmultiscripts>
        </mtd>
      </mtr>
    </mtable>
    <annotation encoding="StarMath 5.0">widevec{V_2 M_{ 1i }}=widevec{ V_2 V_1 }+widevec{ V_1 M_{ 1i } }=~
newline
left ( stack{ldline widevec {V_1 V_2}  rdline.cos%theta/2 # 0 # ldline widevec {V_1 V_2}  rdline.sin%theta/2}  right )  lsub{NED_2'}+
left[ left ( matrix{ -cos%gamma_1 .cos%theta#sin%gamma_1 .cos%theta#sin%theta## -sin%gamma_1# -cos%gamma_1#0##cos%gamma_1 .sin%theta#-sin%gamma_1 .sin%theta#1} right).left ( stack{r.cos(%PHI_1i).cos(%alpha_1i) # r.sin(%PHI_1i).cos(%alpha_1i) # r.sin(%alpha_1i)}  right ) right ]lsub{NED_2'}
=~newline
left ( stack{ldline widevec {V_1 V_2}  rdline.cos%theta/2 # 0 # ldline widevec {V_1 V_2}  rdline.sin%theta/2}  right )  lsub{NED_2'}+ r. left ( stack{cos%theta . cos%alpha_1i . cos(%gamma_1+%PHI_1i)+sin%theta . sin%alpha_1i # -cos%alpha_1i . sin(%gamma_1+%PHI_1i) # sin%theta . cos%alpha_1i .cos(%gamma_1+%PHI_1i) +sin%alpha_1i}  right )  lsub{NED_2'} 
 =~newline
left ( stack{x_{V1i} # y_{V1i} # z_{V1i}}  right )  lsub{NED_2'} </annotation>
  </semantics>
</math>
</file>

<file path=Object 47/content.xml><?xml version="1.0" encoding="utf-8"?>
<math xmlns="http://www.w3.org/1998/Math/MathML" display="block">
  <semantics>
    <mrow>
      <mi>R</mi>
      <mn>.</mn>
      <mi>sin</mi>
      <msub>
        <mi>α</mi>
        <mrow>
          <mn>2</mn>
          <mi mathvariant="italic">max</mi>
        </mrow>
      </msub>
      <mtext> (respectivement </mtext>
      <mi>R</mi>
      <mn>.</mn>
      <mi>sin</mi>
      <msub>
        <mi>α</mi>
        <mrow>
          <mn>2</mn>
          <mi mathvariant="italic">min</mi>
        </mrow>
      </msub>
      <mtext>)</mtext>
    </mrow>
    <annotation encoding="StarMath 5.0">R.sin%alpha_{ 2max } " (respectivement "R.sin%alpha_{ 2min }")"</annotation>
  </semantics>
</math>
</file>

<file path=Object 48/content.xml><?xml version="1.0" encoding="utf-8"?>
<math xmlns="http://www.w3.org/1998/Math/MathML" display="block">
  <semantics>
    <mtable>
      <mtr>
        <mtd>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Z</mi>
                      </msub>
                    </mrow>
                  </mtd>
                </mtr>
                <mtr>
                  <mtd>
                    <mrow>
                      <mrow>
                        <mn>0</mn>
                        <mo stretchy="false">≤</mo>
                        <msub>
                          <mi>z</mi>
                          <mrow>
                            <mi>V</mi>
                            <mn>1</mn>
                            <mi>i</mi>
                          </mrow>
                        </msub>
                        <mo stretchy="false">≤</mo>
                        <mi>R</mi>
                      </mrow>
                      <mn>.</mn>
                      <mi>sin</mi>
                      <msub>
                        <mi>α</mi>
                        <mi>Z</mi>
                      </msub>
                    </mrow>
                  </mtd>
                </mtr>
              </mtable>
            </mrow>
          </mrow>
        </mtd>
      </mtr>
      <mtr>
        <mtd>
          <mrow>
            <mo stretchy="false">⇒</mo>
            <mrow>
              <mo fence="true" stretchy="true">{</mo>
              <mrow>
                <mtable>
                  <mtr>
                    <mtd>
                      <mtable>
                        <mtr>
                          <mtd>
                            <mn>0</mn>
                          </mtd>
                          <mtd>
                            <mrow>
                              <mspace width="2em"/>
                              <mo stretchy="false">=</mo>
                              <mspace width="2em"/>
                            </mrow>
                          </mtd>
                          <mtd>
                            <mrow>
                              <mo fence="true" stretchy="false">[</mo>
                              <mrow>
                                <mrow>
                                  <msup>
                                    <mi>cos</mi>
                                    <mn>2</mn>
                                  </msup>
                                  <msub>
                                    <mi>α</mi>
                                    <mrow>
                                      <mn>1</mn>
                                      <mi>i</mi>
                                    </mrow>
                                  </msub>
                                  <mn>.</mn>
                                  <msup>
                                    <mi>sin</mi>
                                    <mn>2</mn>
                                  </msup>
                                  <mrow>
                                    <mrow>
                                      <mo fence="true" stretchy="false">(</mo>
                                      <mrow>
                                        <mrow>
                                          <msub>
                                            <mi>γ</mi>
                                            <mn>1</mn>
                                          </msub>
                                          <mo stretchy="false">+</mo>
                                          <msub>
                                            <mi mathvariant="normal">Φ</mi>
                                            <mrow>
                                              <mn>1</mn>
                                              <mi>i</mi>
                                            </mrow>
                                          </msub>
                                        </mrow>
                                      </mrow>
                                      <mo fence="true" stretchy="false">)</mo>
                                    </mrow>
                                    <mo stretchy="false">+</mo>
                                    <msup>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n>2</mn>
                                    </msup>
                                  </mrow>
                                </mrow>
                              </mrow>
                              <mo fence="true" stretchy="false">]</mo>
                            </mrow>
                          </mtd>
                          <mtd>
                            <mrow>
                              <mn>.</mn>
                              <msup>
                                <mi>r</mi>
                                <mn>2</mn>
                              </msup>
                            </mrow>
                          </mtd>
                        </mtr>
                        <mtr>
                          <mtd>
                            <mspace width="2em"/>
                          </mtd>
                          <mtd>
                            <mrow>
                              <mspace width="2em"/>
                              <mo stretchy="false">+</mo>
                              <mspace width="2em"/>
                            </mrow>
                          </mtd>
                          <mtd>
                            <mrow>
                              <mn>2</mn>
                              <mrow>
                                <mo fence="true" stretchy="false">‖</mo>
                                <mrow>
                                  <mover accent="true">
                                    <mrow>
                                      <msub>
                                        <mi>V</mi>
                                        <mn>1</mn>
                                      </msub>
                                      <msub>
                                        <mi>V</mi>
                                        <mn>2</mn>
                                      </msub>
                                    </mrow>
                                    <mo stretchy="true">⃗</mo>
                                  </mover>
                                </mrow>
                                <mo fence="true" stretchy="false">‖</mo>
                              </mrow>
                              <mi>cos</mi>
                              <mfrac>
                                <mi>θ</mi>
                                <mn>2</mn>
                              </mfrac>
                              <mn>.</mn>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row>
                          </mtd>
                          <mtd>
                            <mrow>
                              <mn>.</mn>
                              <mi>r</mi>
                            </mrow>
                          </mtd>
                        </mtr>
                        <mtr>
                          <mtd>
                            <mspace width="2em"/>
                          </mtd>
                          <mtd>
                            <mrow>
                              <mspace width="2em"/>
                              <mo stretchy="false">+</mo>
                              <mspace width="2em"/>
                            </mrow>
                          </mtd>
                          <mtd>
                            <mrow>
                              <mo fence="true" stretchy="false">(</mo>
                              <mrow>
                                <mrow>
                                  <msup>
                                    <mrow>
                                      <mo fence="true" stretchy="false">‖</mo>
                                      <mrow>
                                        <mover accent="true">
                                          <mrow>
                                            <msub>
                                              <mi>V</mi>
                                              <mn>1</mn>
                                            </msub>
                                            <msub>
                                              <mi>V</mi>
                                              <mn>2</mn>
                                            </msub>
                                          </mrow>
                                          <mo stretchy="true">⃗</mo>
                                        </mover>
                                      </mrow>
                                      <mo fence="true" stretchy="false">‖</mo>
                                    </mrow>
                                    <mn>2</mn>
                                  </msup>
                                  <mn>.</mn>
                                  <msup>
                                    <mi>cos</mi>
                                    <mn>2</mn>
                                  </msup>
                                  <mrow>
                                    <mfrac>
                                      <mi>θ</mi>
                                      <mn>2</mn>
                                    </mfrac>
                                    <mo stretchy="false">−</mo>
                                    <msup>
                                      <mi>R</mi>
                                      <mn>2</mn>
                                    </msup>
                                  </mrow>
                                  <mn>.</mn>
                                  <msup>
                                    <mi>cos</mi>
                                    <mn>2</mn>
                                  </msup>
                                  <msub>
                                    <mi>α</mi>
                                    <mi>Z</mi>
                                  </msub>
                                </mrow>
                              </mrow>
                              <mo fence="true" stretchy="false">)</mo>
                            </mrow>
                          </mtd>
                          <mtd>
                            <mspace width="2em"/>
                          </mtd>
                        </mtr>
                      </mtable>
                    </mtd>
                  </mtr>
                  <mtr>
                    <mtd>
                      <mrow>
                        <mn>0</mn>
                        <mo stretchy="false">≤</mo>
                        <mi>r</mi>
                        <mo stretchy="false">≤</mo>
                        <mfrac>
                          <mrow>
                            <mi>R</mi>
                            <mn>.</mn>
                            <mi>sin</mi>
                            <mrow>
                              <msub>
                                <mi>α</mi>
                                <mi>Z</mi>
                              </msub>
                              <mo stretchy="false">−</mo>
                              <mrow>
                                <mo fence="true" stretchy="false">‖</mo>
                                <mrow>
                                  <mover accent="true">
                                    <mrow>
                                      <msub>
                                        <mi>V</mi>
                                        <mn>1</mn>
                                      </msub>
                                      <msub>
                                        <mi>V</mi>
                                        <mn>2</mn>
                                      </msub>
                                    </mrow>
                                    <mo stretchy="true">⃗</mo>
                                  </mover>
                                </mrow>
                                <mo fence="true" stretchy="false">‖</mo>
                              </mrow>
                            </mrow>
                            <mn>.</mn>
                            <mi>sin</mi>
                            <mrow>
                              <mi>θ</mi>
                              <mo stretchy="false">/</mo>
                              <mn>2</mn>
                            </mrow>
                          </mrow>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frac>
                      </mrow>
                    </mtd>
                  </mtr>
                </mtable>
              </mrow>
            </mrow>
          </mrow>
        </mtd>
      </mtr>
    </mtable>
    <annotation encoding="StarMath 5.0">left lbrace stack{x_{V1i}^2+y^2_{V1i}  =  R^2cos^2%alpha_Z # 0&lt;=z_{V1i}&lt;=R.sin%alpha_Z}  right none newline
drarrow left lbrace stack{matrix{0#~=~#[cos^2%alpha_1i . sin^2(%gamma_1+%PHI_1i)+(cos%theta . cos%alpha_1i .cos(%gamma_1+%PHI_1i)+sin%theta .sin%alpha_1i)^2]#.r^2##~#~+~# 2ldline widevec {V_1 V_2}  rdline cos%theta over 2 .(cos%theta .cos%alpha_1i .cos(%gamma_1+%PHI_1i)+sin%theta .sin%alpha_1i)#.r##~#~+~#(ldline widevec {V_1 V_2}  rdline^2 .cos^2%theta over 2 -R^2 .cos^2%alpha_Z)#~} # 0&lt;=r&lt;={R.sin%alpha_Z -ldline widevec {V_1 V_2}  rdline.sin%theta/2}over{sin%theta . cos%alpha_1i .cos(%gamma_1+%PHI_1i) +sin%alpha_1i}}  right none </annotation>
  </semantics>
</math>
</file>

<file path=Object 5/content.xml><?xml version="1.0" encoding="utf-8"?>
<math xmlns="http://www.w3.org/1998/Math/MathML" display="block">
  <semantics>
    <mrow>
      <mo stretchy="false">∃</mo>
      <mrow>
        <mrow>
          <mo fence="true" form="prefix" stretchy="false">(</mo>
          <mrow>
            <mrow>
              <mi mathvariant="normal">Φ</mi>
              <mi>,</mi>
              <mi>r</mi>
            </mrow>
          </mrow>
          <mo fence="true" form="postfix" stretchy="false">)</mo>
        </mrow>
        <mo stretchy="false">∈</mo>
        <mo stretchy="false">(</mo>
      </mrow>
      <mo stretchy="false">[</mo>
      <mn>0,2</mn>
      <mi>π</mi>
      <mo stretchy="false">[</mo>
      <mi>,</mi>
      <mo stretchy="false">[</mo>
      <mn>0</mn>
      <mi>,</mi>
      <mi>R</mi>
      <mo stretchy="false">]</mo>
      <mo stretchy="false">)</mo>
      <mtext>/</mtext>
      <mrow>
        <msub>
          <mi>M</mi>
          <mn>1</mn>
        </msub>
        <mo stretchy="false">=</mo>
        <mmultiscripts>
          <mrow>
            <mo fence="true" form="prefix"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form="postfix" stretchy="true">)</mo>
          </mrow>
          <mprescripts/>
          <msub>
            <mi mathvariant="italic">NED</mi>
            <mn>1</mn>
          </msub>
          <none/>
        </mmultiscripts>
      </mrow>
    </mrow>
    <annotation encoding="StarMath 5.0">exists  (%PHI,r) in \( \[0,2%pi\[, \[0,R\]  \) "/" M_1= left ( stack{r.cos%PHI .cos%alpha # r.sin%PHI .cos%alpha # r.sin%alpha}  right )  lsub{NED_1} </annotation>
  </semantics>
</math>
</file>

<file path=Object 6/content.xml><?xml version="1.0" encoding="utf-8"?>
<math xmlns="http://www.w3.org/1998/Math/MathML" display="block">
  <semantics>
    <mover accent="true">
      <msub>
        <mi mathvariant="italic">CV</mi>
        <mn>1</mn>
      </msub>
      <mo stretchy="true">⃗</mo>
    </mover>
    <annotation encoding="StarMath 5.0">widevec {CV_1}  </annotation>
  </semantics>
</math>
</file>

<file path=Object 68/content.xml><?xml version="1.0" encoding="utf-8"?>
<math xmlns="http://www.w3.org/1998/Math/MathML" display="block">
  <semantics>
    <mrow>
      <mrow>
        <mrow>
          <mo fence="true" stretchy="false">(</mo>
          <mrow>
            <mrow>
              <mi>λ</mi>
              <mi>,</mi>
              <mi>ϕ</mi>
            </mrow>
          </mrow>
          <mo fence="true" stretchy="false">)</mo>
        </mrow>
        <mo stretchy="false">∈</mo>
        <mo stretchy="false">[</mo>
      </mrow>
      <mn>0,2.</mn>
      <mi mathvariant="normal">Π</mi>
      <msup>
        <mo stretchy="false">[</mo>
        <mn>2</mn>
      </msup>
    </mrow>
    <annotation encoding="StarMath 5.0">( %lambda,%phi ) in   \[0,2.%PI\[^2  </annotation>
  </semantics>
</math>
</file>

<file path=Object 69/content.xml><?xml version="1.0" encoding="utf-8"?>
<math xmlns="http://www.w3.org/1998/Math/MathML" display="block">
  <semantics>
    <mrow>
      <mi>V</mi>
      <mrow>
        <mo fence="true" stretchy="true">{</mo>
        <mrow>
          <mtable>
            <mtr>
              <mtd>
                <mrow>
                  <mi>R</mi>
                  <mn>.</mn>
                  <mi>cos</mi>
                  <mi>λ</mi>
                  <mn>.</mn>
                  <mi>cos</mi>
                  <mi>ϕ</mi>
                </mrow>
              </mtd>
            </mtr>
            <mtr>
              <mtd>
                <mrow>
                  <mi>R</mi>
                  <mn>.</mn>
                  <mi>sin</mi>
                  <mi>λ</mi>
                  <mn>.</mn>
                  <mi>cos</mi>
                  <mi>ϕ</mi>
                </mrow>
              </mtd>
            </mtr>
            <mtr>
              <mtd>
                <mrow>
                  <mi>R</mi>
                  <mn>.</mn>
                  <mi>sin</mi>
                  <mi>ϕ</mi>
                </mrow>
              </mtd>
            </mtr>
          </mtable>
        </mrow>
      </mrow>
    </mrow>
    <annotation encoding="StarMath 5.0">V  left lbrace stack{R. cos%lambda .cos%phi#R. sin%lambda .cos%phi#R. sin%phi} right none</annotation>
  </semantics>
</math>
</file>

<file path=Object 7/content.xml><?xml version="1.0" encoding="utf-8"?>
<math xmlns="http://www.w3.org/1998/Math/MathML" display="block">
  <semantics>
    <mover accent="true">
      <msub>
        <mi mathvariant="italic">CV</mi>
        <mn>2</mn>
      </msub>
      <mo stretchy="true">⃗</mo>
    </mover>
    <annotation encoding="StarMath 5.0">widevec {CV_2}  </annotation>
  </semantics>
</math>
</file>

<file path=Object 70/content.xml><?xml version="1.0" encoding="utf-8"?>
<math xmlns="http://www.w3.org/1998/Math/MathML" display="block">
  <semantics>
    <mrow>
      <mrow>
        <mo fence="true" stretchy="false">(</mo>
        <mrow>
          <mrow>
            <mi>cos</mi>
            <msub>
              <mi>λ</mi>
              <mn>1</mn>
            </msub>
            <mn>.</mn>
            <mi>cos</mi>
            <mrow>
              <msub>
                <mi>ϕ</mi>
                <mn>1</mn>
              </msub>
              <mo stretchy="false">−</mo>
              <mi>cos</mi>
            </mrow>
            <msub>
              <mi>λ</mi>
              <mn>2</mn>
            </msub>
            <mn>.</mn>
            <mi>cos</mi>
            <msub>
              <mi>ϕ</mi>
              <mn>2</mn>
            </msub>
          </mrow>
        </mrow>
        <mo fence="true" stretchy="false">)</mo>
      </mrow>
      <mn>.</mn>
      <mrow>
        <mi>x</mi>
        <mo stretchy="false">+</mo>
        <mrow>
          <mo fence="true" stretchy="false">(</mo>
          <mrow>
            <mrow>
              <mi>sin</mi>
              <msub>
                <mi>λ</mi>
                <mn>1</mn>
              </msub>
              <mn>.</mn>
              <mi>cos</mi>
              <mrow>
                <msub>
                  <mi>ϕ</mi>
                  <mn>1</mn>
                </msub>
                <mo stretchy="false">−</mo>
                <mi>sin</mi>
              </mrow>
              <msub>
                <mi>λ</mi>
                <mn>2</mn>
              </msub>
              <mn>.</mn>
              <mi>cos</mi>
              <msub>
                <mi>ϕ</mi>
                <mn>2</mn>
              </msub>
            </mrow>
          </mrow>
          <mo fence="true" stretchy="false">)</mo>
        </mrow>
      </mrow>
      <mn>.</mn>
      <mrow>
        <mi>y</mi>
        <mo stretchy="false">+</mo>
        <mrow>
          <mo fence="true" stretchy="false">(</mo>
          <mrow>
            <mrow>
              <mi>sin</mi>
              <mrow>
                <msub>
                  <mi>ϕ</mi>
                  <mn>1</mn>
                </msub>
                <mo stretchy="false">−</mo>
                <mi>sin</mi>
              </mrow>
              <msub>
                <mi>ϕ</mi>
                <mn>2</mn>
              </msub>
            </mrow>
          </mrow>
          <mo fence="true" stretchy="false">)</mo>
        </mrow>
      </mrow>
      <mn>.</mn>
      <mrow>
        <mi>z</mi>
        <mo stretchy="false">=</mo>
        <mn>0</mn>
      </mrow>
    </mrow>
    <annotation encoding="StarMath 5.0">(cos%lambda_1 .cos%phi_1 -cos%lambda_2 .cos%phi_2) .x + (sin%lambda_1 .cos%phi_1 -sin%lambda_2 .cos%phi_2) .y+ (sin%phi_1 -sin%phi_2). z=0</annotation>
  </semantics>
</math>
</file>

<file path=Object 71/content.xml><?xml version="1.0" encoding="utf-8"?>
<math xmlns="http://www.w3.org/1998/Math/MathML" display="block">
  <semantics>
    <mrow>
      <mo stretchy="false">∃</mo>
      <mrow>
        <mrow>
          <mo fence="true" form="prefix" stretchy="false">(</mo>
          <mrow>
            <mrow>
              <mi mathvariant="normal">Φ</mi>
              <mi>,</mi>
              <mi>r</mi>
            </mrow>
          </mrow>
          <mo fence="true" form="postfix" stretchy="false">)</mo>
        </mrow>
        <mo stretchy="false">∈</mo>
        <mo stretchy="false">(</mo>
      </mrow>
      <mo stretchy="false">[</mo>
      <mn>0,2</mn>
      <mi>π</mi>
      <mo stretchy="false">[</mo>
      <mi>,</mi>
      <mo stretchy="false">]</mo>
      <mn>0</mn>
      <mi>,</mi>
      <mi>R</mi>
      <mo stretchy="false">]</mo>
      <mo stretchy="false">)</mo>
      <mtext>/</mtext>
      <mrow>
        <mi>M</mi>
        <mo stretchy="false">=</mo>
        <mmultiscripts>
          <mrow>
            <mo fence="true" form="prefix"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form="postfix" stretchy="true">)</mo>
          </mrow>
          <mprescripts/>
          <msub>
            <mi mathvariant="italic">NED</mi>
            <mn>1</mn>
          </msub>
          <none/>
        </mmultiscripts>
      </mrow>
    </mrow>
    <annotation encoding="StarMath 5.0">exists  (%PHI,r) in \( \[0,2%pi\[, \]0,R\]  \) "/" M= left ( stack{r.cos%PHI .cos%alpha # r.sin%PHI .cos%alpha # r.sin%alpha}  right )  lsub{NED_1} </annotation>
  </semantics>
</math>
</file>

<file path=Object 72/content.xml><?xml version="1.0" encoding="utf-8"?>
<math xmlns="http://www.w3.org/1998/Math/MathML" display="block">
  <semantics>
    <mi>γ</mi>
    <annotation encoding="StarMath 5.0">%gamma</annotation>
  </semantics>
</math>
</file>

<file path=Object 73/content.xml><?xml version="1.0" encoding="utf-8"?>
<math xmlns="http://www.w3.org/1998/Math/MathML" display="block">
  <semantics>
    <mi>γ</mi>
    <annotation encoding="StarMath 5.0">%gamma</annotation>
  </semantics>
</math>
</file>

<file path=Object 74/content.xml><?xml version="1.0" encoding="utf-8"?>
<math xmlns="http://www.w3.org/1998/Math/MathML" display="block">
  <semantics>
    <mrow>
      <msub>
        <mi mathvariant="normal">Φ</mi>
        <mn>1</mn>
      </msub>
      <mo stretchy="false">=</mo>
      <mrow>
        <mi mathvariant="normal">Φ</mi>
        <mo stretchy="false">−</mo>
        <mi>γ</mi>
      </mrow>
    </mrow>
    <annotation encoding="StarMath 5.0">%PHI_1=%PHI-%gamma</annotation>
  </semantics>
</math>
</file>

<file path=Object 75/content.xml><?xml version="1.0" encoding="utf-8"?>
<math xmlns="http://www.w3.org/1998/Math/MathML" display="block">
  <semantics>
    <mrow>
      <mi>M</mi>
      <mo stretchy="false">=</mo>
      <mmultiscripts>
        <mrow>
          <mo fence="true" form="prefix" stretchy="true">(</mo>
          <mrow>
            <mtable>
              <mtr>
                <mtd>
                  <mrow>
                    <mi>r</mi>
                    <mn>.</mn>
                    <mi>cos</mi>
                    <msub>
                      <mi mathvariant="normal">Φ</mi>
                      <mn>1</mn>
                    </msub>
                    <mn>.</mn>
                    <mi>cos</mi>
                    <mi>α</mi>
                  </mrow>
                </mtd>
              </mtr>
              <mtr>
                <mtd>
                  <mrow>
                    <mi>r</mi>
                    <mn>.</mn>
                    <mi>sin</mi>
                    <msub>
                      <mi mathvariant="normal">Φ</mi>
                      <mn>1</mn>
                    </msub>
                    <mn>.</mn>
                    <mi>cos</mi>
                    <mi>α</mi>
                  </mrow>
                </mtd>
              </mtr>
              <mtr>
                <mtd>
                  <mrow>
                    <mi>r</mi>
                    <mn>.</mn>
                    <mi>sin</mi>
                    <mi>α</mi>
                  </mrow>
                </mtd>
              </mtr>
            </mtable>
          </mrow>
          <mo fence="true" form="postfix" stretchy="true">)</mo>
        </mrow>
        <mprescripts/>
        <mrow>
          <msub>
            <mi mathvariant="italic">NED</mi>
            <mn>1</mn>
          </msub>
          <mi>'</mi>
        </mrow>
        <none/>
      </mmultiscripts>
    </mrow>
    <annotation encoding="StarMath 5.0">M= left ( stack{r.cos%PHI_1 .cos%alpha # r.sin%PHI_1 .cos%alpha # r.sin%alpha}  right )  lsub{NED_1'} </annotation>
  </semantics>
</math>
</file>

<file path=Object 76/content.xml><?xml version="1.0" encoding="utf-8"?>
<math xmlns="http://www.w3.org/1998/Math/MathML" display="block">
  <semantics>
    <mi mathvariant="normal">Θ</mi>
    <annotation encoding="StarMath 5.0">%THETA</annotation>
  </semantics>
</math>
</file>

<file path=Object 77/content.xml><?xml version="1.0" encoding="utf-8"?>
<math xmlns="http://www.w3.org/1998/Math/MathML" display="block">
  <semantics>
    <mrow>
      <mo stretchy="false">−</mo>
      <mfrac>
        <mi mathvariant="normal">Θ</mi>
        <mn>2</mn>
      </mfrac>
    </mrow>
    <annotation encoding="StarMath 5.0">-frac {%THETA } {2} </annotation>
  </semantics>
</math>
</file>

<file path=Object 78/content.xml><?xml version="1.0" encoding="utf-8"?>
<math xmlns="http://www.w3.org/1998/Math/MathML" display="block">
  <semantics>
    <mrow>
      <mi>M</mi>
      <mo stretchy="false">=</mo>
      <mmultiscripts>
        <mrow>
          <mo fence="true" form="prefix" stretchy="true">(</mo>
          <mrow>
            <mtable>
              <mtr>
                <mtd>
                  <mrow>
                    <mi>r</mi>
                    <mn>.</mn>
                    <mi>cos</mi>
                    <msub>
                      <mi mathvariant="normal">Φ</mi>
                      <mn>1</mn>
                    </msub>
                    <mn>.</mn>
                    <mi>cos</mi>
                    <mi>α</mi>
                    <mn>.</mn>
                    <mi>cos</mi>
                    <mrow>
                      <mfrac>
                        <mi mathvariant="normal">Θ</mi>
                        <mn>2</mn>
                      </mfrac>
                      <mo stretchy="false">−</mo>
                      <mi>r</mi>
                    </mrow>
                    <mn>.</mn>
                    <mi>sin</mi>
                    <mi>α</mi>
                    <mn>.</mn>
                    <mi>sin</mi>
                    <mfrac>
                      <mi mathvariant="normal">Θ</mi>
                      <mn>2</mn>
                    </mfrac>
                  </mrow>
                </mtd>
              </mtr>
              <mtr>
                <mtd>
                  <mrow>
                    <mi>r</mi>
                    <mn>.</mn>
                    <mi>sin</mi>
                    <msub>
                      <mi mathvariant="normal">Φ</mi>
                      <mn>1</mn>
                    </msub>
                    <mn>.</mn>
                    <mi>cos</mi>
                    <mi>α</mi>
                  </mrow>
                </mtd>
              </mtr>
              <mtr>
                <mtd>
                  <mrow>
                    <mi>r</mi>
                    <mn>.</mn>
                    <mi>sin</mi>
                    <mi>α</mi>
                    <mn>.</mn>
                    <mi>cos</mi>
                    <mrow>
                      <mfrac>
                        <mi mathvariant="normal">Θ</mi>
                        <mn>2</mn>
                      </mfrac>
                      <mo stretchy="false">+</mo>
                      <mi>r</mi>
                    </mrow>
                    <mn>.</mn>
                    <mi>cos</mi>
                    <msub>
                      <mi mathvariant="normal">Φ</mi>
                      <mn>1</mn>
                    </msub>
                    <mn>.</mn>
                    <mi>cos</mi>
                    <mi>α</mi>
                    <mn>.</mn>
                    <mi>sin</mi>
                    <mfrac>
                      <mi mathvariant="normal">Θ</mi>
                      <mn>2</mn>
                    </mfrac>
                  </mrow>
                </mtd>
              </mtr>
            </mtable>
          </mrow>
          <mo fence="true" form="postfix" stretchy="true">)</mo>
        </mrow>
        <mprescripts/>
        <mrow>
          <msub>
            <mi mathvariant="italic">NED</mi>
            <mn>1</mn>
          </msub>
          <mi>'</mi>
          <mi>'</mi>
        </mrow>
        <none/>
      </mmultiscripts>
    </mrow>
    <annotation encoding="StarMath 5.0">M= left ( stack{r.cos%PHI_1 .cos%alpha .cos {%THETA} over {2} -r.sin%alpha . sin {%THETA} over {2}  # r.sin%PHI_1 .cos%alpha # r.sin%alpha .cos {%THETA} over {2} +r.cos%PHI_1 .cos%alpha .sin {%THETA} over {2}}  right )  lsub{NED_1''} </annotation>
  </semantics>
</math>
</file>

<file path=Object 79/content.xml><?xml version="1.0" encoding="utf-8"?>
<math xmlns="http://www.w3.org/1998/Math/MathML" display="block">
  <semantics>
    <mrow>
      <mi>x</mi>
      <mo stretchy="false">≥</mo>
      <mi mathvariant="italic">AI</mi>
    </mrow>
    <annotation encoding="StarMath 5.0">x  &gt;= AI</annotation>
  </semantics>
</math>
</file>

<file path=Object 8/content.xml><?xml version="1.0" encoding="utf-8"?>
<math xmlns="http://www.w3.org/1998/Math/MathML" display="block">
  <semantics>
    <mfrac>
      <mrow>
        <mi>π</mi>
        <mo stretchy="false">−</mo>
        <mi>θ</mi>
      </mrow>
      <mn>2</mn>
    </mfrac>
    <annotation encoding="StarMath 5.0">{%pi -  %theta} over {2}</annotation>
  </semantics>
</math>
</file>

<file path=Object 80/content.xml><?xml version="1.0" encoding="utf-8"?>
<math xmlns="http://www.w3.org/1998/Math/MathML" display="block">
  <semantics>
    <mrow>
      <mrow>
        <mi mathvariant="italic">AI</mi>
        <mo stretchy="false">=</mo>
        <msub>
          <mi>R</mi>
          <mi mathvariant="italic">Earth</mi>
        </msub>
      </mrow>
      <mn>.</mn>
      <mi>sin</mi>
      <mfrac>
        <mi mathvariant="normal">Θ</mi>
        <mn>2</mn>
      </mfrac>
    </mrow>
    <annotation encoding="StarMath 5.0">AI=R_{Earth}.sin %THETA  over 2  </annotation>
  </semantics>
</math>
</file>

<file path=Object 81/content.xml><?xml version="1.0" encoding="utf-8"?>
<math xmlns="http://www.w3.org/1998/Math/MathML" display="block">
  <semantics>
    <mrow>
      <mi>r</mi>
      <mn>.</mn>
      <mi>cos</mi>
      <msub>
        <mi mathvariant="normal">Φ</mi>
        <mn>1</mn>
      </msub>
      <mn>.</mn>
      <mi>cos</mi>
      <mi>α</mi>
      <mn>.</mn>
      <mi>cos</mi>
      <mrow>
        <mfrac>
          <mi mathvariant="normal">Θ</mi>
          <mn>2</mn>
        </mfrac>
        <mo stretchy="false">−</mo>
        <mi>r</mi>
      </mrow>
      <mn>.</mn>
      <mi>sin</mi>
      <mi>α</mi>
      <mn>.</mn>
      <mi>sin</mi>
      <mrow>
        <mfrac>
          <mi mathvariant="normal">Θ</mi>
          <mn>2</mn>
        </mfrac>
        <mo stretchy="false">≥</mo>
        <msub>
          <mi>R</mi>
          <mi mathvariant="italic">Earth</mi>
        </msub>
      </mrow>
      <mn>.</mn>
      <mi>sin</mi>
      <mfrac>
        <mi mathvariant="normal">Θ</mi>
        <mn>2</mn>
      </mfrac>
    </mrow>
    <annotation encoding="StarMath 5.0">r.cos%PHI_1 .cos%alpha .cos {%THETA} over {2} -r.sin%alpha . sin {%THETA} over {2}&gt;=R_{Earth}.sin %THETA  over 2  </annotation>
  </semantics>
</math>
</file>

<file path=Object 82/content.xml><?xml version="1.0" encoding="utf-8"?>
<math xmlns="http://www.w3.org/1998/Math/MathML" display="block">
  <semantics>
    <mrow>
      <mi>cos</mi>
      <mrow>
        <msub>
          <mi mathvariant="normal">Φ</mi>
          <mn>1</mn>
        </msub>
        <mo stretchy="false">≥</mo>
        <mi>tan</mi>
      </mrow>
      <mfrac>
        <mi mathvariant="normal">Θ</mi>
        <mn>2</mn>
      </mfrac>
      <mfrac>
        <mrow>
          <mo fence="true" form="prefix" stretchy="false">(</mo>
          <mrow>
            <mrow>
              <mrow>
                <msub>
                  <mi>R</mi>
                  <mi mathvariant="italic">Earth</mi>
                </msub>
                <mo stretchy="false">+</mo>
                <mi>r</mi>
              </mrow>
              <mn>.</mn>
              <mi>sin</mi>
              <mi>α</mi>
            </mrow>
          </mrow>
          <mo fence="true" form="postfix" stretchy="false">)</mo>
        </mrow>
        <mrow>
          <mi>r</mi>
          <mn>.</mn>
          <mi>cos</mi>
          <mi>α</mi>
        </mrow>
      </mfrac>
    </mrow>
    <annotation encoding="StarMath 5.0">cos%PHI_1   &gt;=tan %THETA  over 2 (R_{Earth} +r.sin%alpha) over {r.cos%alpha}</annotation>
  </semantics>
</math>
</file>

<file path=Object 83/content.xml><?xml version="1.0" encoding="utf-8"?>
<math xmlns="http://www.w3.org/1998/Math/MathML" display="block">
  <semantics>
    <mrow>
      <mi>tan</mi>
      <mfrac>
        <mi mathvariant="normal">Θ</mi>
        <mn>2</mn>
      </mfrac>
      <mfrac>
        <mrow>
          <mo fence="true" form="prefix" stretchy="false">(</mo>
          <mrow>
            <mrow>
              <mrow>
                <msub>
                  <mi>R</mi>
                  <mi mathvariant="italic">Earth</mi>
                </msub>
                <mo stretchy="false">+</mo>
                <mi>r</mi>
              </mrow>
              <mn>.</mn>
              <mi>sin</mi>
              <mi>α</mi>
            </mrow>
          </mrow>
          <mo fence="true" form="postfix" stretchy="false">)</mo>
        </mrow>
        <mrow>
          <mi>r</mi>
          <mn>.</mn>
          <mi>cos</mi>
          <mi>α</mi>
        </mrow>
      </mfrac>
    </mrow>
    <annotation encoding="StarMath 5.0">tan %THETA  over 2 (R_{Earth} +r.sin%alpha) over {r.cos%alpha}</annotation>
  </semantics>
</math>
</file>

<file path=Object 84/content.xml><?xml version="1.0" encoding="utf-8"?>
<math xmlns="http://www.w3.org/1998/Math/MathML" display="block">
  <semantics>
    <mrow>
      <mrow>
        <mrow>
          <mo stretchy="false">−</mo>
          <mn>1</mn>
        </mrow>
        <mo stretchy="false">≤</mo>
        <mi>tan</mi>
      </mrow>
      <mfrac>
        <mi mathvariant="normal">Θ</mi>
        <mn>2</mn>
      </mfrac>
      <mrow>
        <mfrac>
          <mrow>
            <mo fence="true" form="prefix" stretchy="false">(</mo>
            <mrow>
              <mrow>
                <mrow>
                  <msub>
                    <mi>R</mi>
                    <mi mathvariant="italic">Earth</mi>
                  </msub>
                  <mo stretchy="false">+</mo>
                  <mi>r</mi>
                </mrow>
                <mn>.</mn>
                <mi>sin</mi>
                <mi>α</mi>
              </mrow>
            </mrow>
            <mo fence="true" form="postfix" stretchy="false">)</mo>
          </mrow>
          <mrow>
            <mi>r</mi>
            <mn>.</mn>
            <mi>cos</mi>
            <mi>α</mi>
          </mrow>
        </mfrac>
        <mo stretchy="false">≤</mo>
        <mn>1</mn>
      </mrow>
    </mrow>
    <annotation encoding="StarMath 5.0">-1&lt;=tan %THETA  over 2 (R_{Earth} +r.sin%alpha) over {r.cos%alpha}&lt;=1</annotation>
  </semantics>
</math>
</file>

<file path=Object 85/content.xml><?xml version="1.0" encoding="utf-8"?>
<math xmlns="http://www.w3.org/1998/Math/MathML" display="block">
  <semantics>
    <mrow>
      <mrow>
        <mo stretchy="false">−</mo>
        <mi>r</mi>
      </mrow>
      <mrow>
        <mrow>
          <mo fence="true" form="prefix" stretchy="false">(</mo>
          <mrow>
            <mrow>
              <mrow>
                <mfrac>
                  <mrow>
                    <mi>cos</mi>
                    <mi>α</mi>
                  </mrow>
                  <mrow>
                    <mi>tan</mi>
                    <mfrac>
                      <mi mathvariant="normal">Θ</mi>
                      <mn>2</mn>
                    </mfrac>
                  </mrow>
                </mfrac>
                <mo stretchy="false">+</mo>
                <mi>sin</mi>
              </mrow>
              <mi>α</mi>
            </mrow>
          </mrow>
          <mo fence="true" form="postfix" stretchy="false">)</mo>
        </mrow>
        <mo stretchy="false">≤</mo>
        <mn>0</mn>
        <mo stretchy="false">≤</mo>
        <msub>
          <mi>R</mi>
          <mi mathvariant="italic">Earth</mi>
        </msub>
        <mo stretchy="false">≤</mo>
        <mi>r</mi>
      </mrow>
      <mrow>
        <mo fence="true" form="prefix" stretchy="false">(</mo>
        <mrow>
          <mrow>
            <mrow>
              <mfrac>
                <mrow>
                  <mi>cos</mi>
                  <mi>α</mi>
                </mrow>
                <mrow>
                  <mi>tan</mi>
                  <mfrac>
                    <mi mathvariant="normal">Θ</mi>
                    <mn>2</mn>
                  </mfrac>
                </mrow>
              </mfrac>
              <mo stretchy="false">−</mo>
              <mi>sin</mi>
            </mrow>
            <mi>α</mi>
          </mrow>
        </mrow>
        <mo fence="true" form="postfix" stretchy="false">)</mo>
      </mrow>
    </mrow>
    <annotation encoding="StarMath 5.0">- r({cos%alpha} over{tan %THETA  over 2}+sin%alpha)&lt;=0&lt;= R_{Earth} &lt;=r({cos%alpha} over{tan %THETA  over 2}-sin%alpha)</annotation>
  </semantics>
</math>
</file>

<file path=Object 86/content.xml><?xml version="1.0" encoding="utf-8"?>
<math xmlns="http://www.w3.org/1998/Math/MathML" display="block">
  <semantics>
    <mrow>
      <mfrac>
        <msub>
          <mi>R</mi>
          <mi mathvariant="italic">Earth</mi>
        </msub>
        <mi>r</mi>
      </mfrac>
      <mn>.</mn>
      <mi>sin</mi>
      <mrow>
        <mfrac>
          <mi mathvariant="normal">Θ</mi>
          <mn>2</mn>
        </mfrac>
        <mo stretchy="false">≤</mo>
        <mi>cos</mi>
      </mrow>
      <mi>α</mi>
      <mn>.</mn>
      <mi>cos</mi>
      <mrow>
        <mfrac>
          <mi mathvariant="normal">Θ</mi>
          <mn>2</mn>
        </mfrac>
        <mo stretchy="false">−</mo>
        <mi>sin</mi>
      </mrow>
      <mi>α</mi>
      <mn>.</mn>
      <mi>sin</mi>
      <mfrac>
        <mi mathvariant="normal">Θ</mi>
        <mn>2</mn>
      </mfrac>
      <mo stretchy="false">⇔</mo>
      <mfrac>
        <msub>
          <mi>R</mi>
          <mi mathvariant="italic">Earth</mi>
        </msub>
        <mi>r</mi>
      </mfrac>
      <mn>.</mn>
      <mi>sin</mi>
      <mrow>
        <mfrac>
          <mi mathvariant="normal">Θ</mi>
          <mn>2</mn>
        </mfrac>
        <mo stretchy="false">≤</mo>
        <mi>cos</mi>
      </mrow>
      <mrow>
        <mo fence="true" form="prefix" stretchy="false">(</mo>
        <mrow>
          <mrow>
            <mi>α</mi>
            <mo stretchy="false">+</mo>
            <mfrac>
              <mi mathvariant="normal">Θ</mi>
              <mn>2</mn>
            </mfrac>
          </mrow>
        </mrow>
        <mo fence="true" form="postfix" stretchy="false">)</mo>
      </mrow>
    </mrow>
    <annotation encoding="StarMath 5.0"> R_{Earth} over r. sin %THETA  over 2 &lt;=cos%alpha . cos  %THETA  over 2-sin%alpha . sin %THETA  over 2  dlrarrow  R_{Earth} over r. sin %THETA  over 2 &lt;=cos(%alpha+%THETA  over 2)</annotation>
  </semantics>
</math>
</file>

<file path=Object 87/content.xml><?xml version="1.0" encoding="utf-8"?>
<math xmlns="http://www.w3.org/1998/Math/MathML">
  <semantics>
    <mrow>
      <mfrac>
        <msub>
          <mi>R</mi>
          <mi mathvariant="italic">Earth</mi>
        </msub>
        <mi>r</mi>
      </mfrac>
      <mn>.</mn>
      <mi>sin</mi>
      <mrow>
        <mfrac>
          <mi mathvariant="normal">Θ</mi>
          <mn>2</mn>
        </mfrac>
        <mo stretchy="false">≤</mo>
        <mn>1</mn>
      </mrow>
    </mrow>
    <annotation encoding="StarMath 5.0">R_{Earth} over r. sin %THETA  over 2&lt;=1</annotation>
  </semantics>
</math>
</file>

<file path=Object 88/content.xml><?xml version="1.0" encoding="utf-8"?>
<math xmlns="http://www.w3.org/1998/Math/MathML">
  <semantics>
    <mrow>
      <mi mathvariant="italic">arcos</mi>
      <mrow>
        <mrow>
          <mrow>
            <mo fence="true" form="prefix" stretchy="false">(</mo>
            <mrow>
              <mrow>
                <mfrac>
                  <msub>
                    <mi>R</mi>
                    <mi mathvariant="italic">Earth</mi>
                  </msub>
                  <mi>r</mi>
                </mfrac>
                <mn>.</mn>
                <mi>sin</mi>
                <mfrac>
                  <mi mathvariant="normal">Θ</mi>
                  <mn>2</mn>
                </mfrac>
              </mrow>
            </mrow>
            <mo fence="true" form="postfix" stretchy="false">)</mo>
          </mrow>
          <mo stretchy="false">−</mo>
          <mfrac>
            <mi mathvariant="normal">Θ</mi>
            <mn>2</mn>
          </mfrac>
        </mrow>
        <mo stretchy="false">≥</mo>
        <mi>α</mi>
        <mo stretchy="false">≥</mo>
        <mrow>
          <mfrac>
            <mi mathvariant="normal">Θ</mi>
            <mn>2</mn>
          </mfrac>
          <mo stretchy="false">−</mo>
          <mi mathvariant="italic">arcos</mi>
        </mrow>
      </mrow>
      <mrow>
        <mo fence="true" form="prefix" stretchy="false">(</mo>
        <mrow>
          <mrow>
            <mfrac>
              <msub>
                <mi>R</mi>
                <mi mathvariant="italic">Earth</mi>
              </msub>
              <mi>r</mi>
            </mfrac>
            <mn>.</mn>
            <mi>sin</mi>
            <mfrac>
              <mi mathvariant="normal">Θ</mi>
              <mn>2</mn>
            </mfrac>
          </mrow>
        </mrow>
        <mo fence="true" form="postfix" stretchy="false">)</mo>
      </mrow>
    </mrow>
    <annotation encoding="StarMath 5.0">arcos(R_{Earth} over r. sin %THETA  over 2)-%THETA over 2 &gt;=%alpha&gt;=%THETA over 2-arcos(R_{Earth} over r. sin %THETA  over 2)</annotation>
  </semantics>
</math>
</file>

<file path=Object 89/content.xml><?xml version="1.0" encoding="utf-8"?>
<math xmlns="http://www.w3.org/1998/Math/MathML" display="block">
  <semantics>
    <mrow>
      <mi>cos</mi>
      <mrow>
        <mrow>
          <mo fence="true" form="prefix" stretchy="false">(</mo>
          <mrow>
            <mrow>
              <mi mathvariant="normal">Φ</mi>
              <mo stretchy="false">−</mo>
              <mi>γ</mi>
            </mrow>
          </mrow>
          <mo fence="true" form="postfix" stretchy="false">)</mo>
        </mrow>
        <mo stretchy="false">≤</mo>
        <mi>tan</mi>
      </mrow>
      <mfrac>
        <mi mathvariant="normal">Θ</mi>
        <mn>2</mn>
      </mfrac>
      <mfrac>
        <mrow>
          <mo fence="true" form="prefix" stretchy="false">(</mo>
          <mrow>
            <mrow>
              <mrow>
                <msub>
                  <mi>R</mi>
                  <mi mathvariant="italic">Earth</mi>
                </msub>
                <mo stretchy="false">+</mo>
                <mi>r</mi>
              </mrow>
              <mn>.</mn>
              <mi>sin</mi>
              <mi>α</mi>
            </mrow>
          </mrow>
          <mo fence="true" form="postfix" stretchy="false">)</mo>
        </mrow>
        <mrow>
          <mi>r</mi>
          <mn>.</mn>
          <mi>cos</mi>
          <mi>α</mi>
        </mrow>
      </mfrac>
    </mrow>
    <annotation encoding="StarMath 5.0">cos(%PHI-%gamma) &lt;= tan %THETA  over 2 (R_{Earth} +r.sin%alpha) over {r.cos%alpha}</annotation>
  </semantics>
</math>
</file>

<file path=Object 9/content.xml><?xml version="1.0" encoding="utf-8"?>
<math xmlns="http://www.w3.org/1998/Math/MathML" display="block">
  <semantics>
    <mrow>
      <mover accent="true">
        <mi>n</mi>
        <mo stretchy="true">⃗</mo>
      </mover>
      <mo stretchy="false">=</mo>
      <mmultiscripts>
        <mrow>
          <mo fence="true" stretchy="true">(</mo>
          <mrow>
            <mtable>
              <mtr>
                <mtd>
                  <mrow>
                    <mi>cos</mi>
                    <mi>γ</mi>
                    <mn>.</mn>
                    <mi>cos</mi>
                    <mfrac>
                      <mi>θ</mi>
                      <mn>2</mn>
                    </mfrac>
                  </mrow>
                </mtd>
              </mtr>
              <mtr>
                <mtd>
                  <mrow>
                    <mi>sin</mi>
                    <mi>γ</mi>
                    <mn>.</mn>
                    <mi>cos</mi>
                    <mfrac>
                      <mi>θ</mi>
                      <mn>2</mn>
                    </mfrac>
                  </mrow>
                </mtd>
              </mtr>
              <mtr>
                <mtd>
                  <mrow>
                    <mi>sin</mi>
                    <mfrac>
                      <mi>θ</mi>
                      <mn>2</mn>
                    </mfrac>
                  </mrow>
                </mtd>
              </mtr>
            </mtable>
          </mrow>
          <mo fence="true" stretchy="true">)</mo>
        </mrow>
        <mprescripts/>
        <msub>
          <mi mathvariant="italic">NED</mi>
          <mn>1</mn>
        </msub>
        <none/>
      </mmultiscripts>
    </mrow>
    <annotation encoding="StarMath 5.0">widevec {n} = left ( stack{cos%gamma .cos{%theta}over{2} # sin%gamma .cos{%theta}over{2} # sin{%theta}over{2}}  right )  lsub{NED_1} </annotation>
  </semantics>
</math>
</file>

<file path=Object 90/content.xml><?xml version="1.0" encoding="utf-8"?>
<math xmlns="http://www.w3.org/1998/Math/MathML" display="block">
  <semantics>
    <mrow>
      <mrow>
        <mo fence="true" form="prefix" stretchy="true">{</mo>
        <mrow>
          <mtable>
            <mtr>
              <mtd>
                <mrow>
                  <mrow>
                    <mrow>
                      <mi mathvariant="normal">Φ</mi>
                      <mo stretchy="false">−</mo>
                      <mi>γ</mi>
                    </mrow>
                    <mo stretchy="false">≤</mo>
                    <mi mathvariant="italic">arcos</mi>
                  </mrow>
                  <mrow>
                    <mo fence="true" form="prefix" stretchy="false">(</mo>
                    <mrow>
                      <mrow>
                        <msub>
                          <mi>f</mi>
                          <mi mathvariant="italic">max</mi>
                        </msub>
                        <mrow>
                          <mo fence="true" form="prefix" stretchy="false">(</mo>
                          <mrow>
                            <mi mathvariant="normal">Θ</mi>
                          </mrow>
                          <mo fence="true" form="postfix" stretchy="false">)</mo>
                        </mrow>
                      </mrow>
                    </mrow>
                    <mo fence="true" form="postfix" stretchy="false">)</mo>
                  </mrow>
                </mrow>
              </mtd>
            </mtr>
            <mtr>
              <mtd>
                <mrow>
                  <mrow>
                    <mrow>
                      <mrow>
                        <mo stretchy="false">−</mo>
                        <mi mathvariant="normal">Φ</mi>
                      </mrow>
                      <mo stretchy="false">+</mo>
                      <mi>γ</mi>
                    </mrow>
                    <mo stretchy="false">≤</mo>
                    <mi mathvariant="italic">arcos</mi>
                  </mrow>
                  <mrow>
                    <mo fence="true" form="prefix" stretchy="false">(</mo>
                    <mrow>
                      <mrow>
                        <msub>
                          <mi>f</mi>
                          <mi mathvariant="italic">max</mi>
                        </msub>
                        <mrow>
                          <mo fence="true" form="prefix" stretchy="false">(</mo>
                          <mrow>
                            <mi mathvariant="normal">Θ</mi>
                          </mrow>
                          <mo fence="true" form="postfix" stretchy="false">)</mo>
                        </mrow>
                      </mrow>
                    </mrow>
                    <mo fence="true" form="postfix" stretchy="false">)</mo>
                  </mrow>
                </mrow>
              </mtd>
            </mtr>
          </mtable>
        </mrow>
      </mrow>
      <mo stretchy="false">⇒</mo>
      <mrow>
        <mi>γ</mi>
        <mo stretchy="false">−</mo>
        <mi mathvariant="italic">arcos</mi>
      </mrow>
      <mrow>
        <mrow>
          <mo fence="true" form="prefix" stretchy="false">(</mo>
          <mrow>
            <mrow>
              <msub>
                <mi>f</mi>
                <mi mathvariant="italic">max</mi>
              </msub>
              <mrow>
                <mo fence="true" form="prefix" stretchy="false">(</mo>
                <mrow>
                  <mi mathvariant="normal">Θ</mi>
                </mrow>
                <mo fence="true" form="postfix" stretchy="false">)</mo>
              </mrow>
            </mrow>
          </mrow>
          <mo fence="true" form="postfix" stretchy="false">)</mo>
        </mrow>
        <mo stretchy="false">≤</mo>
        <mi mathvariant="normal">Φ</mi>
        <mo stretchy="false">≤</mo>
        <mi mathvariant="italic">arcos</mi>
      </mrow>
      <mrow>
        <mrow>
          <mo fence="true" form="prefix" stretchy="false">(</mo>
          <mrow>
            <mrow>
              <msub>
                <mi>f</mi>
                <mi mathvariant="italic">max</mi>
              </msub>
              <mrow>
                <mo fence="true" form="prefix" stretchy="false">(</mo>
                <mrow>
                  <mi mathvariant="normal">Θ</mi>
                </mrow>
                <mo fence="true" form="postfix" stretchy="false">)</mo>
              </mrow>
            </mrow>
          </mrow>
          <mo fence="true" form="postfix" stretchy="false">)</mo>
        </mrow>
        <mo stretchy="false">+</mo>
        <mi>γ</mi>
      </mrow>
    </mrow>
    <annotation encoding="StarMath 5.0">left lbrace  binom{%PHI-%gamma &lt;= arcos(f_{max}(%THETA))}{-%PHI+%gamma &lt;= arcos(f_{max}(%THETA))}  right none drarrow %gamma-arcos(f_{max}(%THETA)) &lt;=%PHI&lt;= arcos(f_{max}(%THETA))+%gamma </annotation>
  </semantics>
</math>
</file>

<file path=Object 91/content.xml><?xml version="1.0" encoding="utf-8"?>
<math xmlns="http://www.w3.org/1998/Math/MathML">
  <semantics>
    <mi mathvariant="normal">Θ</mi>
    <annotation encoding="StarMath 5.0">%THETA</annotation>
  </semantics>
</math>
</file>

<file path=Object 92/content.xml><?xml version="1.0" encoding="utf-8"?>
<math xmlns="http://www.w3.org/1998/Math/MathML">
  <semantics>
    <mi>α</mi>
    <annotation encoding="StarMath 5.0">%alpha</annotation>
  </semantics>
</math>
</file>

<file path=Object 93/content.xml><?xml version="1.0" encoding="utf-8"?>
<math xmlns="http://www.w3.org/1998/Math/MathML">
  <semantics>
    <mrow>
      <mi>f</mi>
      <mrow>
        <mrow>
          <mo fence="true" form="prefix" stretchy="false">(</mo>
          <mrow>
            <mrow>
              <mi mathvariant="normal">Θ</mi>
              <mi>,</mi>
              <mi>r</mi>
              <mi>,</mi>
              <mi>α</mi>
            </mrow>
          </mrow>
          <mo fence="true" form="postfix" stretchy="false">)</mo>
        </mrow>
        <mo stretchy="false">=</mo>
        <mi>tan</mi>
      </mrow>
      <mfrac>
        <mi mathvariant="normal">Θ</mi>
        <mn>2</mn>
      </mfrac>
      <mrow>
        <mfrac>
          <mrow>
            <mo fence="true" form="prefix" stretchy="false">(</mo>
            <mrow>
              <mrow>
                <mrow>
                  <msub>
                    <mi>R</mi>
                    <mi mathvariant="italic">Earth</mi>
                  </msub>
                  <mo stretchy="false">+</mo>
                  <mi>r</mi>
                </mrow>
                <mn>.</mn>
                <mi>sin</mi>
                <mi>α</mi>
              </mrow>
            </mrow>
            <mo fence="true" form="postfix" stretchy="false">)</mo>
          </mrow>
          <mrow>
            <mi>r</mi>
            <mn>.</mn>
            <mi>cos</mi>
            <mi>α</mi>
          </mrow>
        </mfrac>
        <mo stretchy="false">=</mo>
        <mi>tan</mi>
      </mrow>
      <mfrac>
        <mi mathvariant="normal">Θ</mi>
        <mn>2</mn>
      </mfrac>
      <mrow>
        <mo fence="true" form="prefix" stretchy="false">(</mo>
        <mrow>
          <mrow>
            <mrow>
              <mfrac>
                <msub>
                  <mi>R</mi>
                  <mi mathvariant="italic">Earth</mi>
                </msub>
                <mrow>
                  <mi>r</mi>
                  <mn>.</mn>
                  <mi>cos</mi>
                  <mi>α</mi>
                </mrow>
              </mfrac>
              <mo stretchy="false">+</mo>
              <mi>tan</mi>
            </mrow>
            <mi>α</mi>
          </mrow>
        </mrow>
        <mo fence="true" form="postfix" stretchy="false">)</mo>
      </mrow>
    </mrow>
    <annotation encoding="StarMath 5.0">f(%THETA,r,%alpha)=tan %THETA  over 2 (R_{Earth} +r.sin%alpha) over {r.cos%alpha}=tan %THETA  over 2 (R_{Earth} over {r.cos%alpha}+tan%alpha)</annotation>
  </semantics>
</math>
</file>

<file path=Object 94/content.xml><?xml version="1.0" encoding="utf-8"?>
<math xmlns="http://www.w3.org/1998/Math/MathML">
  <semantics>
    <mrow>
      <mrow>
        <mrow>
          <mo fence="true" form="prefix" stretchy="false">(</mo>
          <mrow>
            <mrow>
              <mi mathvariant="normal">Θ</mi>
              <mi>,</mi>
              <mi>r</mi>
              <mi>,</mi>
              <mi>α</mi>
            </mrow>
          </mrow>
          <mo fence="true" form="postfix" stretchy="false">)</mo>
        </mrow>
        <mo stretchy="false">∈</mo>
        <mo stretchy="false">(</mo>
      </mrow>
      <mo stretchy="false">[</mo>
      <mn>0</mn>
      <mi>,</mi>
      <mi>π</mi>
      <mo stretchy="false">[</mo>
      <mi>,</mi>
      <mo stretchy="false">]</mo>
      <mn>0</mn>
      <mi>,</mi>
      <mi>R</mi>
      <mo stretchy="false">]</mo>
      <mi>,</mi>
      <mo stretchy="false">[</mo>
      <msub>
        <mi>α</mi>
        <mi mathvariant="italic">min</mi>
      </msub>
      <mi>,</mi>
      <mfrac>
        <mi>π</mi>
        <mn>2</mn>
      </mfrac>
      <mo stretchy="false">[</mo>
      <mo stretchy="false">)</mo>
    </mrow>
    <annotation encoding="StarMath 5.0">{(  %THETA,r,%alpha)} in \( \[0,%pi\[, \]0,R\], \[%alpha_{min},%pi over 2\[ \)</annotation>
  </semantics>
</math>
</file>

<file path=Object 95/content.xml><?xml version="1.0" encoding="utf-8"?>
<math xmlns="http://www.w3.org/1998/Math/MathML">
  <semantics>
    <mi>α</mi>
    <annotation encoding="StarMath 5.0">%alpha</annotation>
  </semantics>
</math>
</file>

<file path=Object 96/content.xml><?xml version="1.0" encoding="utf-8"?>
<math xmlns="http://www.w3.org/1998/Math/MathML">
  <semantics>
    <msub>
      <mi>α</mi>
      <mi mathvariant="italic">min</mi>
    </msub>
    <annotation encoding="StarMath 5.0">%alpha_{min}</annotation>
  </semantics>
</math>
</file>

<file path=Object 97/content.xml><?xml version="1.0" encoding="utf-8"?>
<math xmlns="http://www.w3.org/1998/Math/MathML">
  <semantics>
    <mrow>
      <msub>
        <mi>f</mi>
        <mi mathvariant="italic">max</mi>
      </msub>
      <mrow>
        <mrow>
          <mo fence="true" form="prefix" stretchy="false">(</mo>
          <mrow>
            <mi mathvariant="normal">Θ</mi>
          </mrow>
          <mo fence="true" form="postfix" stretchy="false">)</mo>
        </mrow>
        <mo stretchy="false">=</mo>
        <mrow>
          <mo fence="true" form="prefix" stretchy="false">(</mo>
          <mrow>
            <mrow>
              <mi mathvariant="normal">Θ</mi>
              <mi>,</mi>
              <mi>R</mi>
              <mi>,</mi>
              <msub>
                <mi>α</mi>
                <mi mathvariant="italic">min</mi>
              </msub>
            </mrow>
          </mrow>
          <mo fence="true" form="postfix" stretchy="false">)</mo>
        </mrow>
        <mo stretchy="false">=</mo>
        <mi>tan</mi>
      </mrow>
      <mfrac>
        <mi mathvariant="normal">Θ</mi>
        <mn>2</mn>
      </mfrac>
      <mrow>
        <mo fence="true" form="prefix" stretchy="false">(</mo>
        <mrow>
          <mrow>
            <mrow>
              <mfrac>
                <msub>
                  <mi>R</mi>
                  <mi mathvariant="italic">Earth</mi>
                </msub>
                <mrow>
                  <mi>R</mi>
                  <mn>.</mn>
                  <mi>cos</mi>
                  <msub>
                    <mi>α</mi>
                    <mi mathvariant="italic">min</mi>
                  </msub>
                </mrow>
              </mfrac>
              <mo stretchy="false">+</mo>
              <mi>tan</mi>
            </mrow>
            <msub>
              <mi>α</mi>
              <mi mathvariant="italic">min</mi>
            </msub>
          </mrow>
        </mrow>
        <mo fence="true" form="postfix" stretchy="false">)</mo>
      </mrow>
    </mrow>
    <annotation encoding="StarMath 5.0">f_{max}(%THETA)=(%THETA,R,%alpha_{min})=tan %THETA  over 2 (R_{Earth} over {R.cos%alpha_{min}}+tan%alpha_{min})</annotation>
  </semantics>
</math>
</file>

<file path=Object 98/content.xml><?xml version="1.0" encoding="utf-8"?>
<math xmlns="http://www.w3.org/1998/Math/MathML" display="block">
  <semantics>
    <mi mathvariant="normal">Φ</mi>
    <annotation encoding="StarMath 5.0">%PHI</annotation>
  </semantics>
</math>
</file>

<file path=Object 99/content.xml><?xml version="1.0" encoding="utf-8"?>
<math xmlns="http://www.w3.org/1998/Math/MathML">
  <semantics>
    <mi>γ</mi>
    <annotation encoding="StarMath 5.0">%gamma</annotation>
  </semantics>
</math>
</file>